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officeooo:paragraph-rsid="00102222"/>
    </style:style>
    <style:style style:name="P2" style:family="paragraph" style:parent-style-name="Text_20_body">
      <style:text-properties officeooo:paragraph-rsid="0010e0ad"/>
    </style:style>
    <style:style style:name="P3" style:family="paragraph" style:parent-style-name="Text_20_body">
      <style:text-properties officeooo:paragraph-rsid="001b6ee2"/>
    </style:style>
    <style:style style:name="P4" style:family="paragraph" style:parent-style-name="Text_20_body">
      <style:text-properties officeooo:paragraph-rsid="0012546e"/>
    </style:style>
    <style:style style:name="P5" style:family="paragraph" style:parent-style-name="Text_20_body">
      <style:text-properties officeooo:paragraph-rsid="0013f041"/>
    </style:style>
    <style:style style:name="P6" style:family="paragraph" style:parent-style-name="Text_20_body">
      <style:text-properties officeooo:paragraph-rsid="00174e80"/>
    </style:style>
    <style:style style:name="P7" style:family="paragraph" style:parent-style-name="Text_20_body">
      <style:text-properties officeooo:rsid="0014eb88" officeooo:paragraph-rsid="00174e80"/>
    </style:style>
    <style:style style:name="P8" style:family="paragraph" style:parent-style-name="Text_20_body">
      <style:text-properties officeooo:paragraph-rsid="00184a26"/>
    </style:style>
    <style:style style:name="P9" style:family="paragraph" style:parent-style-name="Text_20_body">
      <style:text-properties officeooo:rsid="00184a26" officeooo:paragraph-rsid="00184a26"/>
    </style:style>
    <style:style style:name="P10" style:family="paragraph" style:parent-style-name="Text_20_body">
      <style:text-properties officeooo:paragraph-rsid="00184e08"/>
    </style:style>
    <style:style style:name="P11" style:family="paragraph" style:parent-style-name="Standard">
      <style:text-properties officeooo:paragraph-rsid="0012546e"/>
    </style:style>
    <style:style style:name="P12" style:family="paragraph" style:parent-style-name="Standard">
      <style:text-properties officeooo:rsid="000fb68f" officeooo:paragraph-rsid="000fb68f"/>
    </style:style>
    <style:style style:name="P13" style:family="paragraph" style:parent-style-name="Text_20_body">
      <style:text-properties officeooo:paragraph-rsid="00102222"/>
    </style:style>
    <style:style style:name="P14" style:family="paragraph" style:parent-style-name="Heading_20_3">
      <style:text-properties officeooo:rsid="000fb68f" officeooo:paragraph-rsid="000fb68f"/>
    </style:style>
    <style:style style:name="P15" style:family="paragraph" style:parent-style-name="Text_20_body">
      <style:text-properties fo:font-weight="bold"/>
    </style:style>
    <style:style style:name="T1" style:family="text">
      <style:text-properties officeooo:rsid="000bc76a"/>
    </style:style>
    <style:style style:name="T2" style:family="text">
      <style:text-properties fo:font-style="italic" officeooo:rsid="000bc76a"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officeooo:rsid="000f7d91" style:font-style-asian="italic" style:font-style-complex="italic"/>
    </style:style>
    <style:style style:name="T5" style:family="text">
      <style:text-properties officeooo:rsid="000e30c8"/>
    </style:style>
    <style:style style:name="T6" style:family="text">
      <style:text-properties officeooo:rsid="001eb3be"/>
    </style:style>
    <style:style style:name="T7" style:family="text">
      <style:text-properties officeooo:rsid="0010e0ad"/>
    </style:style>
    <style:style style:name="T8" style:family="text">
      <style:text-properties officeooo:rsid="001b6ee2"/>
    </style:style>
    <style:style style:name="T9" style:family="text">
      <style:text-properties officeooo:rsid="001d2b18"/>
    </style:style>
    <style:style style:name="T10" style:family="text">
      <style:text-properties officeooo:rsid="0012546e"/>
    </style:style>
    <style:style style:name="T11" style:family="text">
      <style:text-properties officeooo:rsid="0013f041"/>
    </style:style>
    <style:style style:name="T12" style:family="text">
      <style:text-properties officeooo:rsid="0014eb88"/>
    </style:style>
    <style:style style:name="T13" style:family="text">
      <style:text-properties officeooo:rsid="00174e80"/>
    </style:style>
    <style:style style:name="T14" style:family="text">
      <style:text-properties officeooo:rsid="00184a26"/>
    </style:style>
    <style:style style:name="T15" style:family="text">
      <style:text-properties officeooo:rsid="00184e08"/>
    </style:style>
    <style:style style:name="T16" style:family="text">
      <style:text-properties officeooo:rsid="000fb68f"/>
    </style:style>
    <style:style style:name="T17" style:family="text">
      <style:text-properties officeooo:rsid="001d13c2"/>
    </style:style>
    <style:style style:name="T18" style:family="text">
      <style:text-properties fo:font-style="italic" officeooo:rsid="000fb68f" style:font-style-asian="italic" style:font-style-complex="italic"/>
    </style:style>
    <style:style style:name="T19"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om <text:span text:style-name="T1">Rouche, James Jeffrey (1891)</text:span><text:span text:style-name="T2"> <text:s/>L</text:span><text:span text:style-name="T3">ife of </text:span><text:span text:style-name="T4">J</text:span><text:span text:style-name="T3">ohn </text:span><text:span text:style-name="T4">B</text:span><text:span text:style-name="T3">oyle </text:span><text:span text:style-name="T4">O</text:span><text:span text:style-name="T3">'</text:span><text:span text:style-name="T4">R</text:span><text:span text:style-name="T3">eilly]</text:span></text:h>
      <text:p text:style-name="Standard">The Papyrus Club was the outcome of a reception given by the newspaper men of Boston to Henry M. Stanley, the famous African explorer, on Saturday afternoon, December 14, 1872. About thirty of Stanley’s fellow-journalists assembled at the Parker House, W. B. Smart, President of the Boston Press Club, presiding, and John Boyle O’ Reilly delivering the address of welcome. He paid a tribute to the ‘‘reportorial’’ profession, and especially to the representative of it, ‘‘a man, a young man, trained only as all present had been, who had yet been able to lead an expedition into the heart of Africa, and succeed where the Old World, with all its resources, had failed.”’ After the formal reception and dinner, half a dozen of the young newspaper men present continued the post-prandial exercises at a then famous old chop-house known as ‘‘ Billy Park’s,’”’ in Central Court, on Washington Street, in the rear of Jordan &amp; Marsh’s dry-goods establishment. The march of commerce has wiped out the hostelry, and built over the Court, but it was on that night, and in ‘ Billy Park’s’’ Tavern, that the Papyrus Club was born. Its christening did not take place until some weeks later. The men who met that night at Park’s were O’ Reilly, Stanley, Edward King, Charles Eyre Pascoe, William A. Hovey (‘‘Causeur’’), Francis H. Underwood, first editor of the Atlantic Monthly, Alexander Young, the historian, and W. W. Messer, Jr. The second meeting of the club occurred on the following Saturday at the same place. Its object, as stated in the newspaper reports at the time, was that of ‘‘ organizing the leading writers of the daily, weekly, and periodical press of the city in a club, for the purpose of promoting better acquaintance, one with another, and affording headquarters to which gentlemen of reputation in literature and art may be invited while on visits to Boston.”</text:p>
      <text:p text:style-name="Standard"/>
      <text:p text:style-name="Standard">At this meeting, besides those who had attended the first, were present, Geo. M. Towle, the historian; N. <text:span text:style-name="T1">S</text:span>. Dodge, and Benjamin Woolf, who gave the club its name. It was quickly organized, with N. S. Dodge as president <text:span text:style-name="T5">a</text:span>nd Charles E. Pascoe as secretary. Its early history is shrouded with some of the mystery appropriate to all great institutions. O’ Reilly was one of the executive committee. A printed call, dated February 26, 1873, says:</text:p>
      <text:p text:style-name="Standard"/>
      <text:p text:style-name="P1">The Papyrus Club having at its last meeting effected a complete organization, it is very desirable that at its next dinner, which will take place at Park’s Hotel, on Saturday, March 1, every person who has heretofore been connected with the movement to establish the club should be present.</text:p>
      <text:p text:style-name="P1"><text:span text:style-name="T5">I </text:span>am requested by the president and members of the executive committee to suggest that the opportunity will be a favorable one for presenting the names of persons who desire to join the club, and that it will materially add to the pleasure of the occasion, and afford members an opportunity to vote intelligently upon the admission of candidates, if gentlemen see fit to bring with them, as their guests, those whose names they intend proposing.</text:p>
      <text:p text:style-name="P1">As it is necessary that exact information as to the number to be present should be in the hands of the caterer for the evening prior to Friday, the 28th inst., you are requested to inform Mr. Benjamin Woolf, Globe office, by note or otherwise, and not later than Thursday, 27th inst., whether you intend to participate, and if so, whether a guest will accompany you. As the organized existence of the club will in a great measure date from the meeting in question, it is hoped that every member will make an effort to be present.</text:p>
      <text:p text:style-name="Quotations"><text:soft-page-break/></text:p>
      <text:p text:style-name="Quotations">Very respectfully yours, C<text:span text:style-name="T5">has</text:span>. <text:span text:style-name="T5">E</text:span>. PASCO<text:span text:style-name="T5">E</text:span>, Secretary.</text:p>
      <text:p text:style-name="Standard"/>
      <text:p text:style-name="Standard">Among the other early members of the club were J. Cheever Goodwin, Nat. Childs, Geo. F. Babbitt, Robert G. Fitch, Henry M. Rogers, Edgar Parker, Edwin P. Whipple, Dr. George B. Loring, E. A. Sothern (‘Lord Dundreary’’), Benjamin H. Ticknor, T. B. Ticknor, Howard M. Ticknor, James R. Osgood, George M. Baker, Dr. W. <text:span text:style-name="T6">H</text:span>. Dennett, William T. Adams (‘‘Oliver Optic’’), Dr. R. D. Joyce, Lambert Hollis, Dr. F. A. Harris, William M. Hunt, the famous artist, and several other men distinguished in art and literature.</text:p>
      <text:p text:style-name="Standard"/>
      <text:p text:style-name="Standard">It goes without saying that none of the members were blessed with worldly wealth. At first the club was a pure <text:span text:style-name="T5">d</text:span>emocracy, unfettered by law or precedent, the only authority ever invoked by the kindly ruler, President Dodge, consisting in a vague threat to ‘‘name’’ any member whose boisterousness exceeded the bounds of decorum. The dinner was simple, consisting of chops, steaks, or joints, its austerity being mitigated by beer.</text:p>
      <text:p text:style-name="Standard"/>
      <text:p text:style-name="Standard">In due time, as the club prospered, an attempt was made, which never wholly succeeded, to introduce evening costume. The president had always appeared thus arrayed, and it was voted, by way of compromise, t<text:span text:style-name="T5">h</text:span>at his dignified ‘‘swallow-tail’’ ‘should be considered the ‘‘club coat.” At an early stage in its career the club voted to increase its membership and finances, simultaneously, by admitting a certain number of gentlemen, not exceeding one third of the whole, as ‘‘non-literary members.’’ There was a hazy expectation that wealth would thence flow into the coffers of the club, which should be thereby enabled to build a house and live up to its reputation. Bonds were to be issued, but those securities were never listed on the Stock Exchange. When it came to the election of ‘‘non-literary”’ millionaires, the club insisted on choosing candidates possessed of qualities not usually concomitant with wealth. The non-literary members chosen were ‘‘ good fellows’’ to a man: the literary members were of the same character <text:s/>ipso facto. On one historic evening there were elected Thomas Bailey Aldrich, William Dean Howells, Charles Gaylord, and Dr. George B. Loring. Such non-literary men as EK. E. Rice, of ‘Evangeline,’’ George Roberts, W. A. Means, F. V. Parker, and a score of others, did not detract from the gayety of the genial Bohemian crowd.</text:p>
      <text:p text:style-name="Standard"/>
      <text:p text:style-name="Standard">There was something more than mere pleasure associated with those meetings. As George M. Towle has well said: ‘‘ Pleasant as are <text:span text:style-name="T5">i</text:span>ts literary features, its habit of hospitality to prominent strangers, its brilliant ladies’ nights, its occasional music and fitful eloquence, to me its most grateful use is the freedom, the enlivenment, and I may perhaps even add, the affectionateness of its social sphere. I suppose most of us feel a kindlier interest in a man when we know he is a Papyrus man. I think we are more ready to help him when he is trouble, to regret his calamities, to rejoice in his good fortune. I think any Papyrus man who has suffered some worldly grief may come here to this board in the absolute certainty that he will be surrounded by such an atmosphere of brotherly sympathy and encouragement as will enable him to carry away revived spirits and renewed hopes. These genial customs, these monthly greetings, soften the harshness of life, encourage the kindliness, tolerance, and generosity of feeling which serve us in good and noble stead in our daily battles wit<text:span text:style-name="T7">h</text:span> the outer world.”’</text:p>
      <text:p text:style-name="Standard"/>
      <text:h text:style-name="Heading_20_2" text:outline-level="2"><text:soft-page-break/>THE PAPYRUS CLUB</text:h>
      <text:h text:style-name="Heading_20_2" text:outline-level="2">History of a Famous Boston Gathering. <text:s/><text:span text:style-name="T7">[</text:span>From the Boston Herald, <text:span text:style-name="T8">March 1888</text:span><text:span text:style-name="T7">]</text:span></text:h>
      <text:p text:style-name="P2"/>
      <text:p text:style-name="P3">T<text:span text:style-name="T7">he </text:span>Papyrus Clu<text:span text:style-name="T7">b</text:span> everybody know<text:span text:style-name="T8">s</text:span>, but everybody does not know the story of its humble origin. This lack of information, however, is not due to the modesty o<text:span text:style-name="T7">f</text:span> perhaps a good round doze<text:span text:style-name="T7">n</text:span> of gentlemen, each of whom have, at one time or another, cla<text:span text:style-name="T7">i</text:span>med to be the sole founder of the dynasty that has, for sixteen or seventeen years, reigned <text:span text:style-name="T7">o</text:span>ver that classic and herois band. Mr. George Makepeace Towle, once upon a tim<text:span text:style-name="T7">e</text:span>, in other words at a Papyrus dinner six years ago, sald : “The Papyrus, Bohemian, <text:s/>free, democratic, unco<text:span text:style-name="T7">n</text:span>ventional, and fes<text:span text:style-name="T7">tive was born very appropriately in a dingy and</text:span> somewhat obscure hostelry down an alley-way, and amid surroundings the reverse of elegant or formal. There were fourteen or fifteen at the first two or three meetings. Of these, I suppose, less tban hal<text:span text:style-name="T7">f</text:span> now constitut<text:span text:style-name="T7">e</text:span> <text:span text:style-name="T7">o</text:span>ur patriarch<text:span text:style-name="T7">ate</text:span>. The s<text:span text:style-name="T7">i</text:span>g<text:span text:style-name="T7">nal honor of being the founder is now di</text:span><text:span text:style-name="T9">s</text:span>puted, I <text:span text:style-name="T7">believe, by two claimants; and the </text:span>issue is likely, like Homer’s birthplace, the <text:s/>authorship of the Junius letters, and the tdentity of the <text:span text:style-name="T7">i</text:span>ron mask, to remain an historic mystery. We shall, <text:span text:style-name="T7">perhaps, never</text:span> know whether the father of Papyrus was a short and sturdy Briton named Pas<text:span text:style-name="T7">c</text:span>oe, or one who still lingers with us, and who has been sometimes spoken of as ‘Causeur.’ ”</text:p>
      <text:p text:style-name="P4"><text:s/>This, at least, is certain, that on the night of the 14th of December, 1872, aceording to <text:span text:style-name="T7">the newspaper clipping in the</text:span> possession of <text:s/>the writer, <text:s/>“the journalists of Boston gave a reception to Mr. Henry M. Stanley, the N. Y. Herald reporter who found Dr. Livingstone, John Boyle O'Rei<text:span text:style-name="T7">l</text:span>ly of THE PILOT delivering the address of welcome.” This reception oceurred at the <text:span text:style-name="T7">P</text:span>arker House, and after it Boyle O'Rellly, as speaker of the evening, escorted Mr. Stan<text:span text:style-name="T7">l</text:span>ey to <text:s/>“Billy Pa<text:span text:style-name="T7">r</text:span>k's” <text:span text:style-name="T7">c</text:span>hopbouse, then in Central Court, back of Jordan &amp; Marsh’s, and with this couple went Edward King, the<text:span text:style-name="T6">n</text:span> on the local staff of the Journal, Charles Eyre Pascoe and Alexander Young, of the G<text:span text:style-name="T10">l</text:span>obe, Will<text:span text:style-name="T9">i</text:span>am A. Hovey (“<text:span text:style-name="T7">Cau</text:span>seur” ), then of the Commer<text:span text:style-name="T7">c</text:span>ial Bulletin, George M. Towle of the <text:span text:style-name="T10">A</text:span>dvertiser, Franc<text:span text:style-name="T10">i</text:span>s H. Underwood, now United <text:span text:style-name="T10">S</text:span>tates <text:span text:style-name="T10">C</text:span>onsul at Glasgow, Mr. N. <text:span text:style-name="T10">S</text:span>. Dodge and --- Messer, who a<text:span text:style-name="T10">f</text:span>terward <text:span text:style-name="T10">left</text:span> Boston for <text:span text:style-name="T10">C</text:span>al<text:span text:style-name="T10">i</text:span>for<text:span text:style-name="T10">n</text:span>ia, A<text:span text:style-name="T10">u</text:span>stralia, or some remote locality, and who has never returned. There was a humble, though jovial feast that night at “Billy Park’s,” and it was arranged that on the following Saturday, or <text:span text:style-name="T10">i</text:span>t may have been a fortnight later, there should be another meeting in the same piace. At the second meeting there were 14 or 15 present, and the <text:span text:style-name="T10">c</text:span>lu<text:span text:style-name="T10">b</text:span> was organized, though it was still unnamed. After three or four meetinge, at each of which the membership <text:span text:style-name="T10">i</text:span>n<text:span text:style-name="T10">c</text:span>reas<text:span text:style-name="T10">e</text:span>d, the name <text:s/>“Papyrus,” suggested by Ben. Woolf, was adopted. At first there were <text:span text:style-name="T10">no</text:span> r<text:span text:style-name="T10">u</text:span>les, and for several years the members were faithful to their chops and steaks and beer. At this late day some of them say <text:span text:style-name="T10">chops and steaks, and others say joints, but </text:span>they all agree upon the beer. For a long time they continued to meet at the l<text:span text:style-name="T10">i</text:span>ttle chop-house in <text:span text:style-name="T10">C</text:span>entral <text:span text:style-name="T10">C</text:span>ourt; them they removed to more ambitious quarters, and finally the Revere House was chosen as the tryst<text:span text:style-name="T10">in</text:span>g place, and there the merry men of the Papyrus still meet on <text:span text:style-name="T10">t</text:span>he first <text:span text:style-name="T10">S</text:span>aturday of e<text:span text:style-name="T10">a</text:span>ch month, excepting during July, August and September. </text:p>
      <text:p text:style-name="P5">Those were merry days whea the Papyrus me<text:span text:style-name="T10">ant </text:span>“Billy Park’s” ; whe<text:span text:style-name="T10">n</text:span> no man's dinner <text:span text:style-name="T10">c</text:span>ost more than 75 cents ; whe<text:span text:style-name="T10">n</text:span> eager souls resoived that all the members shou<text:span text:style-name="T10">l</text:span>d adopt the “<text:span text:style-name="T10">c</text:span>lub coat,” after the <text:soft-page-break/>manner of t<text:span text:style-name="T10">h</text:span>e hallowed swallow-<text:span text:style-name="T10">t</text:span>a<text:span text:style-name="T10">i</text:span>l of the first President, and the proposition was crushed by the b<text:span text:style-name="T10">l</text:span>and inquiry, “ Where shall we get the money ?” They were merry days when the combined pocke<text:span text:style-name="T10">t</text:span>s of the Bohemian crew would not yield up <text:span text:style-name="T10">$50</text:span>, although there were great schemes i<text:span text:style-name="T10">n</text:span> the air wherein one saw a majesti<text:span text:style-name="T6">c</text:span> club house floating <text:span text:style-name="T10">i</text:span>n a sea of “bonds ” ; when “<text:span text:style-name="T10">n</text:span>on-<text:span text:style-name="T10">li</text:span>terary” men were first admited in the fond hope that they would pay the bills of the <text:span text:style-name="T10">c</text:span>lub. <text:span text:style-name="T10">The Papyrus, in a broad </text:span>expanse of shirt-front. <text:span text:style-name="T10">w</text:span>ith its dinner served <text:span text:style-name="T10">in</text:span> <text:span text:style-name="T10">c</text:span>ourses, and g<text:span text:style-name="T10">lo</text:span>rified <text:span text:style-name="T10">with “</text:span>extra dry,” the Papyrus grown <text:span text:style-name="T10">u</text:span>p, and with money (more or less) <text:span text:style-name="T10">i</text:span>n its po<text:span text:style-name="T10">c</text:span>k<text:span text:style-name="T10">e</text:span>t, still pre<text:span text:style-name="T10">ser</text:span>v<text:span text:style-name="T10">e</text:span>s <text:span text:style-name="T10">s</text:span>omething of its youthf<text:span text:style-name="T10">ul</text:span>—shall on<text:span text:style-name="T10">e say inn</text:span>ocence? I<text:span text:style-name="T10">t </text:span>is a<text:span text:style-name="T10">s</text:span> fre<text:span text:style-name="T10">e</text:span>-spirited <text:s/><text:span text:style-name="T11">[illegible] and fine </text:span><text:s/>linen will permit, free <text:span text:style-name="T11">as </text:span><text:s/>purple <text:span text:style-name="T11">[illegible]</text:span> indeed than <text:span text:style-name="T11">more sophisticated bodies allow. <text:s/></text:span></text:p>
      <text:p text:style-name="P5"><text:span text:style-name="T11">Thus runs the [illegible] to be/ H. Underwood., []dynasty: N.S. D</text:span>odge, F.<text:span text:style-name="T11">O’</text:span>'Rei<text:span text:style-name="T11">l</text:span>ly, Ale<text:span text:style-name="T11">[…] H</text:span>enry M. Rogers, John B<text:span text:style-name="T11">oyle A.H</text:span>ovey <text:span text:style-name="T11">[…] Young,</text:span> Geo, M. <text:span text:style-name="T11">T</text:span>owie, Wm. <text:span text:style-name="T11">Arthur, Dr F.A. Harrios, Geo. F. Babbitt, Sull[..] H. </text:span>Dodd, Robert <text:span text:style-name="T11">G</text:span>rant, T. <text:span text:style-name="T11">Russelll […] Theodore A</text:span>. <text:span text:style-name="T11">Dodge – these are the presidential jewels of the Papyrus. It was Mr Hovey, a temperance man, </text:span><text:s/>by the way, who prese<text:span text:style-name="T11">n</text:span>ted <text:span text:style-name="T11">the </text:span>club with the “Loving <text:span text:style-name="T11">C</text:span>up,” the psssage of which, from hand to <text:span text:style-name="T11">h</text:span>and a<text:span text:style-name="T11">n</text:span>d <text:span text:style-name="T11">l</text:span>ip to lip, forms one of the sacred rites at the monhly di<text:span text:style-name="T11">n</text:span>ner. It was on Feb. <text:span text:style-name="T11">2, 1877 that this gift was t</text:span>ende<text:span text:style-name="T11">re</text:span>d <text:span text:style-name="T11">and John Boyle O’Reilly greeted it with a poem, which ended th</text:span><text:span text:style-name="T12">u</text:span><text:span text:style-name="T11">s:</text:span></text:p>
      <text:p text:style-name="P6">F<text:span text:style-name="T12">o</text:span>r brotherhood, not wine, this c<text:span text:style-name="T12">u</text:span>p sh<text:span text:style-name="T13">o</text:span>uld pass; </text:p>
      <text:p text:style-name="P7">Its depths should ne’er reflect the eye of malice:</text:p>
      <text:p text:style-name="P6"><text:span text:style-name="T12">Drink toasts to strangers with the so</text:span><text:span text:style-name="T13">cia</text:span><text:span text:style-name="T12">l </text:span><text:span text:style-name="T14">g</text:span><text:span text:style-name="T12">lass, </text:span></text:p>
      <text:p text:style-name="P6"><text:span text:style-name="T13">B</text:span><text:span text:style-name="T12">ut drink to brothers with this loving chalice.</text:span></text:p>
      <text:p text:style-name="P8"><text:span text:style-name="T12">And now, Papyrus, eac</text:span><text:span text:style-name="T13">h</text:span><text:span text:style-name="T12"> </text:span><text:span text:style-name="T13">one pledge to each; </text:span></text:p>
      <text:p text:style-name="P9">And let this formal tie be warmly cherished,</text:p>
      <text:p text:style-name="P8"><text:span text:style-name="T14">No </text:span>words are needed for <text:span text:style-name="T14">a</text:span> kindly speech— </text:p>
      <text:p text:style-name="P8">The loving thought wi<text:span text:style-name="T14">ll live when words have p</text:span>erished ! </text:p>
      <text:p text:style-name="P10"><text:span text:style-name="T13">If</text:span> on<text:span text:style-name="T13">e</text:span> were <text:span text:style-name="T13">to make a faithful </text:span><text:span text:style-name="T14">catalog of </text:span>Bost<text:span text:style-name="T14">o</text:span>n’s di<text:span text:style-name="T14">ning </text:span><text:s/>c<text:span text:style-name="T14">l</text:span>u<text:span text:style-name="T14">b</text:span>s he would find his <text:span text:style-name="T14">richest material in the annals of the Papyrus. He would tell how Aldrich, Howells, Sothers, Dr. Loring and Charles Gaylord were proposed one red-letter night; how </text:span>Jo<text:span text:style-name="T9">h</text:span>n <text:span text:style-name="T14">Lowell</text:span>’s song of “Simple <text:span text:style-name="T14">Si</text:span>m<text:span text:style-name="T14">on</text:span>" <text:span text:style-name="T14">gave</text:span> great delight to that grave essayist, E. P. W<text:span text:style-name="T14">h</text:span>ipple; how Pa<text:span text:style-name="T14">s</text:span>coe was always called upon to sing “Guy Fawkes,” and was always ready to do it; how U<text:span text:style-name="T14">n</text:span>derwood <text:span text:style-name="T14">u</text:span>sed to troll of ‘'Simon the <text:span text:style-name="T14">C</text:span>ellarer” ; how Nat <text:span text:style-name="T14">C</text:span>hllds’ ba<text:span text:style-name="T14">n</text:span>jo <text:span text:style-name="T14">d</text:span>rove away dull care; <text:span text:style-name="T14">h</text:span>ow Rice and Goodwin <text:span text:style-name="T14">the Revere parlors ring with the witching airs that were afterward so popular in “Evangeline”; </text:span><text:s/>how Dr. Harr<text:span text:style-name="T14">i</text:span>s <text:span text:style-name="T14">thrilled </text:span>the assem<text:span text:style-name="T14">bled geniuses with his psychological s</text:span>tories, and Young re<text:span text:style-name="T14">c</text:span>ited in <text:span text:style-name="T14">stirri</text:span>ng rhyme the removal o<text:span text:style-name="T14">f Napoleon’s</text:span> body from <text:span text:style-name="T14">St</text:span>. <text:span text:style-name="T14">H</text:span>e<text:span text:style-name="T14">l</text:span>e<text:span text:style-name="T14">n</text:span>a: how Ned Howard pu<text:span text:style-name="T14">n</text:span>ned and U<text:span text:style-name="T14">n</text:span>derwood won <text:span text:style-name="T14">lasting </text:span>fame by his <text:span text:style-name="T14">un</text:span>rival<text:span text:style-name="T14">l</text:span>ed p<text:span text:style-name="T14">unch. All this and more</text:span> might be told, <text:span text:style-name="T14">but </text:span>the present <text:span text:style-name="T14">chron</text:span>i<text:span text:style-name="T14">c</text:span>le must end by <text:span text:style-name="T14">repeating </text:span>the words of the exPresident, who <text:span text:style-name="T14">h</text:span>as <text:span text:style-name="T14">already </text:span>been quoted : <text:s/>“<text:span text:style-name="T14">The word Papyrus has a literary and classical signification which perfectly fits it </text:span>to the liter<text:span text:style-name="T14">a</text:span>ry character <text:span text:style-name="T14">of t</text:span>he cl<text:span text:style-name="T14">u</text:span>b. But to <text:s/>me Papyrus has come to sign<text:span text:style-name="T14">ify </text:span><text:s/><text:span text:style-name="T14">refresh</text:span>men<text:span text:style-name="T14">t, </text:span><text:s/>rest and e<text:span text:style-name="T14">n</text:span>terta<text:span text:style-name="T14">in</text:span>ment—above all, fel<text:span text:style-name="T14">l</text:span>owship <text:span text:style-name="T14">a</text:span>nd brotberhood. Pieasant as are its <text:span text:style-name="T14">li</text:span>terary fe<text:span text:style-name="T14">a</text:span>tures, its ha<text:span text:style-name="T14">bi</text:span>t of <text:span text:style-name="T14">hos</text:span>p<text:span text:style-name="T14">i</text:span>t<text:span text:style-name="T14">ality</text:span> to prominent strangers, its brill<text:span text:style-name="T14">i</text:span>ant ladies’ <text:span text:style-name="T14">n</text:span>ights, its oc<text:span text:style-name="T14">c</text:span>asionai music <text:soft-page-break/>and fit<text:span text:style-name="T14">f</text:span>ul eloquence, to me its most grateful use is the <text:span text:style-name="T14">f</text:span>reedom, the enlivenment, and I may per<text:span text:style-name="T15">haps even a</text:span>dd, <text:span text:style-name="T15">the affectionateness of </text:span><text:s/>its social sphere. <text:span text:style-name="T15">I</text:span> <text:span text:style-name="T15">suppo</text:span>se most <text:span text:style-name="T15">of</text:span> us <text:span text:style-name="T15">feel </text:span>a kindlier interest <text:span text:style-name="T15">in a</text:span> man when we know he is <text:span text:style-name="T15">a</text:span> Papyrus ma<text:span text:style-name="T15">n</text:span>. I think we ara more ready to heip him when he <text:span text:style-name="T15">i</text:span>s in trouble, to regret <text:span text:style-name="T15">h</text:span>is calamities, to <text:span text:style-name="T15">rejoice </text:span>in bis good fort<text:span text:style-name="T15">un</text:span>e. I think <text:span text:style-name="T15">any Papy</text:span>rus man who bas suf<text:span text:style-name="T15">fe</text:span>red some worldly <text:span text:style-name="T15">grief may</text:span> come here to this board i<text:span text:style-name="T15">n</text:span> the abs<text:span text:style-name="T15">ol</text:span>ute certainty tbat he will be surrounded by such an atmospbere of brot<text:span text:style-name="T15">herly</text:span> sympathy and encouragement <text:span text:style-name="T15">as </text:span><text:s/>will e<text:span text:style-name="T15">nable</text:span> him to <text:span text:style-name="T15">c</text:span>arry away revived spirits and renewed hopes. These gen<text:span text:style-name="T15">i</text:span>al <text:span text:style-name="T6">c</text:span>ustoms, these monthly <text:span text:style-name="T15">greetings, soften </text:span>the hars<text:span text:style-name="T15">h</text:span>ness of life, <text:span text:style-name="T15">encourage the kindliness, </text:span>toleranee and <text:span text:style-name="T15">generosity of </text:span>feeling w<text:span text:style-name="T15">hich</text:span> serve us in g<text:span text:style-name="T15">ood and noble stead </text:span><text:s/>in our da<text:span text:style-name="T15">i</text:span>ly <text:span text:style-name="T15">battles with the outer world.”</text:span></text:p>
      <text:p text:style-name="P10">For thi<text:span text:style-name="T15">s</text:span> the Papyrus lives and eats and <text:span text:style-name="T15">h</text:span>as its being.</text:p>
      <text:p text:style-name="Standard"/>
      <text:p text:style-name="P11"><text:span text:style-name="T10">[</text:span>Pilot, Volume 51, Number 11, 17 March 1888, <text:span text:style-name="T10">p9, col 3] &lt;</text:span>https://newspapers.bc.edu/?a=d&amp;d=pilot18880317-01.2.53.4&gt;</text:p>
      <text:p text:style-name="P11"/>
      <text:p text:style-name="Standard"/>
      <text:p text:style-name="Standard"/>
      <text:p text:style-name="Standard"><text:span text:style-name="T3"/></text:p>
      <text:p text:style-name="Standard"/>
      <text:p text:style-name="P12"><text:line-break/><text:line-break/></text:p>
      <text:h text:style-name="Heading_20_2" text:outline-level="2"><text:span text:style-name="T16">[</text:span><text:span text:style-name="T17">Chapter 16 of </text:span><text:span text:style-name="T16">Wm Dean Howells’ </text:span><text:span text:style-name="T18">A Modern Instance</text:span><text:span text:style-name="T16"> (1881)</text:span><text:span text:style-name="T17">]</text:span></text:h>
      <text:p text:style-name="P13">…</text:p>
      <text:p text:style-name="P13">When Bartley's article came out, she read it with a fond admiration which all her praises seemed to leave unsaid. She bought a scrap-book, and pasted the article into it, and said that she was going to keep everything he wrote. “What are you going to write the next thing?” she asked. </text:p>
      <text:p text:style-name="Text_20_body">“Well, that's what I don't know,” he answered. “I can't find another subject like that, so easily.” </text:p>
      <text:p text:style-name="Text_20_body">“Why, if people care to read about a logging-camp, I should think they would read about almost anything. Nothing could be too common for them. You might even write about the trouble of getting cheap enough rooms in Boston.” </text:p>
      <text:p text:style-name="Text_20_body">“Marcia,” cried Bartley, “you're a treasure! I'll write about that very thing! I know the Chronicle-Abstract will be glad to get it.” </text:p>
      <text:p text:style-name="Text_20_body">She thought he was joking, till he came to her after a while for some figures which he did not remember. He had the true newspaper instinct, and went to work with a motive that was as different as possible from the literary motive. He wrote for the effect which he was to make, and not from any artistic pleasure in the treatment. He did not attempt to give it form,—to imagine a young couple like himself and Marcia coming down from the country to place themselves in the city; he made no effort to throw about it the poetry of their ignorance and their poverty, or the pathetic humor of their dismay at the disproportion of the prices to their means. He set about getting all the facts he could, and he priced <text:soft-page-break/>a great many lodgings in different parts of the city; then he went to a number of real-estate agents, and, giving himself out as a reporter of the Chronicle-Abstract, he interviewed them as to house-rents, past and present. Upon these bottom facts, as he called them, he based a “spicy” sketch, which had also largely the character of an <text:span text:style-name="T19">exposé</text:span>. There is nothing the public enjoys so much as an <text:span text:style-name="T19">exposé</text:span>: it seems to be made in the reader's own interest; it somehow constitutes him a party to the attack upon the abuse, and its effectiveness redounds to the credit of all the newspaper's subscribers. After a week's stay in Boston, Bartley was able to assume the feelings of a native who sees his city falling into decay through the rapacity of its landladies. In the heading of ten or fifteen lines which he gave his sketch, the greater number were devoted to this feature of it; though the space actually allotted to it in the text was comparatively small. He called his report “Boston's Boarding-Houses,” and he spent a paragraph upon the relation of boarding-houses to civilization, before detailing his own experience and observation. This part had many of those strokes of crude picturesqueness and humor which he knew how to give, and was really entertaining; but it was when he came to contrast the rates of house-rent and the cost of provisions with the landladies' “PERPENDICULAR PRICES,” that Bartley showed all the virtue of a born reporter. The sentences were vivid and telling; the <text:span text:style-name="T19">ensemble</text:span> was very alarming; and the conclusion was inevitable, that, unless this abuse could somehow be reached, we should lose a large and valuable portion of our population,—especially those young married people of small means with whom the city's future prosperity so largely rested, and who must drift away to find homes in rival communities if the present exorbitant demands were maintained. </text:p>
      <text:p text:style-name="Text_20_body">As Bartley had foretold, he had not the least trouble in selling this sketch to the Chronicle-Abstract. The editor probably understood its essential cheapness perfectly well; but he also saw how thoroughly readable it was. He did not grumble at the increased price which Bartley put upon his work; it was still very far from dear; and he liked the young Downeaster's enterprise. He gave him as cordial a welcome as an overworked man may venture to offer when Bartley came in with his copy, and he felt like doing him a pleasure. Some things out of the logging-camp sketch had been copied, and people had spoken to the editor about it, which was a still better sign that it was a hit. </text:p>
      <text:p text:style-name="Text_20_body">“Don't you want to come round to our club to-night?” asked the editor, as he handed Bartley the order for his money across the table. “We have a bad dinner, and we try to have a good time. We're all newspaper men together.” </text:p>
      <text:p text:style-name="Text_20_body">“Why, thank you,” said Bartley, “I guess I should like to go.” </text:p>
      <text:p text:style-name="Text_20_body">“Well, come round at half-past five, and go with me.” </text:p>
      <text:p text:style-name="Text_20_body">Bartley walked homeward rather soberly. He had meant, if he sold this article, to make amends for the disappointment they had both suffered before, and to have a commemorative supper with Marcia at Parker's: he had ignored a little hint of hers about his never having taken her there yet, because he was waiting for this chance to do it in style. He resolved that, if she did not seem to like his going to the club, he would go back and withdraw his acceptance. But when he told her he had been invited,—he thought he would put the fact in this tentative way,—she said, “I hope you accepted!” </text:p>
      <text:p text:style-name="Text_20_body">“Would you have liked me to?” he asked with relief. </text:p>
      <text:p text:style-name="Text_20_body"><text:soft-page-break/>“Why, of course! It's a great honor. You'll get acquainted with all those editors, and perhaps some of them will want to give you a regular place.” A salaried employment was their common ideal of a provision for their future. </text:p>
      <text:p text:style-name="Text_20_body">“Well, that's what I was thinking myself,” said Bartley. </text:p>
      <text:p text:style-name="Text_20_body">“Go and accept at once,” she pursued. </text:p>
      <text:p text:style-name="Text_20_body">“Oh, that isn't necessary. If I get round there by half-past five, I can go,” he answered. </text:p>
      <text:p text:style-name="Text_20_body">His lurking regret ceased when he came into the reception-room, where the members of the club were constantly arriving, and putting off their hats and overcoats, and then falling into groups for talk. His friend of the Chronicle-Abstract introduced him lavishly, as our American custom is. Bartley had a little strangeness, but no bashfulness, and, with his essentially slight opinion of people, he was promptly at his ease. These men liked his handsome face, his winning voice, the good-fellowship of his instant readiness to joke; he could see that they liked him, and that his friend Ricker was proud of the impression he made; before the evening was over he kept himself with difficulty from patronizing Ricker a little. </text:p>
      <text:p text:style-name="Text_20_body">The club has grown into something much more splendid and expensive; but it was then content with a dinner certainly as bad as Ricker promised, but fabulously modest in price, at an old-fashioned hotel, whose site was long ago devoured by a dry-goods palace. The drink was commonly water or beer; occasionally, if a great actor or other distinguished guest honored the board, some spendthrift ordered champagne. But no one thought fit to go to this ruinous extreme for Bartley. Ricker offered him his choice of beer or claret, and Bartley temperately preferred water to either; he could see that this raised him in Ricker's esteem. </text:p>
      <text:p text:style-name="Text_20_body">No company of men can fail to have a good time at a public dinner, and the good time began at once with these journalists, whose overworked week ended in this Saturday evening jollity. They were mostly young men, who found sufficient compensation in the excitement and adventure of their underpaid labors, and in the vague hope of advancement; there were grizzled beards among them, for whom neither the novelty nor the expectation continued, but who loved the life for its own sake, and would hardly have exchanged it for prosperity. Here and there was an old fellow, for whom probably all the illusion was gone; but he was proud of his vocation, proud even of the changes that left him somewhat superannuated in his tastes and methods. None, indeed, who have ever known it, can wholly forget the generous rage with which journalism inspires its followers. To each of those young men, beginning the strangely fascinating life as reporters and correspondents, his paper was as dear as his king once was to a French noble; to serve it night and day, to wear himself out for its sake, to merge himself in its glory, and to live in its triumphs without personal recognition from the public, was the loyal devotion which each expected his sovereign newspaper to accept as its simple right. They went and came, with the prompt and passive obedience of soldiers, wherever they were sent, and they struggled each to “get in ahead” of all the others with the individual zeal of heroes. They expanded to the utmost limits of occasion, and they submitted with an anguish that was silent to the editorial excision, compression, and mutilation of reports that were vitally dear to them. What becomes of these ardent young spirits, the inner history of journalism in any great city might pathetically show; but the outside world knows them only in the fine frenzy of interviewing, or of recording the midnight ravages <text:soft-page-break/>of what they call the devouring element, or of working up horrible murders or tragical accidents, or of tracking criminals who have baffled all the detectives. Hearing their talk Bartley began to realize that journalism might be a very different thing from what he had imagined it in a country printing-office, and that it might not be altogether wise to consider it merely as a stepping-stone to the law. </text:p>
      <text:p text:style-name="Text_20_body">With the American eagerness to recognize talent, numbers of good fellows spoke to him about his logging sketch; even those who had not read it seemed to know about it as a hit. They were all delighted to be able to say, “Ricker tells me that you offered it to old Witherby, and he wouldn't look at it!” He found that this fact, which he had doubtfully confided to Ricker, was not offensive to some of the Events people who were there; one of them got him aside, and darkly owned to him that Witherby was doing everything that any one man could to kill the Events, and that in fact the counting-room was running the paper. </text:p>
      <text:p text:style-name="Text_20_body">All the club united in abusing the dinner, which in his rustic ignorance Bartley had not found so infamous; but they ate it with perfect appetite and with mounting good spirits. The president brewed punch in a great bowl before him, and, rising with a glass of it in his hand, opened a free parliament of speaking, story-telling, and singing. Whoever recollected a song or a story that he liked, called upon the owner of it to sing it or tell it; and it appeared not to matter how old the fun or the music was: the company was resolved to be happy; it roared and clapped till the glasses rang. “You will like this song,” Bartley's neighbors to right and left of him prophesied; or, “Just listen to this story of Mason's,—it's capital,”—as one or another rose in response to a general clamor. When they went back to the reception-room they carried the punch-bowl with them, and there, amid a thick cloud of smoke, two clever amateurs took their places at the piano, and sang and played to their heart's content, while the rest, glass in hand, talked and laughed, or listened as they chose. Bartley had not been called upon, but he was burning to try that song in which he had failed so dismally in the logging-camp. When the pianist rose at last, he slipped down into the chair, and, striking the chords of the accompaniment, he gave his piece with brilliant audacity. The room silenced itself and then burst into a roar of applause, and cries of “Encore!” There could be no doubt of the success. “Look here, Ricker,” said a leading man at the end of the repetition, “your friend must be one of us!”—and, rapping on the table, he proposed Bartley's name. In that simple time the club voted <text:span text:style-name="T19">viva voce</text:span> on proposed members, and Bartley found himself elected by acclamation, and in the act of paying over his initiation fee to the treasurer, before he had well realized the honor done him. Everybody near him shook his hand, and offered to be of service to him. Much of this cordiality was merely collective good feeling; something of it might be justly attributed to the punch; but the greater part was honest. In this civilization of ours, grotesque and unequal and imperfect as it is in many things, we are bound together in a brotherly sympathy unknown to any other. We new men have all had our hard rubs, but we do not so much remember them in soreness or resentment as in the wish to help forward any other who is presently feeling them. If he will but help himself too, a hundred hands are stretched out to him. </text:p>
      <text:p text:style-name="Text_20_body">Bartley had kept his head clear of the punch, but he left the club drunk with joy and pride, and so impatient to be with Marcia and tell her of his triumphs that he could hardly wait to read the proof of his boarding-house article which Ricker had put in hand at once for the Sunday edition. He found Marcia sitting up for him, and she listened with a shining face while he hastily ran over the most flattering facts of the evening. She was not so much surprised at the honors done him as he had <text:soft-page-break/>expected but she was happier, and she made him repeat it all and give her the last details. He was afraid she would ask him what his initiation had cost; but she seemed to have no idea that it had cost anything, and though it had swept away a third of the money he had received for his sketch, he still resolved that she should have that supper at Parker's. </text:p>
      <text:p text:style-name="Text_20_body">“I consider my future made,” he said aloud, at the end of his swift cogitation on this point. </text:p>
      <text:p text:style-name="Text_20_body">“Oh, yes!” she responded rapturously. “We needn't have a moment's anxiety. But we must be very saving still till you get a place.” </text:p>
      <text:p text:style-name="Text_20_body">“Oh, certainly,” said Bartley. </text:p>
      <text:h text:style-name="P14" text:outline-level="3"><text:span text:style-name="T19">The New York Times,</text:span> February 25, 1881</text:h>
      <text:p text:style-name="P15">THE PAPYRUS CLUB'S GUESTS.<text:line-break/>THE "LADIES' NIGHT" BANQUET - AN INIMITABLE SPEECH BY MARK TWAIN.</text:p>
      <text:p text:style-name="Text_20_body">BOSTON, Feb. 24. - The Papyrus Club, of this city, composed largely of literary men and journalists, had its annual "ladies' night" dinner at the Revere House tonight. There was a large and brilliant gathering, each member present being accompanied by a lady or ladies, besides the club's guests. The latter included Charles Dudley Warner, Col. George E. Waring, of Newport, and Mrs. Waring, William D. Howell, T. B. Aldrich, E. P. Whipple, and "Mark Twain." Mr. William A. Hovey, the editor of the Transcript, as President of the club, sat at the chief table, with the club's principal guests at either hand. The after dinner features included the reading of a new and dainty poem, sent from London for the occasion, by James Russell Lowell; a finely-drawn speech by E. P. Whipple, largely a eulogy of George Eliot; a speech by Mark Twain, and several short poems by members of the club - one by Robert Grant to the ladies, and another by John Boyle O'Reilly.</text:p>
      <text:p text:style-name="Text_20_body">Mark Twain's speech was in his own inimitable style - a story in a speech. He said: "I am perfectly astounded at the way history repeats itself. I find myself situated at this moment exactly and precisely as I was once before, years ago, to a jot, to a tittle - to a very hair. There isn't a shade of difference. It is the most astonishing coincidence that ever - but wait. I will tell you the former instance, and then you will see it for yourself. Years ago I arrived one day at Salamanca, New York, eastward bound. Must change cars there and take the sleeper train. There were crowds of people there, and they were swarming into the long sleeper train and packing it full, and it was a perfect purgatory of rush and confusion and gritting of teeth and soft, sweet, and low profanity. I asked the young man in the ticket office if I could have a sleeping section and he answered 'No,' with a snarl that shriveled me up like burned leather. I went off, smarting under this insult to my dignity and asked another local official, supplicatingly, if I couldn't have some poor little corner somewhere in a sleeping car, and he cut me short with a venomous 'No, you can't; every corner's full. Now don't bother me any more.'; and he turned his back and walked off. My dignity was in.a state now which cannot be described. I was so ruffled that - well, I said to my companion, 'If these people knew who I am they - ' but my companion cut me short there and said, 'Don't talk such folly. If they did know who you are, do you suppose it would help your high mightiness to a vacancy in a train which has no vacancies it it?' This did not improve my condition any to speak of, but just then I observed that the colored porter of a sleeping car had his eye on me. I saw his dark countenance light up. He whispered to the uniformed conductor, <text:soft-page-break/>punctuating with nods and jerks toward me, and straight way this conductor came forward, oozing politeness from every pore, and said: 'Can I be of any service? Will you have a place in the sleeper?' 'Yes,' I said, 'and much obliged, too. Give me anything; anything will answer.' He said, 'We have nothing left but the big family stateroom, with two berths and a couple of armchairs in it, but it is entirely at your disposal. Here, Tom, take these satchels aboard.'</text:p>
      <text:p text:style-name="Text_20_body">He touched his hat and we and the colored Tom moved along. I was bursting to drop just one little remark to my companion, but I held in and waited. Tom made us comfortable in that sumptuous great apartment, and then said, with many bows and a perfect affluence of smiles, 'Now, is dey anything you want, sah? 'case you kin have jes' anything you wants. It don't make no difference what it is.' I said, 'Can I have some hot water and a tumbler at 9 tonight - blazing hot, you know - about the right temperature for a hot Scotch punch?' 'Yes, sah, dat you kin; you kin 'pen on it. I'll get it myse'f.' 'Good! Now that lamp is hung too high. Can I have a big coach candle fixed up just at the head of my bed, so that I can read comfortably?' 'Yes, sah, you kin. I'll fix her up myse'f, an' I'll fix her so she'll burn all night. Yes, sah; an' you kin jes' call for anything you wants, an' dish yer whole railroad'll be turned wrong end up an' inside out for to git it for you. Dat's so.' And he disappeared. Well, I tilted my head back, hooked my thumbs in my armholes, smiled a smile on my companion, and said gently, 'Well, what do you say now?' My companion was not in a humor to respond - and didn't. The next moment that smiling black face was thrust in at the crack of the door and this speech followed: 'Laws bless you, sah I knowed in a minute. I told de conductah so. Laws I knowed you de minute I sot eyes on you.' 'Is that so, my boy?' [Handing him a quadruple fee]; well, who am I? 'Jennul McClellan,' and he disappeared again. My companion said vinegarishly, 'Well, well! What do you say now?' Right there comes in the marvelous coincidence I mentioned a while ago, viz., I was - speechless, and that is my condition now. Perceive it?"</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7:49:16.196052898</meta:creation-date>
    <dc:date>2026-07-14T19:13:15.664013954</dc:date>
    <meta:editing-duration>PT23H28M28S</meta:editing-duration>
    <meta:editing-cycles>15</meta:editing-cycles>
    <meta:generator>LibreOffice/25.8.7.3$Linux_X86_64 LibreOffice_project/580$Build-3</meta:generator>
    <meta:document-statistic meta:table-count="0" meta:image-count="0" meta:object-count="0" meta:page-count="10" meta:paragraph-count="60" meta:word-count="5888" meta:character-count="33428" meta:non-whitespace-character-count="27550"/>
  </office:meta>
</office:document-meta>
</file>