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616618" officeooo:paragraph-rsid="00106d55"/>
    </style:style>
    <style:style style:name="P2" style:family="paragraph" style:parent-style-name="Standard">
      <style:text-properties officeooo:rsid="001d8d21" officeooo:paragraph-rsid="00106d55"/>
    </style:style>
    <style:style style:name="P3" style:family="paragraph" style:parent-style-name="Standard">
      <style:text-properties officeooo:rsid="005c9464" officeooo:paragraph-rsid="00106d55"/>
    </style:style>
    <style:style style:name="P4" style:family="paragraph" style:parent-style-name="Standard">
      <style:text-properties officeooo:rsid="001f4cce" officeooo:paragraph-rsid="00106d55"/>
    </style:style>
    <style:style style:name="P5" style:family="paragraph" style:parent-style-name="Standard">
      <style:text-properties officeooo:rsid="001c01e0" officeooo:paragraph-rsid="00106d55"/>
    </style:style>
    <style:style style:name="P6" style:family="paragraph" style:parent-style-name="Standard">
      <style:text-properties officeooo:rsid="00212ed6" officeooo:paragraph-rsid="00106d55"/>
    </style:style>
    <style:style style:name="P7" style:family="paragraph" style:parent-style-name="Standard">
      <style:text-properties officeooo:rsid="005cdbbc" officeooo:paragraph-rsid="00106d55"/>
    </style:style>
    <style:style style:name="P8" style:family="paragraph" style:parent-style-name="Standard">
      <style:text-properties officeooo:rsid="005ea76e" officeooo:paragraph-rsid="00106d55"/>
    </style:style>
    <style:style style:name="P9" style:family="paragraph" style:parent-style-name="Standard">
      <style:text-properties officeooo:rsid="00606ba7" officeooo:paragraph-rsid="00106d55"/>
    </style:style>
    <style:style style:name="P10" style:family="paragraph" style:parent-style-name="Standard">
      <style:text-properties officeooo:rsid="0061448d" officeooo:paragraph-rsid="00106d55"/>
    </style:style>
    <style:style style:name="P11" style:family="paragraph" style:parent-style-name="Standard">
      <style:text-properties officeooo:rsid="00223c53" officeooo:paragraph-rsid="00106d55"/>
    </style:style>
    <style:style style:name="P12" style:family="paragraph" style:parent-style-name="Standard">
      <style:text-properties officeooo:paragraph-rsid="00106d55"/>
    </style:style>
    <style:style style:name="P13" style:family="paragraph" style:parent-style-name="Standard" style:list-style-name="L1">
      <style:text-properties officeooo:rsid="001d8d21" officeooo:paragraph-rsid="00106d55"/>
    </style:style>
    <style:style style:name="T1" style:family="text">
      <style:text-properties style:text-position="super 58%"/>
    </style:style>
    <style:style style:name="T2" style:family="text">
      <style:text-properties officeooo:rsid="001f4cce"/>
    </style:style>
    <style:style style:name="T3" style:family="text">
      <style:text-properties officeooo:rsid="0057da40"/>
    </style:style>
    <style:style style:name="T4" style:family="text">
      <style:text-properties officeooo:rsid="00260c98"/>
    </style:style>
    <style:style style:name="T5" style:family="text">
      <style:text-properties officeooo:rsid="0058afd0"/>
    </style:style>
    <style:style style:name="T6" style:family="text">
      <style:text-properties officeooo:rsid="0059e0e8"/>
    </style:style>
    <style:style style:name="T7" style:family="text">
      <style:text-properties officeooo:rsid="006945cb"/>
    </style:style>
    <style:style style:name="T8" style:family="text">
      <style:text-properties fo:font-style="italic" style:font-style-asian="italic" style:font-style-complex="italic"/>
    </style:style>
    <style:style style:name="T9" style:family="text">
      <style:text-properties officeooo:rsid="005b742e"/>
    </style:style>
    <style:style style:name="T10" style:family="text">
      <style:text-properties officeooo:rsid="005c9464"/>
    </style:style>
    <style:style style:name="T11" style:family="text">
      <style:text-properties officeooo:rsid="00606ba7"/>
    </style:style>
    <style:style style:name="T12" style:family="text">
      <style:text-properties officeooo:rsid="006e8e7a"/>
    </style:style>
    <style:style style:name="T13" style:family="text">
      <style:text-properties officeooo:rsid="002263b1"/>
    </style:style>
    <style:style style:name="T14" style:family="text">
      <style:text-properties officeooo:rsid="005cdbbc"/>
    </style:style>
    <style:style style:name="T15" style:family="text">
      <style:text-properties officeooo:rsid="00241df9"/>
    </style:style>
    <style:style style:name="T16" style:family="text">
      <style:text-properties officeooo:rsid="0061448d"/>
    </style:style>
    <style:style style:name="T17" style:family="text">
      <style:text-properties officeooo:rsid="006cb94c"/>
    </style:style>
    <style:style style:name="T18" style:family="text">
      <style:text-properties officeooo:rsid="00223c53"/>
    </style:style>
    <style:style style:name="T19" style:family="text">
      <style:text-properties officeooo:rsid="00107a1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rles Eyre Pascoe</text:p>
      <text:p text:style-name="P2">Literary for 35 years</text:p>
      <text:p text:style-name="P2">Age 64. Born at Yeovil, Somerser</text:p>
      <text:p text:style-name="P2">on 22<text:span text:style-name="T1">nd</text:span> of June 1842</text:p>
      <text:p text:style-name="P2"/>
      <text:p text:style-name="P2">Residence Pen<text:span text:style-name="T2">w</text:span>erris, Ma<text:span text:style-name="T2">r</text:span>chmont Road, W<text:span text:style-name="T2">a</text:span>llington Surrey</text:p>
      <text:p text:style-name="P2">Married: <text:s/>3 children; 2 daughters (1 married in India) 1 son age 33,23 and 20 yrs</text:p>
      <text:p text:style-name="P2">- [illegible]</text:p>
      <text:p text:style-name="P2">Present means: None : <text:s/>Five years ago I had £500 in Bank now expended in supporting my home. I c<text:span text:style-name="T3">alculate</text:span> that supporting m<text:span text:style-name="T3">yself </text:span><text:s/>and 3 others <text:s/><text:span text:style-name="T3">it has cost me £160 a year. I have</text:span> earned less than £20</text:p>
      <text:p text:style-name="P2"/>
      <text:list text:style-name="L1">
        <text:list-item>
          <text:p text:style-name="P13">Titles of published works</text:p>
        </text:list-item>
        <text:list-item>
          <text:p text:style-name="P13">A practical handbook of the principal schools of England <text:span text:style-name="T3">(</text:span>1876<text:span text:style-name="T3">)</text:span> David Bogue</text:p>
        </text:list-item>
        <text:list-item>
          <text:p text:style-name="P13">A Handbook of the Professions <text:span text:style-name="T3">(</text:span>1877<text:span text:style-name="T3">)</text:span> David Bogue</text:p>
        </text:list-item>
        <text:list-item>
          <text:p text:style-name="P13">Everyday life in our Public Schools <text:span text:style-name="T3">(</text:span>1881<text:span text:style-name="T3">)</text:span> Griffith &amp; Jones</text:p>
        </text:list-item>
        <text:list-item>
          <text:p text:style-name="P13">Schools for Girls and Colleges for Women (1879) David Bogue</text:p>
        </text:list-item>
        <text:list-item>
          <text:p text:style-name="P13">The Dramat<text:span text:style-name="T4">i</text:span>c List A record of actors and acressses of the British stage (1879-80) ??? David Bogue</text:p>
        </text:list-item>
        <text:list-item>
          <text:p text:style-name="P13">Dramatic Notes (1879) David Bogue</text:p>
        </text:list-item>
        <text:list-item>
          <text:p text:style-name="P13">Where shall I <text:span text:style-name="T3">E</text:span>ducate my <text:span text:style-name="T3">S</text:span>on ? (1884) </text:p>
        </text:list-item>
        <text:list-item>
          <text:p text:style-name="P13">London of To-Day. <text:span text:style-name="T3">A</text:span>n annual continuing in unbroken sequence to 20 volumes (1884 to 1904) re-written in great part each year. Originally Sampson <text:span text:style-name="T5">Low Marston </text:span><text:s/><text:span text:style-name="T3">&amp; Roberts Bros of Boston USA; </text:span>th<text:span text:style-name="T4">en</text:span> by myself… <text:span text:style-name="T6">[illegible]</text:span></text:p>
        </text:list-item>
        <text:list-item>
          <text:p text:style-name="P13">And many smaller compilations <text:span text:style-name="T6">and … writings.</text:span></text:p>
        </text:list-item>
      </text:list>
      <text:p text:style-name="P2"/>
      <text:p text:style-name="P2"><text:span text:style-name="T6">E</text:span>ach of these books gained recognition and commendation in the leading London and other journals, including (in the last named case) the Quar<text:span text:style-name="T7">t</text:span>erly Review, etc. </text:p>
      <text:p text:style-name="P2"/>
      <text:p text:style-name="P2">Five years afte<text:span text:style-name="T6">r the </text:span>clo<text:span text:style-name="T6">se </text:span>of the American Civil War, Mr. Pascoe went to <text:s/>America, at a time when popular feeling in the Northern <text:span text:style-name="T6">S</text:span>tates was still irritated and <text:s/>unfriendly towards England, and there became appointed Editor of Foreign Intelligence <text:span text:style-name="T6">t</text:span>o the <text:span text:style-name="T8">Boston Daily Globe</text:span>—the only Englishman in that city then admitted to the staff of an American journal.</text:p>
      <text:p text:style-name="P2"/>
      <text:p text:style-name="P2">Later he <text:span text:style-name="T6">cam</text:span>e to England as its “ Special Correspondent,” and was also accredited correspondent of <text:span text:style-name="T8">Appleton's (New York) Journal,</text:span> and the <text:span text:style-name="T8">American Art Journal</text:span>, and was appointed the Reviser in England of all the numerous articles of British Biography and Topography appearing in the “American <text:s/><text:span text:style-name="T6">Cycl</text:span>opa<text:span text:style-name="T6">e</text:span>dia,” published in 16 volumes octavo (New York, D. Appleton &amp; <text:span text:style-name="T6">company). </text:span></text:p>
      <text:p text:style-name="P2"/>
      <text:p text:style-name="P2">He was specially deputed to write a series of papers <text:span text:style-name="T6">for a periodical </text:span>Appleton's (New York)</text:p>
      <text:p text:style-name="P2">Journal, on the Municipal Government of London, and on the E<text:span text:style-name="T6">n</text:span>glish Prisons System;</text:p>
      <text:p text:style-name="P2"><text:span text:style-name="T6">an</text:span>d from 1874 to 1880 was occupied in London in contributing solely to American journals and periodicals on English topics. Among these were articles for the New York Herald on the Marquess of Lorne, when first appointed Governor-General of Canada, and the Lord Chief Justice (Coleridge) when about to visit the United Sta<text:span text:style-name="T6">tes </text:span><text:span text:style-name="T9">specially undertaken.</text:span></text:p>
      <text:p text:style-name="P2"/>
      <text:p text:style-name="P2">As Literary correspondent in London, first of D. Appleton &amp; Co, of New York, and later for eighteen years of Roberts Bros. of Boston, Mass., he was <text:span text:style-name="T9">of service </text:span>to many <text:span text:style-name="T9">Brit</text:span>ish authors in advising and enabling them—in the absence of International Copyright with America—to get a measure of compensation from Ame<text:span text:style-name="T9">eican Publishers </text:span><text:span text:style-name="T10">f</text:span><text:span text:style-name="T9">or their books.</text:span></text:p>
      <text:p text:style-name="P2"><text:soft-page-break/></text:p>
      <text:p text:style-name="P3">[ms note:</text:p>
      <text:p text:style-name="P3">In the first-named capacity, he successed the late Mr Fraser Roe, who knew of Mr Pascoe’s literary efforts and contributions as aforesaid. He was a frequent contributor (&amp; so named in its 50<text:span text:style-name="T1">th</text:span> “Jubilee Number”) to the Leisure Hour <text:span text:style-name="T11">un</text:span>der Mr Macaulay’s editorship; amd wrote special literary articles for Daily News under Sir John Robinsons editorship.</text:p>
      <text:p text:style-name="P3">]</text:p>
      <text:p text:style-name="P2"/>
      <text:p text:style-name="P12"><text:span text:style-name="T12">[See Leisure Hour </text:span>Jan 1902): 177-192.<text:span text:style-name="T12">]</text:span></text:p>
      <text:p text:style-name="P12"/>
      <text:p text:style-name="P12"><text:s/></text:p>
      <text:p text:style-name="P2">Dated this 22 day of september 1906</text:p>
      <text:p text:style-name="P4">Dear Sir</text:p>
      <text:p text:style-name="P4">In forwarding the enclosed application to the Royal Literary Fund’s Committe, it is in the hope, that some one of its members might <text:span text:style-name="T13">perchance find it in his </text:span><text:span text:style-name="T14">power</text:span> to aid me to work. <text:span text:style-name="T13">I</text:span> could consider any of the good work hitherto done by me and i<text:span text:style-name="T14">of my intimate knowledge of the whole [illegible words]</text:span></text:p>
      <text:p text:style-name="P5"/>
      <text:p text:style-name="P6"><text:span text:style-name="T14">[illegible word] </text:span>both <text:span text:style-name="T11">o</text:span>n the commercial and literary <text:span text:style-name="T14">side; </text:span>but the strain of mental an<text:span text:style-name="T4">x</text:span>iety and disappointment, now endured for 18 months, is really threatening permanent breakdown of a once strong, and brave literary worker. The letters sent are con<text:span text:style-name="T15">f</text:span>idential and to be returned please to you<text:span text:style-name="T15">r</text:span>s faithfully Charles E<text:span text:style-name="T15">y</text:span>re Pascoe.</text:p>
      <text:p text:style-name="P7">The Secretary, Royal Literary Fiund·</text:p>
      <text:p text:style-name="P6"/>
      <text:p text:style-name="P6">I wish you would see me., ??? if th<text:span text:style-name="T14">e</text:span> Committee made any grant, I should hope to rep<text:span text:style-name="T4">a</text:span>y it in full if successful by donation. </text:p>
      <text:p text:style-name="P6">Years ago, I … failed to <text:bookmark text:name="recordServiceData"/>get that support in my literary projects I needed. But the whole condition of publishing is changed. Journalism is changed. There is no lon<text:span text:style-name="T4">g</text:span>er any limit to literary working as a calling. The wealt<text:span text:style-name="T14">h</text:span>y are a<text:span text:style-name="T14">t</text:span> i<text:span text:style-name="T14">t. MPs do</text:span> newspaper <text:span text:style-name="T14">work</text:span> f<text:span text:style-name="T4">o</text:span>r <text:s/>pay. Old staid <text:span text:style-name="T14">honourable</text:span> magazines are dead. The old editors are dead. All of which you know. The enclosed <text:span text:style-name="T14">curiously enough </text:span>states my literary history. I should wish to have this section I sent returned. Yours faithfully Charles Eyre Pascoe</text:p>
      <text:p text:style-name="P6"/>
      <text:p text:style-name="P8">Wallington Sept 7 1906</text:p>
      <text:p text:style-name="P8">Llewelyn Roberts esq</text:p>
      <text:p text:style-name="P8"/>
      <text:p text:style-name="P8">Dear Sir:</text:p>
      <text:p text:style-name="P8">I have given a good deal of anxious consideration to my late application to the Royal Literary Fund.</text:p>
      <text:p text:style-name="P8">I surmise that many applicants address you, overwraught by mental anxiety, and I should hope that the last thing any courageous bright-minded literary worker would do is to apply for aid in any case <text:s/>as ?? last desperate resource of all.</text:p>
      <text:p text:style-name="P8">My position is not <text:s/>emended; that I fee<text:span text:style-name="T11">l</text:span> having confidence that once over come my ?? and health are breaking I could get along as I always have done I attribute my circumstances to one <text:s/>whole year writing <text:s/>about the Middle Classes! <text:span text:style-name="T11">[4 words illegible] </text:span></text:p>
      <text:p text:style-name="P8"/>
      <text:p text:style-name="P9">In reference to this Committee’s requirement of two letters maybe the following facts will be deemed to <text:span text:style-name="T16">answer such purpose</text:span>:</text:p>
      <text:p text:style-name="P9">(1) That he is applying for <text:span text:style-name="T16">a </text:span>[2 words illeg] Pension <text:s/>[ <text:s text:c="2"/>] being <text:span text:style-name="T16">already signed among others by </text:span><text:s/>: Hall Caine, <text:span text:style-name="T16">the</text:span> President <text:span text:style-name="T16">of</text:span> [<text:span text:style-name="T17">illegible</text:span>]; Sidney Appleton (D Appleton of New York) Ian Macadam the editor dr ??? of the “Sunday at Home” of the Publisher’s Circular of the private secretary <text:span text:style-name="T17">o</text:span>f Lord Duffin when ? General of Canada, <text:span text:style-name="T16">and ….</text:span></text:p>
      <text:p text:style-name="P9"><text:soft-page-break/></text:p>
      <text:p text:style-name="P10">(2) Mr Pascoe has ? At ? Bank ? For 19 years where he lived for 15 years, and now a destination for ...</text:p>
      <text:p text:style-name="P9"/>
      <text:p text:style-name="P10">(3) But the main facts are these: that he has worked untiringly for 35 years, that he has worked harder than ever…</text:p>
      <text:p text:style-name="P10"/>
      <text:p text:style-name="P1">(4<text:span text:style-name="T19">) </text:span>The letter of CharlesSummer’s ? ? shows what sort of position he once occupied – albeit always on a scanty income never exceeding £350</text:p>
      <text:p text:style-name="P1"/>
      <text:p text:style-name="P1">----</text:p>
      <text:p text:style-name="P1">Rectangles</text:p>
      <text:p text:style-name="P1">Beulah Hill-sideUpper Norwood</text:p>
      <text:p text:style-name="P1">Sept 25 1906</text:p>
      <text:p text:style-name="P1">Dear Sir</text:p>
      <text:p text:style-name="P1">I have known <text:span text:style-name="T17">M</text:span>r Chas Eyre Pascoe for thirty years and therefore have had the fullest opportunity of judgeing amd admiring <text:span text:style-name="T17">hi</text:span>s high character: energy and exceptional ability. His industry has been unceasing and in spite of frequent breaks in his health – he has <text:span text:style-name="T18">during the long time I have known him., fought under peculiarly adverse conditions, with cheerful courage and temporary success. It is difficult to say how </text:span><text:span text:style-name="T15">k</text:span><text:span text:style-name="T18">eenly I feel that the necessi</text:span><text:span text:style-name="T15">ty </text:span><text:span text:style-name="T18">of his application – to the Royal Literary Fund – has arisen. There could I am sure be no worthier recipient, than my friend w</text:span><text:span text:style-name="T15">ho</text:span><text:span text:style-name="T18">se brilliant literary efforts have always been largely counteracted by persistent ill health. Am yours faithfully J.S. Meriot</text:span></text:p>
      <text:p text:style-name="P11">---</text:p>
      <text:p text:style-name="P11"/>
      <text:p text:style-name="P1">Hazell, Watson &amp;Viney Ld. Printers &amp; Binders.</text:p>
      <text:p text:style-name="P1">52 Long Acre, London, W.C.</text:p>
      <text:p text:style-name="P1">Dear Sir</text:p>
      <text:p text:style-name="P1">I (and also my late partner, Mr. J. Elliott Viney) have had many years’ knowledge of Mr. Pascoe’s literary labours, and of himself personally, I have known of his indefatigatable efforts in many directions, especially in relation to “London of Today” in which my Firm was interested for some time.</text:p>
      <text:p text:style-name="P1">I have deeply regretted to hear of Mr. Pascoe’s inability to find work, and of his misfortunes at the close of his career, and consider that his is a case eminently deserving the favourable consideration of the Royal Literary Fund.</text:p>
      <text:p text:style-name="P1">Yours faithfully,</text:p>
      <text:p text:style-name="P1">Walter Hazell</text:p>
      <text:p text:style-name="P1">--</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2T16:02:18.871044410</meta:creation-date>
    <dc:date>2026-05-31T17:28:19.275651688</dc:date>
    <meta:editing-duration>PT5H28M50S</meta:editing-duration>
    <meta:editing-cycles>2</meta:editing-cycles>
    <meta:generator>LibreOffice/24.2.7.2$Linux_X86_64 LibreOffice_project/420$Build-2</meta:generator>
    <meta:document-statistic meta:table-count="0" meta:image-count="0" meta:object-count="0" meta:page-count="3" meta:paragraph-count="63" meta:word-count="1291" meta:character-count="7501" meta:non-whitespace-character-count="6258"/>
  </office:meta>
</office:document-meta>
</file>