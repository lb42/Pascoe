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Verdan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276d16" officeooo:paragraph-rsid="001c5394" style:font-weight-asian="bold" style:font-weight-complex="bold"/>
    </style:style>
    <style:style style:name="P2" style:family="paragraph" style:parent-style-name="Standard">
      <style:text-properties officeooo:rsid="00298351" officeooo:paragraph-rsid="001c5394"/>
    </style:style>
    <style:style style:name="P3" style:family="paragraph" style:parent-style-name="Standard">
      <style:text-properties officeooo:rsid="00298351" officeooo:paragraph-rsid="0075db80"/>
    </style:style>
    <style:style style:name="P4" style:family="paragraph" style:parent-style-name="Standard">
      <style:text-properties officeooo:rsid="00298351" officeooo:paragraph-rsid="00781781"/>
    </style:style>
    <style:style style:name="P5" style:family="paragraph" style:parent-style-name="Standard">
      <style:text-properties officeooo:rsid="00298351" officeooo:paragraph-rsid="00789abb"/>
    </style:style>
    <style:style style:name="P6" style:family="paragraph" style:parent-style-name="Standard">
      <style:text-properties officeooo:rsid="0011b8ce" officeooo:paragraph-rsid="001c5394"/>
    </style:style>
    <style:style style:name="P7" style:family="paragraph" style:parent-style-name="Standard">
      <style:text-properties officeooo:rsid="001850a1" officeooo:paragraph-rsid="001c5394"/>
    </style:style>
    <style:style style:name="P8" style:family="paragraph" style:parent-style-name="Standard">
      <style:text-properties officeooo:rsid="00161ad4" officeooo:paragraph-rsid="001c5394"/>
    </style:style>
    <style:style style:name="P9" style:family="paragraph" style:parent-style-name="Standard">
      <style:paragraph-properties fo:margin-top="0cm" fo:margin-bottom="0cm" style:contextual-spacing="false"/>
      <style:text-properties officeooo:rsid="00161ad4" officeooo:paragraph-rsid="00565029"/>
    </style:style>
    <style:style style:name="P10" style:family="paragraph" style:parent-style-name="Standard">
      <style:text-properties officeooo:rsid="003588cd" officeooo:paragraph-rsid="001c5394"/>
    </style:style>
    <style:style style:name="P11" style:family="paragraph" style:parent-style-name="Standard">
      <style:text-properties officeooo:rsid="003727c9" officeooo:paragraph-rsid="001c5394"/>
    </style:style>
    <style:style style:name="P12" style:family="paragraph" style:parent-style-name="Standard">
      <style:text-properties officeooo:rsid="00305267" officeooo:paragraph-rsid="001c5394"/>
    </style:style>
    <style:style style:name="P13" style:family="paragraph" style:parent-style-name="Standard">
      <style:text-properties officeooo:rsid="00305267" officeooo:paragraph-rsid="0029e2e3"/>
    </style:style>
    <style:style style:name="P14" style:family="paragraph" style:parent-style-name="Standard">
      <style:text-properties officeooo:rsid="00305267" officeooo:paragraph-rsid="004deffc"/>
    </style:style>
    <style:style style:name="P15" style:family="paragraph" style:parent-style-name="Standard">
      <style:text-properties officeooo:rsid="00305267" officeooo:paragraph-rsid="0029d4dc"/>
    </style:style>
    <style:style style:name="P16" style:family="paragraph" style:parent-style-name="Standard">
      <style:text-properties officeooo:rsid="00122fba" officeooo:paragraph-rsid="001c5394"/>
    </style:style>
    <style:style style:name="P17" style:family="paragraph" style:parent-style-name="Standard">
      <style:text-properties officeooo:rsid="00122fba" officeooo:paragraph-rsid="00340b93"/>
    </style:style>
    <style:style style:name="P18" style:family="paragraph" style:parent-style-name="Standard">
      <style:text-properties officeooo:rsid="00122fba" officeooo:paragraph-rsid="0042d7b3"/>
    </style:style>
    <style:style style:name="P19" style:family="paragraph" style:parent-style-name="Standard">
      <style:text-properties officeooo:rsid="001f9d60" officeooo:paragraph-rsid="001c5394"/>
    </style:style>
    <style:style style:name="P20" style:family="paragraph" style:parent-style-name="Standard">
      <style:text-properties officeooo:rsid="00276d16" officeooo:paragraph-rsid="001c5394"/>
    </style:style>
    <style:style style:name="P21" style:family="paragraph" style:parent-style-name="Standard">
      <style:text-properties officeooo:rsid="00276d16" officeooo:paragraph-rsid="004d06df"/>
    </style:style>
    <style:style style:name="P22" style:family="paragraph" style:parent-style-name="Standard">
      <style:text-properties officeooo:rsid="0014a8e6" officeooo:paragraph-rsid="001c5394"/>
    </style:style>
    <style:style style:name="P23" style:family="paragraph" style:parent-style-name="Standard">
      <style:text-properties officeooo:rsid="0014a8e6" officeooo:paragraph-rsid="008d1221"/>
    </style:style>
    <style:style style:name="P24" style:family="paragraph" style:parent-style-name="Standard">
      <style:text-properties officeooo:rsid="0032e53d" officeooo:paragraph-rsid="001c5394"/>
    </style:style>
    <style:style style:name="P25" style:family="paragraph" style:parent-style-name="Standard">
      <style:text-properties officeooo:rsid="0032e53d" officeooo:paragraph-rsid="003183d0"/>
    </style:style>
    <style:style style:name="P26" style:family="paragraph" style:parent-style-name="Standard">
      <style:text-properties officeooo:rsid="0032e53d" officeooo:paragraph-rsid="004deffc"/>
    </style:style>
    <style:style style:name="P27" style:family="paragraph" style:parent-style-name="Standard">
      <style:text-properties officeooo:rsid="0033d2b2" officeooo:paragraph-rsid="001c5394"/>
    </style:style>
    <style:style style:name="P28" style:family="paragraph" style:parent-style-name="Standard">
      <style:text-properties officeooo:paragraph-rsid="001c5394"/>
    </style:style>
    <style:style style:name="P29" style:family="paragraph" style:parent-style-name="Text_20_body">
      <style:paragraph-properties fo:margin-top="0cm" fo:margin-bottom="0cm" style:contextual-spacing="false"/>
      <style:text-properties officeooo:paragraph-rsid="001c5394"/>
    </style:style>
    <style:style style:name="P30" style:family="paragraph" style:parent-style-name="Standard">
      <style:text-properties officeooo:rsid="00223c53" officeooo:paragraph-rsid="00223c53"/>
    </style:style>
    <style:style style:name="P31" style:family="paragraph" style:parent-style-name="Standard">
      <style:text-properties officeooo:rsid="00228eaf" officeooo:paragraph-rsid="00228eaf"/>
    </style:style>
    <style:style style:name="P32" style:family="paragraph" style:parent-style-name="Standard">
      <style:text-properties officeooo:rsid="00241247" officeooo:paragraph-rsid="00241247"/>
    </style:style>
    <style:style style:name="P33" style:family="paragraph" style:parent-style-name="Standard">
      <style:text-properties officeooo:rsid="0029d4dc" officeooo:paragraph-rsid="0029d4dc"/>
    </style:style>
    <style:style style:name="P34" style:family="paragraph" style:parent-style-name="Standard">
      <style:text-properties officeooo:rsid="0029e2e3" officeooo:paragraph-rsid="0029e2e3"/>
    </style:style>
    <style:style style:name="P35" style:family="paragraph" style:parent-style-name="Standard">
      <style:text-properties officeooo:rsid="002bc536" officeooo:paragraph-rsid="002bc536"/>
    </style:style>
    <style:style style:name="P36" style:family="paragraph" style:parent-style-name="Standard">
      <style:text-properties officeooo:rsid="002d37b8" officeooo:paragraph-rsid="002d37b8"/>
    </style:style>
    <style:style style:name="P37" style:family="paragraph" style:parent-style-name="Standard">
      <style:text-properties officeooo:rsid="002d37b8" officeooo:paragraph-rsid="008c0b73"/>
    </style:style>
    <style:style style:name="P38" style:family="paragraph" style:parent-style-name="Standard">
      <style:text-properties officeooo:rsid="002d37b8" officeooo:paragraph-rsid="00385f3a"/>
    </style:style>
    <style:style style:name="P39" style:family="paragraph" style:parent-style-name="Standard">
      <style:text-properties officeooo:rsid="002d37b8" officeooo:paragraph-rsid="001c5394"/>
    </style:style>
    <style:style style:name="P40" style:family="paragraph" style:parent-style-name="Standard">
      <style:text-properties officeooo:paragraph-rsid="00340b93"/>
    </style:style>
    <style:style style:name="P41" style:family="paragraph" style:parent-style-name="Standard">
      <style:text-properties officeooo:rsid="003413a6" officeooo:paragraph-rsid="003413a6"/>
    </style:style>
    <style:style style:name="P42" style:family="paragraph" style:parent-style-name="Standard">
      <style:text-properties officeooo:rsid="00385f3a" officeooo:paragraph-rsid="00385f3a"/>
    </style:style>
    <style:style style:name="P43" style:family="paragraph" style:parent-style-name="Standard">
      <style:text-properties officeooo:paragraph-rsid="0039efa9"/>
    </style:style>
    <style:style style:name="P44" style:family="paragraph" style:parent-style-name="Standard">
      <style:text-properties officeooo:rsid="003c1fb9" officeooo:paragraph-rsid="003c1fb9"/>
    </style:style>
    <style:style style:name="P45" style:family="paragraph" style:parent-style-name="Standard">
      <style:paragraph-properties fo:margin-left="0cm" fo:margin-right="0cm" fo:margin-top="0cm" fo:margin-bottom="0cm" style:contextual-spacing="false" fo:orphans="2" fo:widows="2" fo:text-indent="0cm" style:auto-text-indent="false"/>
      <style:text-properties officeooo:paragraph-rsid="003ed1ff"/>
    </style:style>
    <style:style style:name="P4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242424" loext:opacity="100%" style:font-name="Noto Sans" fo:font-size="10.5pt" fo:letter-spacing="normal" fo:font-style="normal" fo:font-weight="normal" officeooo:paragraph-rsid="003ed1ff" loext:padding="0cm" loext:border="none"/>
    </style:style>
    <style:style style:name="P47" style:family="paragraph" style:parent-style-name="Standard">
      <style:text-properties officeooo:rsid="00411698" officeooo:paragraph-rsid="00411698"/>
    </style:style>
    <style:style style:name="P48" style:family="paragraph" style:parent-style-name="Standard">
      <style:text-properties officeooo:paragraph-rsid="0042d7b3"/>
    </style:style>
    <style:style style:name="P49" style:family="paragraph" style:parent-style-name="Standard">
      <style:text-properties officeooo:rsid="0043e8b6" officeooo:paragraph-rsid="0043e8b6"/>
    </style:style>
    <style:style style:name="P50" style:family="paragraph" style:parent-style-name="Standard">
      <style:text-properties officeooo:paragraph-rsid="004deffc"/>
    </style:style>
    <style:style style:name="P51" style:family="paragraph" style:parent-style-name="Standard">
      <style:paragraph-properties fo:margin-top="0cm" fo:margin-bottom="0cm" style:contextual-spacing="false"/>
      <style:text-properties officeooo:rsid="0052dd49" officeooo:paragraph-rsid="00565029"/>
    </style:style>
    <style:style style:name="P52" style:family="paragraph" style:parent-style-name="Standard">
      <style:paragraph-properties fo:margin-top="0cm" fo:margin-bottom="0cm" style:contextual-spacing="false"/>
      <style:text-properties officeooo:paragraph-rsid="00565029"/>
    </style:style>
    <style:style style:name="P53" style:family="paragraph" style:parent-style-name="Standard">
      <style:text-properties officeooo:rsid="0057b988" officeooo:paragraph-rsid="0057b988"/>
    </style:style>
    <style:style style:name="P54" style:family="paragraph" style:parent-style-name="Text_20_body">
      <style:text-properties officeooo:rsid="002ab266" officeooo:paragraph-rsid="003ed1ff"/>
    </style:style>
    <style:style style:name="P55" style:family="paragraph" style:parent-style-name="Text_20_body">
      <style:paragraph-properties fo:margin-left="0cm" fo:margin-right="0cm" fo:text-indent="0cm" style:auto-text-indent="false"/>
    </style:style>
    <style:style style:name="P56" style:family="paragraph" style:parent-style-name="Standard">
      <style:text-properties officeooo:rsid="0074a11f" officeooo:paragraph-rsid="0074a11f"/>
    </style:style>
    <style:style style:name="P57" style:family="paragraph" style:parent-style-name="Standard">
      <style:text-properties officeooo:rsid="00781781" officeooo:paragraph-rsid="00781781"/>
    </style:style>
    <style:style style:name="P58" style:family="paragraph" style:parent-style-name="Standard">
      <style:text-properties officeooo:rsid="00789abb" officeooo:paragraph-rsid="00789abb"/>
    </style:style>
    <style:style style:name="P59" style:family="paragraph" style:parent-style-name="Standard">
      <style:text-properties officeooo:rsid="007d3ad6" officeooo:paragraph-rsid="007d3ad6"/>
    </style:style>
    <style:style style:name="P60" style:family="paragraph" style:parent-style-name="Standard">
      <style:text-properties officeooo:rsid="007e8f95" officeooo:paragraph-rsid="007e8f95"/>
    </style:style>
    <style:style style:name="P61" style:family="paragraph" style:parent-style-name="Standard">
      <style:text-properties officeooo:rsid="008750e6" officeooo:paragraph-rsid="008750e6"/>
    </style:style>
    <style:style style:name="P62" style:family="paragraph" style:parent-style-name="Standard">
      <style:text-properties officeooo:rsid="00892730" officeooo:paragraph-rsid="00892730"/>
    </style:style>
    <style:style style:name="P63" style:family="paragraph" style:parent-style-name="Standard">
      <style:text-properties officeooo:rsid="008a5736" officeooo:paragraph-rsid="008a5736"/>
    </style:style>
    <style:style style:name="P64" style:family="paragraph" style:parent-style-name="Standard">
      <style:text-properties officeooo:rsid="008b7996" officeooo:paragraph-rsid="008b7996"/>
    </style:style>
    <style:style style:name="P65" style:family="paragraph" style:parent-style-name="Standard">
      <style:text-properties officeooo:rsid="000ecc9f" officeooo:paragraph-rsid="001c5394"/>
    </style:style>
    <style:style style:name="P66" style:family="paragraph" style:parent-style-name="Standard">
      <style:text-properties officeooo:rsid="000ecc9f" officeooo:paragraph-rsid="008ba4ce"/>
    </style:style>
    <style:style style:name="P67" style:family="paragraph" style:parent-style-name="Standard">
      <style:text-properties officeooo:rsid="008ba4ce" officeooo:paragraph-rsid="008ba4ce"/>
    </style:style>
    <style:style style:name="P68" style:family="paragraph" style:parent-style-name="Standard">
      <style:paragraph-properties fo:margin-top="0cm" fo:margin-bottom="0cm" style:contextual-spacing="false"/>
      <style:text-properties officeooo:rsid="0067d167" officeooo:paragraph-rsid="001c5394"/>
    </style:style>
    <style:style style:name="P69" style:family="paragraph" style:parent-style-name="Standard">
      <style:paragraph-properties fo:margin-top="0cm" fo:margin-bottom="0cm" style:contextual-spacing="false"/>
      <style:text-properties officeooo:rsid="0067d167" officeooo:paragraph-rsid="008c0b73"/>
    </style:style>
    <style:style style:name="P70" style:family="paragraph" style:parent-style-name="Standard">
      <style:text-properties officeooo:rsid="002f65dd" officeooo:paragraph-rsid="008d1221"/>
    </style:style>
    <style:style style:name="P71" style:family="paragraph" style:parent-style-name="Standard">
      <style:text-properties officeooo:rsid="002f65dd" officeooo:paragraph-rsid="001c5394"/>
    </style:style>
    <style:style style:name="P72" style:family="paragraph" style:parent-style-name="Standard">
      <style:text-properties officeooo:paragraph-rsid="008ed3a3"/>
    </style:style>
    <style:style style:name="P73" style:family="paragraph" style:parent-style-name="Text_20_body">
      <style:paragraph-properties fo:margin-left="0cm" fo:margin-right="0cm" fo:margin-top="0cm" fo:margin-bottom="0.176cm" style:contextual-spacing="false" fo:text-indent="0cm" style:auto-text-indent="false"/>
      <style:text-properties officeooo:paragraph-rsid="008ed3a3"/>
    </style:style>
    <style:style style:name="P74" style:family="paragraph" style:parent-style-name="Text_20_body">
      <style:text-properties officeooo:paragraph-rsid="008ed3a3"/>
    </style:style>
    <style:style style:name="P75" style:family="paragraph" style:parent-style-name="Standard">
      <style:text-properties officeooo:rsid="0091a9a5" officeooo:paragraph-rsid="0091a9a5"/>
    </style:style>
    <style:style style:name="P76" style:family="paragraph" style:parent-style-name="Standard">
      <style:text-properties officeooo:rsid="00967589" officeooo:paragraph-rsid="00967589"/>
    </style:style>
    <style:style style:name="P77" style:family="paragraph" style:parent-style-name="Standard">
      <style:text-properties officeooo:rsid="00967589" officeooo:paragraph-rsid="00975372"/>
    </style:style>
    <style:style style:name="P78" style:family="paragraph" style:parent-style-name="Standard">
      <style:text-properties officeooo:rsid="0032cc3b" officeooo:paragraph-rsid="0032cc3b"/>
    </style:style>
    <style:style style:name="P79" style:family="paragraph" style:parent-style-name="Standard">
      <style:text-properties officeooo:rsid="0032cc3b" officeooo:paragraph-rsid="00975372"/>
    </style:style>
    <style:style style:name="P80" style:family="paragraph" style:parent-style-name="Standard">
      <style:text-properties officeooo:paragraph-rsid="00975372"/>
    </style:style>
    <style:style style:name="P81" style:family="paragraph" style:parent-style-name="Standard">
      <style:text-properties officeooo:rsid="00975372" officeooo:paragraph-rsid="00975372"/>
    </style:style>
    <style:style style:name="P82" style:family="paragraph" style:parent-style-name="Standard">
      <style:text-properties officeooo:paragraph-rsid="0099e55e"/>
    </style:style>
    <style:style style:name="P83" style:family="paragraph" style:parent-style-name="Standard">
      <style:text-properties officeooo:rsid="009bb395" officeooo:paragraph-rsid="009bb395"/>
    </style:style>
    <style:style style:name="P84" style:family="paragraph" style:parent-style-name="Standard">
      <style:text-properties officeooo:rsid="00a017f3" officeooo:paragraph-rsid="00a017f3"/>
    </style:style>
    <style:style style:name="P85" style:family="paragraph" style:parent-style-name="Standard">
      <style:text-properties officeooo:rsid="00a494d4" officeooo:paragraph-rsid="00a494d4"/>
    </style:style>
    <style:style style:name="P86" style:family="paragraph" style:parent-style-name="Standard">
      <style:text-properties officeooo:rsid="00a5cd1e" officeooo:paragraph-rsid="00a5cd1e"/>
    </style:style>
    <style:style style:name="P87" style:family="paragraph" style:parent-style-name="Standard">
      <style:paragraph-properties fo:margin-left="0cm" fo:margin-right="0cm" fo:text-indent="0cm" style:auto-text-indent="false"/>
      <style:text-properties officeooo:paragraph-rsid="00a7584c"/>
    </style:style>
    <style:style style:name="P88" style:family="paragraph" style:parent-style-name="Standard">
      <style:paragraph-properties fo:margin-left="0cm" fo:margin-right="0cm" fo:text-indent="0cm" style:auto-text-indent="false"/>
      <style:text-properties officeooo:rsid="00a7584c" officeooo:paragraph-rsid="00a7584c"/>
    </style:style>
    <style:style style:name="P89" style:family="paragraph" style:parent-style-name="Standard">
      <style:text-properties officeooo:rsid="00ace6a6" officeooo:paragraph-rsid="00ace6a6"/>
    </style:style>
    <style:style style:name="P90" style:family="paragraph" style:parent-style-name="Text_20_body">
      <style:text-properties fo:font-size="11pt" fo:font-weight="normal" officeooo:rsid="00826466" officeooo:paragraph-rsid="008eb4c0" style:font-weight-asian="normal" style:font-weight-complex="normal"/>
    </style:style>
    <style:style style:name="P91" style:family="paragraph" style:parent-style-name="Text_20_body">
      <style:text-properties officeooo:paragraph-rsid="00516ece"/>
    </style:style>
    <style:style style:name="P92" style:family="paragraph" style:parent-style-name="Text_20_body">
      <style:paragraph-properties fo:margin-left="0.794cm" fo:margin-right="0cm" fo:line-height="200%" fo:text-indent="-0.794cm" style:auto-text-indent="false"/>
      <style:text-properties officeooo:paragraph-rsid="008c0b73"/>
    </style:style>
    <style:style style:name="P93" style:family="paragraph" style:parent-style-name="Text_20_body">
      <style:text-properties officeooo:paragraph-rsid="008c0b73"/>
    </style:style>
    <style:style style:name="P94" style:family="paragraph" style:parent-style-name="Text_20_body">
      <style:paragraph-properties fo:margin-left="0cm" fo:margin-right="0cm" fo:margin-top="0cm" fo:margin-bottom="0.176cm" style:contextual-spacing="false" fo:text-indent="0cm" style:auto-text-indent="false"/>
      <style:text-properties officeooo:paragraph-rsid="008eb4c0"/>
    </style:style>
    <style:style style:name="P95" style:family="paragraph" style:parent-style-name="Text_20_body">
      <style:paragraph-properties fo:margin-top="0cm" fo:margin-bottom="0cm" style:contextual-spacing="false"/>
      <style:text-properties officeooo:rsid="00616618" officeooo:paragraph-rsid="001c5394"/>
    </style:style>
    <style:style style:name="P96" style:family="paragraph" style:parent-style-name="Text_20_body">
      <style:paragraph-properties fo:margin-left="3.519cm" fo:margin-right="0cm" fo:margin-top="59.399cm" fo:margin-bottom="0.247cm" style:contextual-spacing="false" style:line-height-at-least="5.318cm" fo:text-indent="0cm" style:auto-text-indent="false" style:writing-mode="lr-tb"/>
      <style:text-properties fo:font-size="73.5pt" fo:language="en" fo:country="US"/>
    </style:style>
    <style:style style:name="P97" style:family="paragraph" style:parent-style-name="Text_20_body">
      <style:paragraph-properties fo:margin-left="3.413cm" fo:margin-right="0cm" fo:margin-top="3.863cm" fo:margin-bottom="0.247cm" style:contextual-spacing="false" style:line-height-at-least="3.995cm" fo:text-indent="0cm" style:auto-text-indent="false" style:writing-mode="lr-tb"/>
      <style:text-properties fo:font-size="49.5pt" fo:language="en" fo:country="US"/>
    </style:style>
    <style:style style:name="P98" style:family="paragraph" style:parent-style-name="Text_20_body">
      <style:paragraph-properties fo:margin-left="10.372cm" fo:margin-right="0cm" fo:margin-top="0cm" fo:margin-bottom="0.247cm" style:contextual-spacing="false" style:line-height-at-least="1.852cm" fo:text-indent="0cm" style:auto-text-indent="false" style:writing-mode="lr-tb"/>
      <style:text-properties fo:font-size="55.5pt" fo:language="en" fo:country="US"/>
    </style:style>
    <style:style style:name="P99" style:family="paragraph" style:parent-style-name="Text_20_body">
      <style:paragraph-properties fo:margin-left="21.14cm" fo:margin-right="0cm" fo:margin-top="3.201cm" fo:margin-bottom="0.247cm" style:contextual-spacing="false" style:line-height-at-least="1.085cm" fo:text-indent="0cm" style:auto-text-indent="false" style:writing-mode="lr-tb"/>
      <style:text-properties fo:font-size="33pt" fo:language="en" fo:country="US"/>
    </style:style>
    <style:style style:name="P100" style:family="paragraph" style:parent-style-name="Text_20_body">
      <style:paragraph-properties fo:margin-left="20.585cm" fo:margin-right="0cm" fo:margin-top="0.609cm" fo:margin-bottom="0.247cm" style:contextual-spacing="false" style:line-height-at-least="1.244cm" fo:text-indent="0cm" style:auto-text-indent="false" style:writing-mode="lr-tb"/>
      <style:text-properties fo:font-size="33pt" fo:language="en" fo:country="US"/>
    </style:style>
    <style:style style:name="P101" style:family="paragraph" style:parent-style-name="Text_20_body">
      <style:paragraph-properties fo:margin-left="20.69cm" fo:margin-right="0cm" fo:margin-top="1.482cm" fo:margin-bottom="0.247cm" style:contextual-spacing="false" style:line-height-at-least="1.085cm" fo:text-indent="0cm" style:auto-text-indent="false" style:writing-mode="lr-tb"/>
      <style:text-properties fo:font-size="32.25pt" fo:language="en" fo:country="US"/>
    </style:style>
    <style:style style:name="P102" style:family="paragraph" style:parent-style-name="Text_20_body">
      <style:paragraph-properties fo:margin-left="20.532cm" fo:margin-right="0cm" fo:margin-top="1.376cm" fo:margin-bottom="0.247cm" style:contextual-spacing="false" style:line-height-at-least="1.191cm" fo:text-indent="0cm" style:auto-text-indent="false" style:writing-mode="lr-tb"/>
      <style:text-properties fo:font-size="32.25pt" fo:language="en" fo:country="US"/>
    </style:style>
    <style:style style:name="P103" style:family="paragraph" style:parent-style-name="Text_20_body">
      <style:paragraph-properties fo:margin-left="9.446cm" fo:margin-right="0cm" fo:margin-top="1.27cm" fo:margin-bottom="0.247cm" style:contextual-spacing="false" style:line-height-at-least="1.349cm" fo:text-indent="0cm" style:auto-text-indent="false" style:writing-mode="lr-tb"/>
      <style:text-properties fo:font-size="32.25pt" fo:language="en" fo:country="US"/>
    </style:style>
    <style:style style:name="P104" style:family="paragraph" style:parent-style-name="Text_20_body">
      <style:paragraph-properties fo:margin-left="13.547cm" fo:margin-right="0cm" fo:margin-top="2.99cm" fo:margin-bottom="0.247cm" style:contextual-spacing="false" style:line-height-at-least="1.058cm" fo:text-indent="0cm" style:auto-text-indent="false" style:writing-mode="lr-tb"/>
    </style:style>
    <style:style style:name="P105" style:family="paragraph" style:parent-style-name="Text_20_body">
      <style:paragraph-properties fo:margin-left="21.537cm" fo:margin-right="0cm" fo:margin-top="0.556cm" fo:margin-bottom="0.247cm" style:contextual-spacing="false" style:line-height-at-least="1.058cm" fo:text-indent="0cm" style:auto-text-indent="false" style:writing-mode="lr-tb"/>
      <style:text-properties fo:font-size="31.5pt" fo:language="en" fo:country="US"/>
    </style:style>
    <style:style style:name="P106" style:family="paragraph" style:parent-style-name="Text_20_body">
      <style:paragraph-properties fo:margin-left="20.426cm" fo:margin-right="0cm" fo:margin-top="1.402cm" fo:margin-bottom="0.247cm" style:contextual-spacing="false" style:line-height-at-least="1.032cm" fo:text-indent="0cm" style:auto-text-indent="false" style:writing-mode="lr-tb"/>
      <style:text-properties fo:font-size="31.5pt" fo:language="en" fo:country="US"/>
    </style:style>
    <style:style style:name="P107" style:family="paragraph" style:parent-style-name="Text_20_body">
      <style:paragraph-properties fo:margin-left="50.403cm" fo:margin-right="0cm" fo:margin-top="6.906cm" fo:margin-bottom="0.247cm" style:contextual-spacing="false" style:line-height-at-least="1.27cm" fo:text-indent="0cm" style:auto-text-indent="false" style:writing-mode="lr-tb"/>
      <style:text-properties fo:font-size="31.5pt" fo:language="en" fo:country="US"/>
    </style:style>
    <style:style style:name="P108" style:family="paragraph" style:parent-style-name="Text_20_body">
      <style:paragraph-properties fo:margin-left="9.525cm" fo:margin-right="0cm" fo:margin-top="1.826cm" fo:margin-bottom="0.247cm" style:contextual-spacing="false" style:line-height-at-least="1.27cm" fo:text-indent="0cm" style:auto-text-indent="false" style:writing-mode="lr-tb"/>
    </style:style>
    <style:style style:name="P109" style:family="paragraph" style:parent-style-name="Text_20_body">
      <style:paragraph-properties fo:margin-left="9.472cm" fo:margin-right="0cm" fo:margin-top="0.053cm" fo:margin-bottom="0.247cm" style:contextual-spacing="false" style:line-height-at-least="1.244cm" fo:text-indent="0cm" style:auto-text-indent="false" style:writing-mode="lr-tb"/>
      <style:text-properties fo:font-size="36pt" fo:language="en" fo:country="US"/>
    </style:style>
    <style:style style:name="P110" style:family="paragraph" style:parent-style-name="Text_20_body">
      <style:paragraph-properties fo:margin-left="89.032cm" fo:margin-right="0cm" fo:margin-top="0cm" fo:margin-bottom="0.247cm" style:contextual-spacing="false" style:line-height-at-least="1.164cm" fo:text-indent="0cm" style:auto-text-indent="false" style:writing-mode="lr-tb"/>
      <style:text-properties fo:font-size="36pt" fo:letter-spacing="0.026cm" fo:language="en" fo:country="US" loext:padding="0cm" loext:border="none"/>
    </style:style>
    <style:style style:name="P111" style:family="paragraph" style:parent-style-name="Text_20_body">
      <style:paragraph-properties fo:margin-left="28.363cm" fo:margin-right="0cm" fo:margin-top="0cm" fo:margin-bottom="0.247cm" style:contextual-spacing="false" style:line-height-at-least="1.217cm" fo:text-indent="0cm" style:auto-text-indent="false" style:writing-mode="lr-tb"/>
      <style:text-properties fo:font-size="30.75pt" fo:language="en" fo:country="US"/>
    </style:style>
    <style:style style:name="P112" style:family="paragraph" style:parent-style-name="Text_20_body">
      <style:paragraph-properties fo:margin-left="9.525cm" fo:margin-right="0cm" fo:margin-top="0.106cm" fo:margin-bottom="0.247cm" style:contextual-spacing="false" style:line-height-at-least="1.349cm" fo:text-indent="0cm" style:auto-text-indent="false" style:writing-mode="lr-tb"/>
      <style:text-properties fo:font-size="36.75pt" fo:language="en" fo:country="US"/>
    </style:style>
    <style:style style:name="P113" style:family="paragraph" style:parent-style-name="Text_20_body">
      <style:paragraph-properties fo:margin-left="50.668cm" fo:margin-right="0cm" fo:margin-top="0cm" fo:margin-bottom="0.247cm" style:contextual-spacing="false" style:line-height-at-least="1.349cm" fo:text-indent="0cm" style:auto-text-indent="false" style:writing-mode="lr-tb"/>
      <style:text-properties fo:font-size="36.75pt" fo:language="en" fo:country="US"/>
    </style:style>
    <style:style style:name="P114" style:family="paragraph" style:parent-style-name="Text_20_body">
      <style:paragraph-properties fo:margin-left="52.758cm" fo:margin-right="0cm" fo:margin-top="0cm" fo:margin-bottom="0.247cm" style:contextual-spacing="false" style:line-height-at-least="1.349cm" fo:text-indent="0cm" style:auto-text-indent="false" style:writing-mode="lr-tb"/>
      <style:text-properties fo:font-size="36.75pt" fo:language="en" fo:country="US"/>
    </style:style>
    <style:style style:name="P115" style:family="paragraph" style:parent-style-name="Text_20_body">
      <style:paragraph-properties fo:margin-left="9.472cm" fo:margin-right="0cm" fo:margin-top="0cm" fo:margin-bottom="0.247cm" style:contextual-spacing="false" style:line-height-at-least="1.244cm" fo:text-indent="0cm" style:auto-text-indent="false" style:writing-mode="lr-tb"/>
      <style:text-properties fo:font-size="36.75pt" fo:language="en" fo:country="US"/>
    </style:style>
    <style:style style:name="P116" style:family="paragraph" style:parent-style-name="Text_20_body">
      <style:paragraph-properties fo:margin-left="9.419cm" fo:margin-right="0cm" fo:margin-top="0.053cm" fo:margin-bottom="0.247cm" style:contextual-spacing="false" style:line-height-at-least="1.244cm" fo:text-indent="0cm" style:auto-text-indent="false" style:writing-mode="lr-tb"/>
      <style:text-properties fo:font-size="36.75pt" fo:language="en" fo:country="US"/>
    </style:style>
    <style:style style:name="P117" style:family="paragraph" style:parent-style-name="Text_20_body">
      <style:paragraph-properties fo:margin-left="51.118cm" fo:margin-right="0cm" fo:margin-top="0.053cm" fo:margin-bottom="0.247cm" style:contextual-spacing="false" style:line-height-at-least="1.244cm" fo:text-indent="0cm" style:auto-text-indent="false" style:writing-mode="lr-tb"/>
      <style:text-properties fo:font-size="36.75pt" fo:language="en" fo:country="US"/>
    </style:style>
    <style:style style:name="P118" style:family="paragraph" style:parent-style-name="Text_20_body">
      <style:paragraph-properties fo:margin-left="50.747cm" fo:margin-right="0cm" fo:margin-top="0cm" fo:margin-bottom="0.247cm" style:contextual-spacing="false" style:line-height-at-least="1.244cm" fo:text-indent="0cm" style:auto-text-indent="false" style:writing-mode="lr-tb"/>
      <style:text-properties fo:font-size="36.75pt" fo:language="en" fo:country="US"/>
    </style:style>
    <style:style style:name="P119" style:family="paragraph" style:parent-style-name="Text_20_body">
      <style:paragraph-properties fo:margin-left="9.419cm" fo:margin-right="0cm" fo:margin-top="0.079cm" fo:margin-bottom="0.247cm" style:contextual-spacing="false" style:line-height-at-least="1.217cm" fo:text-indent="0cm" style:auto-text-indent="false" style:writing-mode="lr-tb"/>
      <style:text-properties fo:font-size="36.75pt" fo:language="en" fo:country="US"/>
    </style:style>
    <style:style style:name="P120" style:family="paragraph" style:parent-style-name="Text_20_body">
      <style:paragraph-properties fo:margin-left="9.313cm" fo:margin-right="0cm" fo:margin-top="0cm" fo:margin-bottom="0.247cm" style:contextual-spacing="false" style:line-height-at-least="1.217cm" fo:text-indent="0cm" style:auto-text-indent="false" style:writing-mode="lr-tb"/>
      <style:text-properties fo:font-size="36.75pt" fo:language="en" fo:country="US"/>
    </style:style>
    <style:style style:name="P121" style:family="paragraph" style:parent-style-name="Text_20_body">
      <style:paragraph-properties fo:margin-left="9.446cm" fo:margin-right="0cm" fo:margin-top="0.079cm" fo:margin-bottom="0.247cm" style:contextual-spacing="false" style:line-height-at-least="1.296cm" fo:text-indent="0cm" style:auto-text-indent="false" style:writing-mode="lr-tb"/>
      <style:text-properties fo:font-size="36.75pt" fo:language="en" fo:country="US"/>
    </style:style>
    <style:style style:name="P122" style:family="paragraph" style:parent-style-name="Text_20_body">
      <style:paragraph-properties fo:margin-left="9.499cm" fo:margin-right="0cm" fo:margin-top="0.053cm" fo:margin-bottom="0.247cm" style:contextual-spacing="false" style:line-height-at-least="1.244cm" fo:text-indent="0cm" style:auto-text-indent="false" style:writing-mode="lr-tb"/>
      <style:text-properties fo:font-size="29.25pt" fo:language="en" fo:country="US"/>
    </style:style>
    <style:style style:name="P123" style:family="paragraph" style:parent-style-name="Text_20_body">
      <style:paragraph-properties fo:margin-left="49.821cm" fo:margin-right="0cm" fo:margin-top="0.079cm" fo:margin-bottom="0.247cm" style:contextual-spacing="false" style:line-height-at-least="1.244cm" fo:text-indent="0cm" style:auto-text-indent="false" style:writing-mode="lr-tb"/>
      <style:text-properties fo:font-size="29.25pt" fo:language="en" fo:country="US"/>
    </style:style>
    <style:style style:name="P124" style:family="paragraph" style:parent-style-name="Text_20_body">
      <style:paragraph-properties fo:margin-left="32.914cm" fo:margin-right="0cm" fo:margin-top="8.043cm" fo:margin-bottom="0.247cm" style:contextual-spacing="false" style:line-height-at-least="1.27cm" fo:text-indent="0cm" style:auto-text-indent="false" style:writing-mode="lr-tb"/>
      <style:text-properties fo:font-size="29.25pt" fo:language="en" fo:country="US"/>
    </style:style>
    <style:style style:name="P125" style:family="paragraph" style:parent-style-name="Text_20_body">
      <style:paragraph-properties fo:margin-left="49.821cm" fo:margin-right="0cm" fo:margin-top="0.026cm" fo:margin-bottom="0.247cm" style:contextual-spacing="false" style:line-height-at-least="1.296cm" fo:text-indent="0cm" style:auto-text-indent="false" style:writing-mode="lr-tb"/>
      <style:text-properties fo:font-size="29.25pt" fo:language="en" fo:country="US"/>
    </style:style>
    <style:style style:name="P126" style:family="paragraph" style:parent-style-name="Text_20_body">
      <style:paragraph-properties fo:margin-left="9.499cm" fo:margin-right="0cm" fo:margin-top="0.106cm" fo:margin-bottom="0.247cm" style:contextual-spacing="false" style:line-height-at-least="1.27cm" fo:text-indent="0cm" style:auto-text-indent="false" style:writing-mode="lr-tb"/>
      <style:text-properties fo:font-size="30pt" fo:language="en" fo:country="US"/>
    </style:style>
    <style:style style:name="P127" style:family="paragraph" style:parent-style-name="Text_20_body">
      <style:paragraph-properties fo:margin-left="9.419cm" fo:margin-right="0cm" fo:margin-top="0cm" fo:margin-bottom="0.247cm" style:contextual-spacing="false" style:line-height-at-least="1.323cm" fo:text-indent="0cm" style:auto-text-indent="false" style:writing-mode="lr-tb"/>
      <style:text-properties fo:font-size="30pt" fo:language="en" fo:country="US"/>
    </style:style>
    <style:style style:name="P128" style:family="paragraph" style:parent-style-name="Text_20_body">
      <style:paragraph-properties fo:margin-left="49.821cm" fo:margin-right="0cm" fo:margin-top="0cm" fo:margin-bottom="0.247cm" style:contextual-spacing="false" style:line-height-at-least="1.27cm" fo:text-indent="0cm" style:auto-text-indent="false" style:writing-mode="lr-tb"/>
      <style:text-properties fo:font-size="37.5pt" fo:language="en" fo:country="US"/>
    </style:style>
    <style:style style:name="P129" style:family="paragraph" style:parent-style-name="Text_20_body">
      <style:paragraph-properties fo:margin-left="51.144cm" fo:margin-right="0cm" fo:margin-top="0cm" fo:margin-bottom="0.247cm" style:contextual-spacing="false" style:line-height-at-least="1.27cm" fo:text-indent="0cm" style:auto-text-indent="false" style:writing-mode="lr-tb"/>
      <style:text-properties fo:font-size="37.5pt" fo:language="en" fo:country="US"/>
    </style:style>
    <style:style style:name="P130" style:family="paragraph" style:parent-style-name="Text_20_body">
      <style:paragraph-properties fo:margin-left="51.197cm" fo:margin-right="0cm" fo:margin-top="2.646cm" fo:margin-bottom="0.247cm" style:contextual-spacing="false" style:line-height-at-least="1.296cm" fo:text-indent="0cm" style:auto-text-indent="false" style:writing-mode="lr-tb"/>
      <style:text-properties fo:font-size="37.5pt" fo:language="en" fo:country="US"/>
    </style:style>
    <style:style style:name="P131" style:family="paragraph" style:parent-style-name="Text_20_body">
      <style:paragraph-properties fo:margin-left="9.446cm" fo:margin-right="0cm" fo:margin-top="0.079cm" fo:margin-bottom="0.247cm" style:contextual-spacing="false" style:line-height-at-least="1.296cm" fo:text-indent="0cm" style:auto-text-indent="false" style:writing-mode="lr-tb"/>
      <style:text-properties fo:font-size="37.5pt" fo:language="en" fo:country="US"/>
    </style:style>
    <style:style style:name="P132" style:family="paragraph" style:parent-style-name="Text_20_body">
      <style:paragraph-properties fo:margin-left="49.821cm" fo:margin-right="0cm" fo:margin-top="0cm" fo:margin-bottom="0.247cm" style:contextual-spacing="false" style:line-height-at-least="1.296cm" fo:text-indent="0cm" style:auto-text-indent="false" style:writing-mode="lr-tb"/>
      <style:text-properties fo:font-size="37.5pt" fo:language="en" fo:country="US"/>
    </style:style>
    <style:style style:name="P133" style:family="paragraph" style:parent-style-name="Text_20_body">
      <style:paragraph-properties fo:margin-left="50.324cm" fo:margin-right="0cm" fo:margin-top="0cm" fo:margin-bottom="0.247cm" style:contextual-spacing="false" style:line-height-at-least="1.561cm" fo:text-indent="0cm" style:auto-text-indent="false" style:writing-mode="lr-tb"/>
      <style:text-properties fo:font-size="37.5pt" fo:language="en" fo:country="US"/>
    </style:style>
    <style:style style:name="P134" style:family="paragraph" style:parent-style-name="Text_20_body">
      <style:paragraph-properties fo:margin-left="50.694cm" fo:margin-right="0cm" fo:margin-top="0.026cm" fo:margin-bottom="0.247cm" style:contextual-spacing="false" style:line-height-at-least="1.323cm" fo:text-indent="0cm" style:auto-text-indent="false" style:writing-mode="lr-tb"/>
      <style:text-properties fo:font-size="37.5pt" fo:language="en" fo:country="US"/>
    </style:style>
    <style:style style:name="P135" style:family="paragraph" style:parent-style-name="Text_20_body">
      <style:paragraph-properties fo:margin-left="9.313cm" fo:margin-right="0cm" fo:margin-top="0.106cm" fo:margin-bottom="0.247cm" style:contextual-spacing="false" style:line-height-at-least="1.323cm" fo:text-indent="0cm" style:auto-text-indent="false" style:writing-mode="lr-tb"/>
      <style:text-properties fo:font-size="37.5pt" fo:language="en" fo:country="US"/>
    </style:style>
    <style:style style:name="P136" style:family="paragraph" style:parent-style-name="Text_20_body">
      <style:paragraph-properties fo:margin-left="50.694cm" fo:margin-right="0cm" fo:margin-top="0cm" fo:margin-bottom="0.247cm" style:contextual-spacing="false" style:line-height-at-least="1.244cm" fo:text-indent="0cm" style:auto-text-indent="false" style:writing-mode="lr-tb"/>
      <style:text-properties fo:font-size="37.5pt" fo:language="en" fo:country="US"/>
    </style:style>
    <style:style style:name="P137" style:family="paragraph" style:parent-style-name="Text_20_body">
      <style:paragraph-properties fo:margin-left="50.879cm" fo:margin-right="0cm" fo:margin-top="1.296cm" fo:margin-bottom="0.247cm" style:contextual-spacing="false" style:line-height-at-least="1.349cm" fo:text-indent="0cm" style:auto-text-indent="false" style:writing-mode="lr-tb"/>
      <style:text-properties fo:font-size="37.5pt" fo:language="en" fo:country="US"/>
    </style:style>
    <style:style style:name="P138" style:family="paragraph" style:parent-style-name="Text_20_body">
      <style:paragraph-properties fo:margin-left="35.851cm" fo:margin-right="0cm" fo:margin-top="2.672cm" fo:margin-bottom="0.247cm" style:contextual-spacing="false" style:line-height-at-least="1.191cm" fo:text-indent="0cm" style:auto-text-indent="false" style:writing-mode="lr-tb"/>
      <style:text-properties fo:font-size="28.5pt" fo:language="en" fo:country="US"/>
    </style:style>
    <style:style style:name="P139" style:family="paragraph" style:parent-style-name="Text_20_body">
      <style:paragraph-properties fo:margin-left="43.603cm" fo:margin-right="0cm" fo:margin-top="0cm" fo:margin-bottom="0.247cm" style:contextual-spacing="false" style:line-height-at-least="1.958cm" fo:text-indent="0cm" style:auto-text-indent="false" style:writing-mode="lr-tb"/>
      <style:text-properties fo:font-size="57.75pt" fo:language="en" fo:country="US"/>
    </style:style>
    <style:style style:name="P140" style:family="paragraph" style:parent-style-name="Text_20_body">
      <style:paragraph-properties fo:margin-left="50.244cm" fo:margin-right="0cm" fo:margin-top="7.858cm" fo:margin-bottom="0.247cm" style:contextual-spacing="false" style:line-height-at-least="1.482cm" fo:text-indent="0cm" style:auto-text-indent="false" style:writing-mode="lr-tb"/>
      <style:text-properties fo:font-size="38.25pt" fo:language="en" fo:country="US"/>
    </style:style>
    <style:style style:name="P141" style:family="paragraph" style:parent-style-name="Text_20_body">
      <style:paragraph-properties fo:margin-left="50.218cm" fo:margin-right="0cm" fo:margin-top="0.079cm" fo:margin-bottom="0.247cm" style:contextual-spacing="false" style:line-height-at-least="1.27cm" fo:text-indent="0cm" style:auto-text-indent="false" style:writing-mode="lr-tb"/>
      <style:text-properties fo:font-size="38.25pt" fo:language="en" fo:country="US"/>
    </style:style>
    <style:style style:name="P142" style:family="paragraph" style:parent-style-name="Text_20_body">
      <style:paragraph-properties fo:margin-left="9.419cm" fo:margin-right="0cm" fo:margin-top="0cm" fo:margin-bottom="0.247cm" style:contextual-spacing="false" style:line-height-at-least="1.296cm" fo:text-indent="0cm" style:auto-text-indent="false" style:writing-mode="lr-tb"/>
      <style:text-properties fo:font-size="38.25pt" fo:language="en" fo:country="US"/>
    </style:style>
    <style:style style:name="P143" style:family="paragraph" style:parent-style-name="Text_20_body">
      <style:paragraph-properties fo:margin-left="9.34cm" fo:margin-right="0cm" fo:margin-top="0cm" fo:margin-bottom="0.247cm" style:contextual-spacing="false" style:line-height-at-least="1.296cm" fo:text-indent="0cm" style:auto-text-indent="false" style:writing-mode="lr-tb"/>
      <style:text-properties fo:font-size="38.25pt" fo:language="en" fo:country="US"/>
    </style:style>
    <style:style style:name="P144" style:family="paragraph" style:parent-style-name="Text_20_body">
      <style:paragraph-properties fo:margin-left="49.9cm" fo:margin-right="0cm" fo:margin-top="0cm" fo:margin-bottom="0.247cm" style:contextual-spacing="false" style:line-height-at-least="1.244cm" fo:text-indent="0cm" style:auto-text-indent="false" style:writing-mode="lr-tb"/>
      <style:text-properties fo:font-size="38.25pt" fo:language="en" fo:country="US"/>
    </style:style>
    <style:style style:name="P145" style:family="paragraph" style:parent-style-name="Text_20_body">
      <style:paragraph-properties fo:margin-left="50.244cm" fo:margin-right="0cm" fo:margin-top="0.053cm" fo:margin-bottom="0.247cm" style:contextual-spacing="false" style:line-height-at-least="1.296cm" fo:text-indent="0cm" style:auto-text-indent="false" style:writing-mode="lr-tb"/>
      <style:text-properties fo:font-size="39pt" fo:language="en" fo:country="US"/>
    </style:style>
    <style:style style:name="P146" style:family="paragraph" style:parent-style-name="Text_20_body">
      <style:paragraph-properties fo:margin-left="9.34cm" fo:margin-right="0cm" fo:margin-top="0.053cm" fo:margin-bottom="0.247cm" style:contextual-spacing="false" style:line-height-at-least="1.296cm" fo:text-indent="0cm" style:auto-text-indent="false" style:writing-mode="lr-tb"/>
      <style:text-properties fo:font-size="34.5pt" fo:language="en" fo:country="US"/>
    </style:style>
    <style:style style:name="P147" style:family="paragraph" style:parent-style-name="Text_20_body">
      <style:paragraph-properties fo:margin-left="36.46cm" fo:margin-right="0cm" fo:margin-top="0.079cm" fo:margin-bottom="0.247cm" style:contextual-spacing="false" style:line-height-at-least="0.344cm" fo:text-indent="0cm" style:auto-text-indent="false" style:writing-mode="lr-tb"/>
      <style:text-properties fo:font-size="12.75pt" fo:letter-spacing="0.132cm" fo:language="en" fo:country="US" loext:padding="0cm" loext:border="none"/>
    </style:style>
    <style:style style:name="P148" style:family="paragraph" style:parent-style-name="Standard">
      <style:text-properties fo:font-style="normal" officeooo:rsid="0055f8b8" officeooo:paragraph-rsid="0042d7b3" style:font-style-asian="normal" style:font-style-complex="normal"/>
    </style:style>
    <style:style style:name="P149" style:family="paragraph" style:parent-style-name="Standard">
      <style:text-properties officeooo:rsid="0075db80" officeooo:paragraph-rsid="0075db80"/>
    </style:style>
    <style:style style:name="P150" style:family="paragraph" style:parent-style-name="Standard">
      <style:text-properties officeooo:rsid="00a9629f" officeooo:paragraph-rsid="00a494d4"/>
    </style:style>
    <style:style style:name="P151" style:family="paragraph" style:parent-style-name="Standard">
      <style:text-properties officeooo:rsid="00ba477e" officeooo:paragraph-rsid="00ba477e"/>
    </style:style>
    <style:style style:name="P152" style:family="paragraph" style:parent-style-name="Standard">
      <style:text-properties officeooo:paragraph-rsid="00bc4d27"/>
    </style:style>
    <style:style style:name="P153" style:family="paragraph" style:parent-style-name="Standard">
      <style:text-properties officeooo:paragraph-rsid="00bf0753"/>
    </style:style>
    <style:style style:name="P154" style:family="paragraph" style:parent-style-name="Standard">
      <style:text-properties style:text-line-through-style="solid" style:text-line-through-type="single" officeooo:paragraph-rsid="00ace6a6"/>
    </style:style>
    <style:style style:name="P155" style:family="paragraph" style:parent-style-name="Standard">
      <loext:graphic-properties draw:fill="solid" draw:fill-color="#ffffff"/>
      <style:paragraph-properties fo:background-color="#ffffff"/>
      <style:text-properties officeooo:paragraph-rsid="004deffc"/>
    </style:style>
    <style:style style:name="P156" style:family="paragraph" style:parent-style-name="Standard">
      <loext:graphic-properties draw:fill="solid" draw:fill-color="#ffffff"/>
      <style:paragraph-properties fo:background-color="#ffffff"/>
    </style:style>
    <style:style style:name="P157" style:family="paragraph" style:parent-style-name="Heading_20_3">
      <style:text-properties fo:font-weight="bold" officeooo:paragraph-rsid="001c5394"/>
    </style:style>
    <style:style style:name="T1" style:family="text">
      <style:text-properties officeooo:rsid="003482e5"/>
    </style:style>
    <style:style style:name="T2" style:family="text">
      <style:text-properties officeooo:rsid="002f7a65"/>
    </style:style>
    <style:style style:name="T3" style:family="text">
      <style:text-properties officeooo:rsid="00294066"/>
    </style:style>
    <style:style style:name="T4" style:family="text">
      <style:text-properties officeooo:rsid="000ecc9f"/>
    </style:style>
    <style:style style:name="T5" style:family="text">
      <style:text-properties officeooo:rsid="001f868a"/>
    </style:style>
    <style:style style:name="T6" style:family="text">
      <style:text-properties officeooo:rsid="000f9c4c"/>
    </style:style>
    <style:style style:name="T7" style:family="text">
      <style:text-properties officeooo:rsid="00258da5"/>
    </style:style>
    <style:style style:name="T8" style:family="text">
      <style:text-properties officeooo:rsid="003588cd"/>
    </style:style>
    <style:style style:name="T9" style:family="text">
      <style:text-properties officeooo:rsid="00166264"/>
    </style:style>
    <style:style style:name="T10" style:family="text">
      <style:text-properties officeooo:rsid="00213c02"/>
    </style:style>
    <style:style style:name="T11" style:family="text">
      <style:text-properties style:text-position="super 58%"/>
    </style:style>
    <style:style style:name="T12" style:family="text">
      <style:text-properties officeooo:rsid="0026eff6"/>
    </style:style>
    <style:style style:name="T13" style:family="text">
      <style:text-properties officeooo:rsid="0013bcd7"/>
    </style:style>
    <style:style style:name="T14" style:family="text">
      <style:text-properties officeooo:rsid="00305267"/>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officeooo:rsid="001a22ca"/>
    </style:style>
    <style:style style:name="T18" style:family="text">
      <style:text-properties officeooo:rsid="0022f333"/>
    </style:style>
    <style:style style:name="T19" style:family="text">
      <style:text-properties officeooo:rsid="00298351"/>
    </style:style>
    <style:style style:name="T20" style:family="text">
      <style:text-properties officeooo:rsid="00312289"/>
    </style:style>
    <style:style style:name="T21" style:family="text">
      <style:text-properties officeooo:rsid="00326c19"/>
    </style:style>
    <style:style style:name="T22" style:family="text">
      <style:text-properties officeooo:rsid="001850a1"/>
    </style:style>
    <style:style style:name="T23" style:family="text">
      <style:text-properties officeooo:rsid="00161991"/>
    </style:style>
    <style:style style:name="T24" style:family="text">
      <style:text-properties officeooo:rsid="0033d2b2"/>
    </style:style>
    <style:style style:name="T25" style:family="text">
      <style:text-properties officeooo:rsid="002ae197"/>
    </style:style>
    <style:style style:name="T26" style:family="text">
      <style:text-properties officeooo:rsid="003028eb"/>
    </style:style>
    <style:style style:name="T27" style:family="text">
      <style:text-properties officeooo:rsid="00228eaf"/>
    </style:style>
    <style:style style:name="T28" style:family="text">
      <style:text-properties officeooo:rsid="0029e2e3"/>
    </style:style>
    <style:style style:name="T29" style:family="text">
      <style:text-properties officeooo:rsid="002d37b8"/>
    </style:style>
    <style:style style:name="T30" style:family="text">
      <style:text-properties officeooo:rsid="002e24b6"/>
    </style:style>
    <style:style style:name="T31" style:family="text">
      <style:text-properties officeooo:rsid="002f65dd"/>
    </style:style>
    <style:style style:name="T32" style:family="text">
      <style:text-properties officeooo:rsid="0030eeff"/>
    </style:style>
    <style:style style:name="T33" style:family="text">
      <style:text-properties officeooo:rsid="003183d0"/>
    </style:style>
    <style:style style:name="T34" style:family="text">
      <style:text-properties fo:color="#000000" loext:opacity="100%" fo:background-color="#ffffff" loext:char-shading-value="0"/>
    </style:style>
    <style:style style:name="T35" style:family="text">
      <style:text-properties fo:color="#000000" loext:opacity="100%" officeooo:rsid="0032cc3b" fo:background-color="#ffffff" loext:char-shading-value="0"/>
    </style:style>
    <style:style style:name="T36" style:family="text">
      <style:text-properties fo:color="#000000" loext:opacity="100%" officeooo:rsid="008d1221" fo:background-color="#ffffff" loext:char-shading-value="0"/>
    </style:style>
    <style:style style:name="T37" style:family="text">
      <style:text-properties fo:color="#000096" loext:opacity="100%" fo:background-color="#ffffff" loext:char-shading-value="0"/>
    </style:style>
    <style:style style:name="T38" style:family="text">
      <style:text-properties fo:color="#969600" loext:opacity="100%" fo:background-color="#ffffff" loext:char-shading-value="0"/>
    </style:style>
    <style:style style:name="T39" style:family="text">
      <style:text-properties fo:background-color="#ffffff" loext:char-shading-value="0"/>
    </style:style>
    <style:style style:name="T40" style:family="text">
      <style:text-properties officeooo:rsid="0032cc3b"/>
    </style:style>
    <style:style style:name="T41" style:family="text">
      <style:text-properties officeooo:rsid="00340b93"/>
    </style:style>
    <style:style style:name="T42" style:family="text">
      <style:text-properties officeooo:rsid="003578cd"/>
    </style:style>
    <style:style style:name="T43" style:family="text">
      <style:text-properties officeooo:rsid="00373c39"/>
    </style:style>
    <style:style style:name="T44" style:family="text">
      <style:text-properties officeooo:rsid="00388582"/>
    </style:style>
    <style:style style:name="T45" style:family="text">
      <style:text-properties officeooo:rsid="0032e53d"/>
    </style:style>
    <style:style style:name="T46" style:family="text">
      <style:text-properties officeooo:rsid="0039efa9"/>
    </style:style>
    <style:style style:name="T47" style:family="text">
      <style:text-properties officeooo:rsid="003b9c57"/>
    </style:style>
    <style:style style:name="T48" style:family="text">
      <style:text-properties officeooo:rsid="003c1fb9"/>
    </style:style>
    <style:style style:name="T49" style:family="text">
      <style:text-properties officeooo:rsid="003cea38"/>
    </style:style>
    <style:style style:name="T50" style:family="text">
      <style:text-properties fo:font-variant="normal" fo:text-transform="none" fo:color="#006fca" loext:opacity="100%" style:font-name="Noto Sans" fo:font-size="10.5pt" fo:letter-spacing="normal" fo:font-style="normal" style:text-underline-style="solid" style:text-underline-width="auto" style:text-underline-color="font-color" fo:font-weight="normal" loext:padding="0cm" loext:border="none"/>
    </style:style>
    <style:style style:name="T51" style:family="text">
      <style:text-properties fo:font-variant="normal" fo:text-transform="none" fo:color="#242424" loext:opacity="100%" style:font-name="Noto Sans" fo:font-size="10.5pt" fo:letter-spacing="normal" fo:font-style="normal" fo:font-weight="normal" loext:padding="0cm" loext:border="none"/>
    </style:style>
    <style:style style:name="T52" style:family="text">
      <style:text-properties officeooo:rsid="0040106c"/>
    </style:style>
    <style:style style:name="T53" style:family="text">
      <style:text-properties officeooo:rsid="00411698"/>
    </style:style>
    <style:style style:name="T54" style:family="text">
      <style:text-properties officeooo:rsid="0042d7b3"/>
    </style:style>
    <style:style style:name="T55" style:family="text">
      <style:text-properties officeooo:rsid="0042f7ad"/>
    </style:style>
    <style:style style:name="T56" style:family="text">
      <style:text-properties officeooo:rsid="0043e8b6"/>
    </style:style>
    <style:style style:name="T57" style:family="text">
      <style:text-properties officeooo:rsid="00459f02"/>
    </style:style>
    <style:style style:name="T58" style:family="text">
      <style:text-properties officeooo:rsid="0049b7ff"/>
    </style:style>
    <style:style style:name="T59" style:family="text">
      <style:text-properties fo:font-weight="normal" style:font-weight-asian="normal" style:font-weight-complex="normal"/>
    </style:style>
    <style:style style:name="T60" style:family="text">
      <style:text-properties style:text-underline-style="none" fo:font-weight="normal" style:font-weight-asian="normal" style:font-weight-complex="normal"/>
    </style:style>
    <style:style style:name="T61" style:family="text">
      <style:text-properties style:text-underline-style="none" fo:font-weight="normal" officeooo:rsid="008ed3a3" style:font-weight-asian="normal" style:font-weight-complex="normal"/>
    </style:style>
    <style:style style:name="T62" style:family="text">
      <style:text-properties officeooo:rsid="004d06df"/>
    </style:style>
    <style:style style:name="T63" style:family="text">
      <style:text-properties officeooo:rsid="00516ece"/>
    </style:style>
    <style:style style:name="T64" style:family="text">
      <style:text-properties officeooo:rsid="0052dd49"/>
    </style:style>
    <style:style style:name="T65" style:family="text">
      <style:text-properties officeooo:rsid="0054942e"/>
    </style:style>
    <style:style style:name="T66" style:family="text">
      <style:text-properties officeooo:rsid="0055f8b8"/>
    </style:style>
    <style:style style:name="T67" style:family="text">
      <style:text-properties fo:font-style="normal" style:font-style-asian="normal" style:font-style-complex="normal"/>
    </style:style>
    <style:style style:name="T68" style:family="text">
      <style:text-properties fo:font-style="normal" officeooo:rsid="0055f8b8" style:font-style-asian="normal" style:font-style-complex="normal"/>
    </style:style>
    <style:style style:name="T69" style:family="text">
      <style:text-properties fo:font-style="normal" officeooo:rsid="00843d89" style:font-style-asian="normal" style:font-style-complex="normal"/>
    </style:style>
    <style:style style:name="T70" style:family="text">
      <style:text-properties fo:font-style="normal" officeooo:rsid="00975372" style:font-style-asian="normal" style:font-style-complex="normal"/>
    </style:style>
    <style:style style:name="T71" style:family="text">
      <style:text-properties fo:font-size="11pt" fo:font-style="italic" fo:font-weight="normal" style:font-weight-asian="normal" style:font-weight-complex="normal"/>
    </style:style>
    <style:style style:name="T72" style:family="text">
      <style:text-properties fo:font-size="11pt" fo:font-style="italic" fo:font-weight="normal" officeooo:rsid="008eb4c0" style:font-style-asian="italic" style:font-weight-asian="normal" style:font-style-complex="italic" style:font-weight-complex="normal"/>
    </style:style>
    <style:style style:name="T73" style:family="text">
      <style:text-properties fo:font-size="11pt" officeooo:rsid="00729367"/>
    </style:style>
    <style:style style:name="T74" style:family="text">
      <style:text-properties fo:font-size="11pt" fo:font-weight="normal" style:font-weight-asian="normal" style:font-weight-complex="normal"/>
    </style:style>
    <style:style style:name="T75" style:family="text">
      <style:text-properties fo:font-size="11pt" fo:font-weight="normal" officeooo:rsid="007011c2" style:font-weight-asian="normal" style:font-weight-complex="normal"/>
    </style:style>
    <style:style style:name="T76" style:family="text">
      <style:text-properties fo:font-size="11pt" fo:font-weight="normal" officeooo:rsid="00729367" style:font-weight-asian="normal" style:font-weight-complex="normal"/>
    </style:style>
    <style:style style:name="T77" style:family="text">
      <style:text-properties fo:font-size="11pt" fo:font-weight="normal" officeooo:rsid="00808417" style:font-weight-asian="normal" style:font-weight-complex="normal"/>
    </style:style>
    <style:style style:name="T78" style:family="text">
      <style:text-properties fo:font-size="11pt" fo:font-weight="normal" officeooo:rsid="008eb4c0" style:font-weight-asian="normal" style:font-weight-complex="normal"/>
    </style:style>
    <style:style style:name="T79" style:family="text">
      <style:text-properties fo:font-size="11pt" fo:font-weight="normal" officeooo:rsid="007407d3" style:font-weight-asian="normal" style:font-weight-complex="normal"/>
    </style:style>
    <style:style style:name="T80" style:family="text">
      <style:text-properties fo:font-size="11pt" fo:font-weight="normal" officeooo:rsid="00516ece" style:font-weight-asian="normal" style:font-weight-complex="normal"/>
    </style:style>
    <style:style style:name="T81" style:family="text">
      <style:text-properties fo:font-size="11pt" fo:font-weight="normal" officeooo:rsid="008ed3a3" style:font-weight-asian="normal" style:font-weight-complex="normal"/>
    </style:style>
    <style:style style:name="T82" style:family="text">
      <style:text-properties fo:font-size="11pt" fo:font-weight="normal" officeooo:rsid="00a915b2" style:font-weight-asian="normal" style:font-weight-complex="normal"/>
    </style:style>
    <style:style style:name="T83" style:family="text">
      <style:text-properties officeooo:rsid="0074a11f"/>
    </style:style>
    <style:style style:name="T84" style:family="text">
      <style:text-properties officeooo:rsid="0075db80"/>
    </style:style>
    <style:style style:name="T85" style:family="text">
      <style:text-properties officeooo:rsid="0075fcc8"/>
    </style:style>
    <style:style style:name="T86" style:family="text">
      <style:text-properties officeooo:rsid="00781781"/>
    </style:style>
    <style:style style:name="T87" style:family="text">
      <style:text-properties officeooo:rsid="00789abb"/>
    </style:style>
    <style:style style:name="T88" style:family="text">
      <style:text-properties officeooo:rsid="007b3c03"/>
    </style:style>
    <style:style style:name="T89" style:family="text">
      <style:text-properties officeooo:rsid="007f5cb7"/>
    </style:style>
    <style:style style:name="T90" style:family="text">
      <style:text-properties officeooo:rsid="00807e00"/>
    </style:style>
    <style:style style:name="T91" style:family="text">
      <style:text-properties officeooo:rsid="00843d89"/>
    </style:style>
    <style:style style:name="T92" style:family="text">
      <style:text-properties officeooo:rsid="00861376"/>
    </style:style>
    <style:style style:name="T93" style:family="text">
      <style:text-properties officeooo:rsid="008750e6"/>
    </style:style>
    <style:style style:name="T94" style:family="text">
      <style:text-properties officeooo:rsid="008a5736"/>
    </style:style>
    <style:style style:name="T95" style:family="text">
      <style:text-properties officeooo:rsid="008c0b73"/>
    </style:style>
    <style:style style:name="T96" style:family="text">
      <style:text-properties officeooo:rsid="008ed3a3"/>
    </style:style>
    <style:style style:name="T97" style:family="text">
      <style:text-properties officeooo:rsid="008ef0aa"/>
    </style:style>
    <style:style style:name="T98" style:family="text">
      <style:text-properties officeooo:rsid="0091a9a5"/>
    </style:style>
    <style:style style:name="T99" style:family="text">
      <style:text-properties officeooo:rsid="00931ac6"/>
    </style:style>
    <style:style style:name="T100" style:family="text">
      <style:text-properties officeooo:rsid="00967589"/>
    </style:style>
    <style:style style:name="T101" style:family="text">
      <style:text-properties officeooo:rsid="00975372"/>
    </style:style>
    <style:style style:name="T102" style:family="text">
      <style:text-properties officeooo:rsid="0099e55e"/>
    </style:style>
    <style:style style:name="T103" style:family="text">
      <style:text-properties officeooo:rsid="009d2628"/>
    </style:style>
    <style:style style:name="T104" style:family="text">
      <style:text-properties officeooo:rsid="00a494d4"/>
    </style:style>
    <style:style style:name="T105" style:family="text">
      <style:text-properties style:font-name="Calibri" fo:font-size="12pt" fo:font-weight="normal"/>
    </style:style>
    <style:style style:name="T106" style:family="text">
      <style:text-properties fo:letter-spacing="-1.535cm"/>
    </style:style>
    <style:style style:name="T107" style:family="text">
      <style:text-properties fo:letter-spacing="-1.535cm" loext:padding="0cm" loext:border="none"/>
    </style:style>
    <style:style style:name="T108" style:family="text">
      <style:text-properties loext:padding="0cm" loext:border="none"/>
    </style:style>
    <style:style style:name="T109" style:family="text">
      <style:text-properties fo:letter-spacing="-0.714cm"/>
    </style:style>
    <style:style style:name="T110" style:family="text">
      <style:text-properties fo:letter-spacing="-1.376cm"/>
    </style:style>
    <style:style style:name="T111" style:family="text">
      <style:text-properties fo:letter-spacing="-2.725cm"/>
    </style:style>
    <style:style style:name="T112" style:family="text">
      <style:text-properties fo:letter-spacing="-1.588cm" loext:padding="0cm" loext:border="none"/>
    </style:style>
    <style:style style:name="T113" style:family="text">
      <style:text-properties fo:letter-spacing="-0.291cm"/>
    </style:style>
    <style:style style:name="T114" style:family="text">
      <style:text-properties fo:letter-spacing="-0.291cm" loext:padding="0cm" loext:border="none"/>
    </style:style>
    <style:style style:name="T115" style:family="text">
      <style:text-properties fo:letter-spacing="-1.773cm"/>
    </style:style>
    <style:style style:name="T116" style:family="text">
      <style:text-properties fo:letter-spacing="-0.582cm"/>
    </style:style>
    <style:style style:name="T117" style:family="text">
      <style:text-properties fo:letter-spacing="-2.064cm"/>
    </style:style>
    <style:style style:name="T118" style:family="text">
      <style:text-properties fo:letter-spacing="-0.37cm"/>
    </style:style>
    <style:style style:name="T119" style:family="text">
      <style:text-properties fo:letter-spacing="-0.37cm" loext:padding="0cm" loext:border="none"/>
    </style:style>
    <style:style style:name="T120" style:family="text">
      <style:text-properties fo:letter-spacing="0.503cm"/>
    </style:style>
    <style:style style:name="T121" style:family="text">
      <style:text-properties fo:letter-spacing="0.661cm"/>
    </style:style>
    <style:style style:name="T122" style:family="text">
      <style:text-properties fo:letter-spacing="-0.212cm"/>
    </style:style>
    <style:style style:name="T123" style:family="text">
      <style:text-properties fo:letter-spacing="-0.212cm" loext:padding="0cm" loext:border="none"/>
    </style:style>
    <style:style style:name="T124" style:family="text">
      <style:text-properties fo:letter-spacing="-0.767cm"/>
    </style:style>
    <style:style style:name="T125" style:family="text">
      <style:text-properties fo:letter-spacing="0.265cm"/>
    </style:style>
    <style:style style:name="T126" style:family="text">
      <style:text-properties fo:letter-spacing="0.265cm" loext:padding="0cm" loext:border="none"/>
    </style:style>
    <style:style style:name="T127" style:family="text">
      <style:text-properties fo:letter-spacing="0.212cm"/>
    </style:style>
    <style:style style:name="T128" style:family="text">
      <style:text-properties fo:letter-spacing="-0.185cm"/>
    </style:style>
    <style:style style:name="T129" style:family="text">
      <style:text-properties fo:letter-spacing="-0.185cm" loext:padding="0cm" loext:border="none"/>
    </style:style>
    <style:style style:name="T130" style:family="text">
      <style:text-properties fo:letter-spacing="0.291cm"/>
    </style:style>
    <style:style style:name="T131" style:family="text">
      <style:text-properties fo:letter-spacing="-0.132cm"/>
    </style:style>
    <style:style style:name="T132" style:family="text">
      <style:text-properties fo:letter-spacing="-0.132cm" loext:padding="0cm" loext:border="none"/>
    </style:style>
    <style:style style:name="T133" style:family="text">
      <style:text-properties fo:letter-spacing="0.318cm"/>
    </style:style>
    <style:style style:name="T134" style:family="text">
      <style:text-properties fo:letter-spacing="0.45cm"/>
    </style:style>
    <style:style style:name="T135" style:family="text">
      <style:text-properties fo:letter-spacing="-0.159cm"/>
    </style:style>
    <style:style style:name="T136" style:family="text">
      <style:text-properties fo:letter-spacing="-0.159cm" loext:padding="0cm" loext:border="none"/>
    </style:style>
    <style:style style:name="T137" style:family="text">
      <style:text-properties fo:letter-spacing="0.238cm"/>
    </style:style>
    <style:style style:name="T138" style:family="text">
      <style:text-properties fo:letter-spacing="-0.106cm"/>
    </style:style>
    <style:style style:name="T139" style:family="text">
      <style:text-properties fo:letter-spacing="-0.106cm" loext:padding="0cm" loext:border="none"/>
    </style:style>
    <style:style style:name="T140" style:family="text">
      <style:text-properties fo:letter-spacing="-0.318cm"/>
    </style:style>
    <style:style style:name="T141" style:family="text">
      <style:text-properties fo:letter-spacing="-0.318cm" loext:padding="0cm" loext:border="none"/>
    </style:style>
    <style:style style:name="T142" style:family="text">
      <style:text-properties fo:letter-spacing="0.397cm"/>
    </style:style>
    <style:style style:name="T143" style:family="text">
      <style:text-properties fo:letter-spacing="0.344cm"/>
    </style:style>
    <style:style style:name="T144" style:family="text">
      <style:text-properties fo:letter-spacing="-0.026cm"/>
    </style:style>
    <style:style style:name="T145" style:family="text">
      <style:text-properties fo:letter-spacing="-0.026cm" loext:padding="0cm" loext:border="none"/>
    </style:style>
    <style:style style:name="T146" style:family="text">
      <style:text-properties fo:letter-spacing="-0.688cm"/>
    </style:style>
    <style:style style:name="T147" style:family="text">
      <style:text-properties fo:letter-spacing="-0.238cm"/>
    </style:style>
    <style:style style:name="T148" style:family="text">
      <style:text-properties fo:letter-spacing="-0.238cm" loext:padding="0cm" loext:border="none"/>
    </style:style>
    <style:style style:name="T149" style:family="text">
      <style:text-properties fo:letter-spacing="-0.079cm"/>
    </style:style>
    <style:style style:name="T150" style:family="text">
      <style:text-properties fo:letter-spacing="-0.079cm" loext:padding="0cm" loext:border="none"/>
    </style:style>
    <style:style style:name="T151" style:family="text">
      <style:text-properties fo:letter-spacing="0.185cm"/>
    </style:style>
    <style:style style:name="T152" style:family="text">
      <style:text-properties fo:letter-spacing="-0.556cm"/>
    </style:style>
    <style:style style:name="T153" style:family="text">
      <style:text-properties fo:letter-spacing="0.37cm"/>
    </style:style>
    <style:style style:name="T154" style:family="text">
      <style:text-properties fo:letter-spacing="0.37cm" loext:padding="0cm" loext:border="none"/>
    </style:style>
    <style:style style:name="T155" style:family="text">
      <style:text-properties fo:letter-spacing="-0.053cm"/>
    </style:style>
    <style:style style:name="T156" style:family="text">
      <style:text-properties fo:letter-spacing="-0.053cm" loext:padding="0cm" loext:border="none"/>
    </style:style>
    <style:style style:name="T157" style:family="text">
      <style:text-properties fo:letter-spacing="0.476cm"/>
    </style:style>
    <style:style style:name="T158" style:family="text">
      <style:text-properties fo:letter-spacing="0.609cm"/>
    </style:style>
    <style:style style:name="T159" style:family="text">
      <style:text-properties fo:letter-spacing="0.556cm"/>
    </style:style>
    <style:style style:name="T160" style:family="text">
      <style:text-properties fo:letter-spacing="0.714cm"/>
    </style:style>
    <style:style style:name="T161" style:family="text">
      <style:text-properties fo:letter-spacing="-0.529cm"/>
    </style:style>
    <style:style style:name="T162" style:family="text">
      <style:text-properties fo:font-size="32.25pt" fo:letter-spacing="0.37cm" fo:language="en" fo:country="US" loext:padding="0cm" loext:border="none"/>
    </style:style>
    <style:style style:name="T163" style:family="text">
      <style:text-properties fo:font-size="32.25pt" fo:letter-spacing="-0.132cm" fo:language="en" fo:country="US"/>
    </style:style>
    <style:style style:name="T164" style:family="text">
      <style:text-properties fo:font-size="32.25pt" fo:letter-spacing="0.291cm" fo:language="en" fo:country="US"/>
    </style:style>
    <style:style style:name="T165" style:family="text">
      <style:text-properties fo:font-size="32.25pt" fo:letter-spacing="0.212cm" fo:language="en" fo:country="US"/>
    </style:style>
    <style:style style:name="T166" style:family="text">
      <style:text-properties fo:font-size="32.25pt" fo:letter-spacing="0.714cm" fo:language="en" fo:country="US"/>
    </style:style>
    <style:style style:name="T167" style:family="text">
      <style:text-properties fo:font-size="32.25pt" fo:letter-spacing="-0.529cm" fo:language="en" fo:country="US"/>
    </style:style>
    <style:style style:name="T168" style:family="text">
      <style:text-properties fo:font-size="32.25pt" fo:letter-spacing="0.238cm" fo:language="en" fo:country="US"/>
    </style:style>
    <style:style style:name="T169" style:family="text">
      <style:text-properties fo:letter-spacing="0.423cm"/>
    </style:style>
    <style:style style:name="T170" style:family="text">
      <style:text-properties fo:letter-spacing="0.423cm" loext:padding="0cm" loext:border="none"/>
    </style:style>
    <style:style style:name="T171" style:family="text">
      <style:text-properties fo:letter-spacing="0.026cm"/>
    </style:style>
    <style:style style:name="T172" style:family="text">
      <style:text-properties fo:font-size="35.25pt" fo:letter-spacing="0.423cm" fo:language="en" fo:country="US" loext:padding="0cm" loext:border="none"/>
    </style:style>
    <style:style style:name="T173" style:family="text">
      <style:text-properties fo:font-size="35.25pt" fo:letter-spacing="0.026cm" fo:language="en" fo:country="US"/>
    </style:style>
    <style:style style:name="T174" style:family="text">
      <style:text-properties fo:font-size="35.25pt" fo:letter-spacing="-0.079cm" fo:language="en" fo:country="US"/>
    </style:style>
    <style:style style:name="T175" style:family="text">
      <style:text-properties fo:font-size="35.25pt" fo:letter-spacing="0.556cm" fo:language="en" fo:country="US"/>
    </style:style>
    <style:style style:name="T176" style:family="text">
      <style:text-properties fo:font-size="35.25pt" fo:letter-spacing="-0.132cm" fo:language="en" fo:country="US"/>
    </style:style>
    <style:style style:name="T177" style:family="text">
      <style:text-properties fo:font-size="35.25pt" fo:letter-spacing="0.318cm" fo:language="en" fo:country="US"/>
    </style:style>
    <style:style style:name="T178" style:family="text">
      <style:text-properties fo:font-size="35.25pt" fo:letter-spacing="-0.053cm" fo:language="en" fo:country="US"/>
    </style:style>
    <style:style style:name="T179" style:family="text">
      <style:text-properties fo:font-size="35.25pt" fo:letter-spacing="0.291cm" fo:language="en" fo:country="US"/>
    </style:style>
    <style:style style:name="T180" style:family="text">
      <style:text-properties fo:font-size="35.25pt" fo:letter-spacing="-0.238cm" fo:language="en" fo:country="US"/>
    </style:style>
    <style:style style:name="T181" style:family="text">
      <style:text-properties fo:font-size="35.25pt" fo:letter-spacing="0.503cm" fo:language="en" fo:country="US"/>
    </style:style>
    <style:style style:name="T182" style:family="text">
      <style:text-properties fo:font-size="35.25pt" fo:letter-spacing="0.397cm" fo:language="en" fo:country="US"/>
    </style:style>
    <style:style style:name="T183" style:family="text">
      <style:text-properties fo:font-size="35.25pt" fo:letter-spacing="-0.106cm" fo:language="en" fo:country="US"/>
    </style:style>
    <style:style style:name="T184" style:family="text">
      <style:text-properties fo:font-size="35.25pt" fo:letter-spacing="0.37cm" fo:language="en" fo:country="US"/>
    </style:style>
    <style:style style:name="T185" style:family="text">
      <style:text-properties fo:font-size="35.25pt" fo:letter-spacing="0.265cm" fo:language="en" fo:country="US"/>
    </style:style>
    <style:style style:name="T186" style:family="text">
      <style:text-properties fo:font-size="35.25pt" fo:letter-spacing="-0.026cm" fo:language="en" fo:country="US"/>
    </style:style>
    <style:style style:name="T187" style:family="text">
      <style:text-properties fo:font-size="35.25pt" fo:letter-spacing="0.238cm" fo:language="en" fo:country="US"/>
    </style:style>
    <style:style style:name="T188" style:family="text">
      <style:text-properties fo:font-size="35.25pt" fo:letter-spacing="-0.212cm" fo:language="en" fo:country="US"/>
    </style:style>
    <style:style style:name="T189" style:family="text">
      <style:text-properties fo:font-size="35.25pt" fo:letter-spacing="0.45cm" fo:language="en" fo:country="US"/>
    </style:style>
    <style:style style:name="T190" style:family="text">
      <style:text-properties fo:font-size="35.25pt" fo:language="en" fo:country="US"/>
    </style:style>
    <style:style style:name="T191" style:family="text">
      <style:text-properties fo:letter-spacing="-0.265cm"/>
    </style:style>
    <style:style style:name="T192" style:family="text">
      <style:text-properties fo:letter-spacing="0.582cm"/>
    </style:style>
    <style:style style:name="T193" style:family="text">
      <style:text-properties fo:letter-spacing="0.106cm"/>
    </style:style>
    <style:style style:name="T194" style:family="text">
      <style:text-properties fo:letter-spacing="0.106cm" loext:padding="0cm" loext:border="none"/>
    </style:style>
    <style:style style:name="T195" style:family="text">
      <style:text-properties fo:letter-spacing="0.159cm"/>
    </style:style>
    <style:style style:name="T196" style:family="text">
      <style:text-properties fo:letter-spacing="0.079cm"/>
    </style:style>
    <style:style style:name="T197" style:family="text">
      <style:text-properties fo:letter-spacing="0.079cm" loext:padding="0cm" loext:border="none"/>
    </style:style>
    <style:style style:name="T198" style:family="text">
      <style:text-properties fo:letter-spacing="-0.9cm"/>
    </style:style>
    <style:style style:name="T199" style:family="text">
      <style:text-properties fo:letter-spacing="0.053cm"/>
    </style:style>
    <style:style style:name="T200" style:family="text">
      <style:text-properties fo:letter-spacing="0.873cm"/>
    </style:style>
    <style:style style:name="T201" style:family="text">
      <style:text-properties fo:letter-spacing="1.217cm"/>
    </style:style>
    <style:style style:name="T202" style:family="text">
      <style:text-properties fo:letter-spacing="0.635cm"/>
    </style:style>
    <style:style style:name="T203" style:family="text">
      <style:text-properties fo:letter-spacing="normal"/>
    </style:style>
    <style:style style:name="T204" style:family="text">
      <style:text-properties fo:letter-spacing="normal" loext:padding="0cm" loext:border="none"/>
    </style:style>
    <style:style style:name="T205" style:family="text">
      <style:text-properties fo:letter-spacing="0.529cm"/>
    </style:style>
    <style:style style:name="T206" style:family="text">
      <style:text-properties fo:letter-spacing="-0.397cm"/>
    </style:style>
    <style:style style:name="T207" style:family="text">
      <style:text-properties fo:letter-spacing="0.767cm"/>
    </style:style>
    <style:style style:name="T208" style:family="text">
      <style:text-properties fo:letter-spacing="0.82cm"/>
    </style:style>
    <style:style style:name="T209" style:family="text">
      <style:text-properties fo:letter-spacing="0.794cm"/>
    </style:style>
    <style:style style:name="T210" style:family="text">
      <style:text-properties fo:letter-spacing="-0.344cm"/>
    </style:style>
    <style:style style:name="T211" style:family="text">
      <style:text-properties fo:letter-spacing="-0.344cm" loext:padding="0cm" loext:border="none"/>
    </style:style>
    <style:style style:name="T212" style:family="text">
      <style:text-properties fo:letter-spacing="1.296cm"/>
    </style:style>
    <style:style style:name="T213" style:family="text">
      <style:text-properties fo:letter-spacing="0.132cm"/>
    </style:style>
    <style:style style:name="T214" style:family="text">
      <style:text-properties fo:letter-spacing="0.132cm" loext:padding="0cm" loext:border="none"/>
    </style:style>
    <style:style style:name="T215" style:family="text">
      <style:text-properties fo:letter-spacing="1.244cm"/>
    </style:style>
    <style:style style:name="T216" style:family="text">
      <style:text-properties fo:letter-spacing="0.688cm"/>
    </style:style>
    <style:style style:name="T217" style:family="text">
      <style:text-properties fo:letter-spacing="0.847cm"/>
    </style:style>
    <style:style style:name="T218" style:family="text">
      <style:text-properties fo:letter-spacing="1.138cm"/>
    </style:style>
    <style:style style:name="T219" style:family="text">
      <style:text-properties fo:letter-spacing="1.27cm"/>
    </style:style>
    <style:style style:name="T220" style:family="text">
      <style:text-properties fo:letter-spacing="-0.423cm"/>
    </style:style>
    <style:style style:name="T221" style:family="text">
      <style:text-properties fo:letter-spacing="1.535cm"/>
    </style:style>
    <style:style style:name="T222" style:family="text">
      <style:text-properties fo:letter-spacing="0.9cm"/>
    </style:style>
    <style:style style:name="T223" style:family="text">
      <style:text-properties fo:letter-spacing="0.741cm"/>
    </style:style>
    <style:style style:name="T224" style:family="text">
      <style:text-properties fo:letter-spacing="1.191cm"/>
    </style:style>
    <style:style style:name="T225" style:family="text">
      <style:text-properties fo:letter-spacing="1.058cm"/>
    </style:style>
    <style:style style:name="T226" style:family="text">
      <style:text-properties fo:letter-spacing="0.979cm"/>
    </style:style>
    <style:style style:name="T227" style:family="text">
      <style:text-properties fo:letter-spacing="1.402cm"/>
    </style:style>
    <style:style style:name="T228" style:family="text">
      <style:text-properties fo:letter-spacing="-0.45cm"/>
    </style:style>
    <style:style style:name="T229" style:family="text">
      <style:text-properties fo:letter-spacing="-0.503cm" loext:padding="0cm" loext:border="none"/>
    </style:style>
    <style:style style:name="T230" style:family="text">
      <style:text-properties fo:letter-spacing="0.926cm"/>
    </style:style>
    <style:style style:name="T231" style:family="text">
      <style:text-properties fo:letter-spacing="1.588cm"/>
    </style:style>
    <style:style style:name="T232" style:family="text">
      <style:text-properties fo:letter-spacing="1.323cm"/>
    </style:style>
    <style:style style:name="T233" style:family="text">
      <style:text-properties fo:letter-spacing="1.852cm"/>
    </style:style>
    <style:style style:name="T234" style:family="text">
      <style:text-properties fo:letter-spacing="-1.27cm"/>
    </style:style>
    <style:style style:name="T235" style:family="text">
      <style:text-properties fo:letter-spacing="1.349cm"/>
    </style:style>
    <style:style style:name="T236" style:family="text">
      <style:text-properties fo:letter-spacing="4.366cm" loext:padding="0cm" loext:border="none"/>
    </style:style>
    <style:style style:name="T237" style:family="text">
      <style:text-properties fo:letter-spacing="-3.916cm"/>
    </style:style>
    <style:style style:name="T238" style:family="text">
      <style:text-properties fo:letter-spacing="-1.667cm" loext:padding="0cm" loext:border="none"/>
    </style:style>
    <style:style style:name="T239" style:family="text">
      <style:text-properties fo:letter-spacing="-5.398cm"/>
    </style:style>
    <style:style style:name="T240" style:family="text">
      <style:text-properties officeooo:rsid="00a7584c"/>
    </style:style>
    <style:style style:name="T241" style:family="text">
      <style:text-properties officeooo:rsid="00aaf142"/>
    </style:style>
    <style:style style:name="T242" style:family="text">
      <style:text-properties officeooo:rsid="0010e0ad"/>
    </style:style>
    <style:style style:name="T243" style:family="text">
      <style:text-properties officeooo:rsid="00184a26"/>
    </style:style>
    <style:style style:name="T244" style:family="text">
      <style:text-properties officeooo:rsid="00b03e99"/>
    </style:style>
    <style:style style:name="T245" style:family="text">
      <style:text-properties officeooo:rsid="00b64f88"/>
    </style:style>
    <style:style style:name="T246" style:family="text">
      <style:text-properties officeooo:rsid="00b9a5f5"/>
    </style:style>
    <style:style style:name="T247" style:family="text">
      <style:text-properties officeooo:rsid="00baec15"/>
    </style:style>
    <style:style style:name="T248" style:family="text">
      <style:text-properties officeooo:rsid="00bd9066"/>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4" text:anchor-type="page" text:anchor-page-number="1" svg:x="0cm" svg:y="0cm" svg:width="30.665cm" draw:z-index="3">
        <draw:text-box fo:min-height="40.64cm">
          <text:p text:style-name="P55"/>
        </draw:text-box>
      </draw:frame>
      <draw:frame draw:style-name="fr2" draw:name="Frame3" text:anchor-type="page" text:anchor-page-number="1" svg:x="0cm" svg:y="0cm" svg:width="30.665cm" draw:z-index="2">
        <draw:text-box fo:min-height="40.64cm">
          <text:p text:style-name="P96"><text:span text:style-name="T107">Santas</text:span><text:span text:style-name="T109"> </text:span>i<text:span text:style-name="T110"> </text:span><text:span text:style-name="T111">aa</text:span></text:p>
          <text:p text:style-name="P97"><text:span text:style-name="T112">OAL</text:span><text:span text:style-name="T113"> </text:span><text:span text:style-name="T115">Se</text:span><text:span text:style-name="T116"> </text:span><text:span text:style-name="T117">we</text:span></text:p>
          <text:p text:style-name="P98"><text:span text:style-name="T119">November</text:span><text:span text:style-name="T120"> </text:span><text:span text:style-name="T118">27th,</text:span><text:span text:style-name="T121"> </text:span><text:span text:style-name="T122">1880.</text:span><text:span text:style-name="T124"> </text:span>]</text:p>
          <text:p text:style-name="P99"><text:span text:style-name="T126">MARRIAGE</text:span><text:span text:style-name="T125"> </text:span><text:span text:style-name="T127">GREETING.</text:span></text:p>
          <text:p text:style-name="P101"><text:span text:style-name="T129">Why</text:span><text:span text:style-name="T130"> </text:span><text:span text:style-name="T131">should</text:span><text:span text:style-name="T133"> </text:span><text:span text:style-name="T118">my</text:span><text:span text:style-name="T134"> </text:span><text:span text:style-name="T131">stammering</text:span><text:span text:style-name="T125"> </text:span><text:span text:style-name="T128">Muse</text:span><text:span text:style-name="T133"> </text:span><text:span text:style-name="T135">essay</text:span> <text:span text:style-name="T132">Her</text:span><text:span text:style-name="T125"> </text:span><text:span text:style-name="T131">slender</text:span><text:span text:style-name="T137"> </text:span><text:span text:style-name="T128">art</text:span><text:span text:style-name="T130"> </text:span><text:span text:style-name="T138">of</text:span><text:span text:style-name="T137"> </text:span><text:span text:style-name="T138">skilful</text:span><text:span text:style-name="T137"> </text:span><text:span text:style-name="T131">rhyme,</text:span></text:p>
          <text:p text:style-name="P100"><text:span text:style-name="T139">To</text:span><text:span text:style-name="T127"> </text:span><text:span text:style-name="T135">mingle</text:span><text:span text:style-name="T137"> </text:span><text:span text:style-name="T140">on</text:span><text:span text:style-name="T142"> </text:span><text:span text:style-name="T128">your</text:span><text:span text:style-name="T130"> </text:span><text:span text:style-name="T131">wedding-day</text:span> <text:span text:style-name="T129">With</text:span><text:span text:style-name="T143"> </text:span><text:span text:style-name="T135">rhythms</text:span><text:span text:style-name="T137"> </text:span><text:span text:style-name="T131">of</text:span><text:span text:style-name="T125"> </text:span><text:span text:style-name="T128">the</text:span><text:span text:style-name="T143"> </text:span><text:span text:style-name="T135">marriage</text:span><text:span text:style-name="T133"> </text:span><text:span text:style-name="T144">chime</text:span><text:span text:style-name="T146"> </text:span>?</text:p>
          <text:p text:style-name="P102"><text:span text:style-name="T139">Words,</text:span><text:span text:style-name="T125"> </text:span><text:span text:style-name="T128">words</text:span><text:span text:style-name="T143"> </text:span><text:span text:style-name="T147">to</text:span><text:span text:style-name="T133"> </text:span><text:span text:style-name="T149">Joy</text:span><text:span text:style-name="T151"> </text:span><text:span text:style-name="T128">she</text:span><text:span text:style-name="T130"> </text:span><text:span text:style-name="T131">vainly</text:span><text:span text:style-name="T125"> </text:span><text:span text:style-name="T131">speaks—</text:span> <text:span text:style-name="T129">As</text:span><text:span text:style-name="T133"> </text:span><text:span text:style-name="T128">empty</text:span><text:span text:style-name="T130"> </text:span><text:span text:style-name="T131">they</text:span><text:span text:style-name="T125"> </text:span><text:span text:style-name="T147">to</text:span><text:span text:style-name="T133"> </text:span><text:span text:style-name="T149">Joy</text:span><text:span text:style-name="T151"> </text:span><text:span text:style-name="T113">as</text:span><text:span text:style-name="T134"> </text:span><text:span text:style-name="T128">Woe</text:span><text:span text:style-name="T127"> </text:span><text:span text:style-name="T131">;—</text:span> <text:span text:style-name="T150">Your</text:span><text:span text:style-name="T127"> </text:span><text:span text:style-name="T131">bride</text:span><text:span text:style-name="T130"> </text:span><text:span text:style-name="T122">has</text:span><text:span text:style-name="T143"> </text:span><text:span text:style-name="T135">roses</text:span><text:span text:style-name="T130"> </text:span><text:span text:style-name="T118">on</text:span><text:span text:style-name="T120"> </text:span><text:span text:style-name="T122">her</text:span><text:span text:style-name="T143"> </text:span><text:span text:style-name="T144">cheeks</text:span><text:span text:style-name="T152"> </text:span>;</text:p>
          <text:p text:style-name="P105"><text:span text:style-name="T150">Twin-roses</text:span><text:span text:style-name="T137"> </text:span><text:span text:style-name="T122">from</text:span><text:span text:style-name="T153"> </text:span><text:span text:style-name="T135">her</text:span><text:span text:style-name="T125"> </text:span><text:span text:style-name="T131">heart</text:span><text:span text:style-name="T125"> </text:span><text:span text:style-name="T131">they</text:span><text:span text:style-name="T125"> </text:span><text:span text:style-name="T138">grow.</text:span></text:p>
          <text:p text:style-name="P106"><text:span text:style-name="T156">Still,</text:span><text:span text:style-name="T127"> </text:span><text:span text:style-name="T135">with</text:span><text:span text:style-name="T130"> </text:span><text:span text:style-name="T135">your</text:span><text:span text:style-name="T125"> </text:span><text:span text:style-name="T149">guests,</text:span><text:span text:style-name="T130"> </text:span><text:span text:style-name="T144">I’ll</text:span><text:span text:style-name="T137"> </text:span><text:span text:style-name="T128">make</text:span><text:span text:style-name="T143"> </text:span><text:span text:style-name="T113">as</text:span><text:span text:style-name="T157"> </text:span><text:span text:style-name="T135">well</text:span> <text:span text:style-name="T139">Old</text:span><text:span text:style-name="T125"> </text:span><text:span text:style-name="T138">golden</text:span><text:span text:style-name="T137"> </text:span><text:span text:style-name="T138">common-places</text:span><text:span text:style-name="T137"> </text:span><text:span text:style-name="T131">new—</text:span> <text:span text:style-name="T139">Glad</text:span><text:span text:style-name="T130"> </text:span><text:span text:style-name="T138">echoes</text:span><text:span text:style-name="T127"> </text:span><text:span text:style-name="T138">of</text:span><text:span text:style-name="T125"> </text:span><text:span text:style-name="T135">your</text:span><text:span text:style-name="T130"> </text:span><text:span text:style-name="T138">wedding</text:span><text:span text:style-name="T133"> </text:span><text:span text:style-name="T135">bell</text:span> <text:span text:style-name="T139">Quicken</text:span><text:span text:style-name="T127"> </text:span><text:span text:style-name="T131">all</text:span><text:span text:style-name="T133"> </text:span><text:span text:style-name="T135">hours</text:span><text:span text:style-name="T125"> </text:span><text:span text:style-name="T131">of</text:span><text:span text:style-name="T143"> </text:span><text:span text:style-name="T138">life</text:span><text:span text:style-name="T130"> </text:span><text:span text:style-name="T122">for</text:span><text:span text:style-name="T143"> </text:span><text:span text:style-name="T138">you!</text:span> <text:span text:style-name="T123">JOHN</text:span><text:span text:style-name="T158"> </text:span><text:span text:style-name="T131">JAMEs</text:span><text:span text:style-name="T159"> </text:span><text:span text:style-name="T149">PIATT.</text:span></text:p>
          <text:p text:style-name="P104"><text:span text:style-name="T154">“</text:span><text:span text:style-name="T162">FIRST</text:span><text:span text:style-name="T163"> </text:span><text:span text:style-name="T164">NIGHTS”</text:span><text:span text:style-name="T165"> </text:span><text:span text:style-name="T166">AT</text:span><text:span text:style-name="T167"> </text:span><text:span text:style-name="T164">LONDON </text:span><text:span text:style-name="T168">7HEATRES.</text:span></text:p>
          <text:p text:style-name="P108"><text:span text:style-name="T170">‘</text:span><text:span text:style-name="T172">THE</text:span><text:span text:style-name="T173"> </text:span><text:span text:style-name="T174">entrée</text:span><text:span text:style-name="T175"> </text:span><text:span text:style-name="T176">to</text:span><text:span text:style-name="T177"> </text:span><text:span text:style-name="T190">a</text:span><text:span text:style-name="T173"> </text:span><text:span text:style-name="T178">London</text:span><text:span text:style-name="T179"> </text:span><text:span text:style-name="T178">theatre,</text:span><text:span text:style-name="T177"> </text:span><text:span text:style-name="T180">on</text:span><text:span text:style-name="T181"> </text:span><text:span text:style-name="T176">the</text:span><text:span text:style-name="T182"> </text:span><text:span text:style-name="T183">first</text:span><text:span text:style-name="T184"> </text:span><text:span text:style-name="T178">nights</text:span><text:span text:style-name="T185"> </text:span><text:span text:style-name="T186">of</text:span><text:span text:style-name="T177"> </text:span><text:span text:style-name="T190">a</text:span><text:span text:style-name="T187"> </text:span><text:span text:style-name="T188">new</text:span><text:span text:style-name="T189"> </text:span><text:span text:style-name="T186">play,</text:span></text:p>
          <text:p text:style-name="P109"><text:span text:style-name="T123">may</text:span><text:span text:style-name="T142"> </text:span><text:span text:style-name="T191">be</text:span><text:span text:style-name="T142"> </text:span><text:span text:style-name="T138">said</text:span><text:span text:style-name="T158"> </text:span><text:span text:style-name="T128">to</text:span><text:span text:style-name="T142"> </text:span><text:span text:style-name="T191">be</text:span><text:span text:style-name="T157"> </text:span><text:span text:style-name="T138">reserved</text:span><text:span text:style-name="T192"> </text:span><text:span text:style-name="T122">to</text:span><text:span text:style-name="T157"> </text:span><text:span text:style-name="T131">three</text:span><text:span text:style-name="T133"> </text:span><text:span text:style-name="T149">sections</text:span><text:span text:style-name="T125"> </text:span><text:span text:style-name="T155">of</text:span><text:span text:style-name="T133"> </text:span><text:span text:style-name="T149">London</text:span><text:span text:style-name="T120"> </text:span><text:span text:style-name="T144">society.</text:span> <text:span text:style-name="T132">‘Those</text:span><text:span text:style-name="T130"> </text:span><text:span text:style-name="T155">of</text:span><text:span text:style-name="T193"> </text:span><text:span text:style-name="T131">the</text:span><text:span text:style-name="T195"> </text:span><text:span text:style-name="T138">wealthy</text:span><text:span text:style-name="T142"> </text:span><text:span text:style-name="T147">who</text:span><text:span text:style-name="T130"> </text:span><text:span text:style-name="T138">profess</text:span><text:span text:style-name="T133"> </text:span><text:span text:style-name="T128">to</text:span><text:span text:style-name="T130"> </text:span><text:span text:style-name="T191">be</text:span><text:span text:style-name="T134"> </text:span><text:span text:style-name="T138">patrons</text:span><text:span text:style-name="T125"> </text:span><text:span text:style-name="T155">of</text:span><text:span text:style-name="T196"> </text:span><text:span text:style-name="T149">dramatic</text:span><text:span text:style-name="T130"> </text:span><text:span text:style-name="T131">art</text:span><text:span text:style-name="T130"> </text:span>;<text:span text:style-name="T143"> </text:span><text:span text:style-name="T131">the</text:span><text:span text:style-name="T143"> </text:span><text:span text:style-name="T144">lit</text:span><text:span text:style-name="T150">erary,</text:span><text:span text:style-name="T142"> </text:span><text:span text:style-name="T147">who</text:span><text:span text:style-name="T153"> </text:span><text:span text:style-name="T135">assume</text:span><text:span text:style-name="T143"> </text:span><text:span text:style-name="T128">to</text:span><text:span text:style-name="T153"> </text:span><text:span text:style-name="T155">criticise</text:span><text:span text:style-name="T125"> </text:span><text:span text:style-name="T134">it</text:span><text:span text:style-name="T198"> </text:span>;<text:span text:style-name="T199"> </text:span><text:span text:style-name="T135">and</text:span><text:span text:style-name="T169"> </text:span><text:span text:style-name="T135">the</text:span><text:span text:style-name="T169"> </text:span><text:span text:style-name="T155">vulgar,</text:span><text:span text:style-name="T153"> </text:span><text:span text:style-name="T135">whose</text:span><text:span text:style-name="T153"> </text:span><text:span text:style-name="T155">chief</text:span><text:span text:style-name="T199"> </text:span><text:span text:style-name="T155">delight</text:span><text:span text:style-name="T137"> </text:span><text:span text:style-name="T147">is</text:span> <text:span text:style-name="T123">to</text:span><text:span text:style-name="T160"> </text:span><text:span text:style-name="T149">discover</text:span><text:span text:style-name="T159"> </text:span><text:span text:style-name="T149">points</text:span><text:span text:style-name="T192"> </text:span><text:span text:style-name="T135">to</text:span><text:span text:style-name="T121"> </text:span><text:span text:style-name="T138">condemn</text:span><text:span text:style-name="T160"> </text:span><text:span text:style-name="T113">in</text:span><text:span text:style-name="T200"> </text:span><text:span text:style-name="T149">it.</text:span> <text:span text:style-name="T132">matter</text:span><text:span text:style-name="T130"> </text:span><text:span text:style-name="T149">of</text:span><text:span text:style-name="T134"> </text:span><text:span text:style-name="T149">course,</text:span><text:span text:style-name="T142"> </text:span><text:span text:style-name="T128">to</text:span><text:span text:style-name="T169"> </text:span><text:span text:style-name="T135">the</text:span><text:span text:style-name="T143"> </text:span><text:span text:style-name="T155">boxes;</text:span><text:span text:style-name="T192"> </text:span><text:span text:style-name="T135">the</text:span><text:span text:style-name="T192"> </text:span><text:span text:style-name="T138">second</text:span><text:span text:style-name="T159"> </text:span><text:span text:style-name="T144">occupy,</text:span><text:span text:style-name="T133"> </text:span><text:span text:style-name="T149">of</text:span><text:span text:style-name="T157"> </text:span><text:span text:style-name="T149">right</text:span><text:span text:style-name="T192"> </text:span><text:span text:style-name="T149">prescrip</text:span><text:span text:style-name="T150">tive,</text:span><text:span text:style-name="T143"> </text:span><text:span text:style-name="T135">the</text:span><text:span text:style-name="T153"> </text:span><text:span text:style-name="T144">stalls;</text:span><text:span text:style-name="T159"> </text:span><text:span text:style-name="T135">the</text:span><text:span text:style-name="T143"> </text:span><text:span text:style-name="T149">third</text:span><text:span text:style-name="T143"> </text:span><text:span text:style-name="T149">fill</text:span><text:span text:style-name="T133"> </text:span><text:span text:style-name="T135">the</text:span><text:span text:style-name="T143"> </text:span><text:span text:style-name="T144">gallery.</text:span><text:span text:style-name="T201"> </text:span>A<text:span text:style-name="T151"> </text:span><text:span text:style-name="T131">fourth</text:span><text:span text:style-name="T202"> </text:span><text:span text:style-name="T155">party,</text:span><text:span text:style-name="T153"> </text:span><text:span text:style-name="T138">usually</text:span><text:span text:style-name="T153"> </text:span><text:span text:style-name="T135">very</text:span> <text:span text:style-name="T139">orderly</text:span><text:span text:style-name="T133"> </text:span><text:span text:style-name="T135">and</text:span><text:span text:style-name="T153"> </text:span><text:span text:style-name="T155">contented,</text:span><text:span text:style-name="T127"> </text:span><text:span text:style-name="T128">and</text:span><text:span text:style-name="T169"> </text:span><text:span text:style-name="T128">to</text:span><text:span text:style-name="T134"> </text:span><text:span text:style-name="T140">be</text:span><text:span text:style-name="T153"> </text:span><text:span text:style-name="T131">found</text:span><text:span text:style-name="T130"> </text:span><text:span text:style-name="T138">seated</text:span><text:span text:style-name="T142"> </text:span><text:span text:style-name="T140">in</text:span><text:span text:style-name="T192"> </text:span><text:span text:style-name="T135">the</text:span><text:span text:style-name="T133"> </text:span><text:span text:style-name="T155">pit,</text:span><text:span text:style-name="T137"> </text:span><text:span text:style-name="T128">may</text:span><text:span text:style-name="T130"> </text:span><text:span text:style-name="T113">be</text:span><text:span text:style-name="T157"> </text:span><text:span text:style-name="T138">added</text:span> <text:span text:style-name="T129">to</text:span><text:span text:style-name="T142"> </text:span><text:span text:style-name="T203">these</text:span><text:span text:style-name="T161"> </text:span>;<text:span text:style-name="T133"> </text:span><text:span text:style-name="T128">but</text:span><text:span text:style-name="T153"> </text:span><text:span text:style-name="T113">as</text:span><text:span text:style-name="T169"> </text:span><text:span text:style-name="T135">it</text:span><text:span text:style-name="T153"> </text:span><text:span text:style-name="T122">has</text:span><text:span text:style-name="T142"> </text:span><text:span text:style-name="T191">no</text:span><text:span text:style-name="T205"> </text:span><text:span text:style-name="T128">very</text:span><text:span text:style-name="T142"> </text:span><text:span text:style-name="T155">distinctive</text:span><text:span text:style-name="T137"> </text:span><text:span text:style-name="T155">character,</text:span><text:span text:style-name="T137"> </text:span><text:span text:style-name="T138">being</text:span><text:span text:style-name="T130"> </text:span><text:span text:style-name="T138">composed</text:span><text:span text:style-name="T143"> </text:span><text:span text:style-name="T149">of</text:span> <text:span text:style-name="T132">all</text:span><text:span text:style-name="T143"> </text:span><text:span text:style-name="T135">the</text:span><text:span text:style-name="T142"> </text:span><text:span text:style-name="T138">various</text:span><text:span text:style-name="T130"> </text:span><text:span text:style-name="T138">elements</text:span><text:span text:style-name="T130"> </text:span><text:span text:style-name="T149">of</text:span><text:span text:style-name="T133"> </text:span>a<text:span text:style-name="T203"> </text:span><text:span text:style-name="T149">London</text:span><text:span text:style-name="T133"> </text:span><text:span text:style-name="T131">crowd</text:span><text:span text:style-name="T143"> </text:span><text:span text:style-name="T128">drawn</text:span><text:span text:style-name="T120"> </text:span><text:span text:style-name="T149">together</text:span><text:span text:style-name="T125"> </text:span><text:span text:style-name="T122">by</text:span><text:span text:style-name="T134"> </text:span><text:span text:style-name="T149">chance,</text:span> <text:span text:style-name="T123">it</text:span><text:span text:style-name="T142"> </text:span><text:span text:style-name="T131">does</text:span><text:span text:style-name="T159"> </text:span><text:span text:style-name="T131">not</text:span><text:span text:style-name="T202"> </text:span><text:span text:style-name="T138">enter</text:span><text:span text:style-name="T192"> </text:span><text:span text:style-name="T149">into</text:span><text:span text:style-name="T130"> </text:span><text:span text:style-name="T135">our</text:span><text:span text:style-name="T121"> </text:span><text:span text:style-name="T138">present</text:span><text:span text:style-name="T143"> </text:span><text:span text:style-name="T155">classification.</text:span><text:span text:style-name="T201"> </text:span><text:span text:style-name="T131">As</text:span><text:span text:style-name="T130"> </text:span>a<text:span text:style-name="T171"> </text:span><text:span text:style-name="T138">matter</text:span><text:span text:style-name="T125"> </text:span><text:span text:style-name="T155">of</text:span><text:span text:style-name="T169"> </text:span><text:span text:style-name="T131">per</text:span><text:span text:style-name="T136">sonal</text:span><text:span text:style-name="T202"> </text:span><text:span text:style-name="T155">feeling,</text:span><text:span text:style-name="T125"> </text:span><text:span text:style-name="T206">we</text:span><text:span text:style-name="T192"> </text:span><text:span text:style-name="T138">confess</text:span><text:span text:style-name="T157"> </text:span><text:span text:style-name="T135">to</text:span><text:span text:style-name="T207"> </text:span><text:span text:style-name="T113">no</text:span><text:span text:style-name="T208"> </text:span><text:span text:style-name="T149">particular</text:span><text:span text:style-name="T192"> </text:span><text:span text:style-name="T149">admiration</text:span><text:span text:style-name="T133"> </text:span><text:span text:style-name="T131">for</text:span><text:span text:style-name="T121"> </text:span><text:span text:style-name="T135">the</text:span><text:span text:style-name="T153"> </text:span><text:span text:style-name="T138">wealthy</text:span> <text:span text:style-name="T139">London</text:span><text:span text:style-name="T133"> </text:span><text:span text:style-name="T138">patron</text:span><text:span text:style-name="T133"> </text:span><text:span text:style-name="T122">of</text:span><text:span text:style-name="T135"> </text:span><text:span text:style-name="T203">dramatic</text:span><text:span text:style-name="T195"> </text:span><text:span text:style-name="T138">art.</text:span></text:p>
          <text:p text:style-name="P111"><text:span text:style-name="T197">As</text:span><text:span text:style-name="T196"> </text:span>a<text:span text:style-name="T195"> </text:span><text:span text:style-name="T203">rule,</text:span><text:span text:style-name="T133"> </text:span><text:span text:style-name="T155">he</text:span><text:span text:style-name="T133"> </text:span><text:span text:style-name="T149">is</text:span><text:span text:style-name="T143"> </text:span><text:span text:style-name="T149">far</text:span><text:span text:style-name="T133"> </text:span><text:span text:style-name="T203">more</text:span><text:span text:style-name="T130"> </text:span><text:span text:style-name="T203">interested</text:span><text:span text:style-name="T127"> </text:span><text:span text:style-name="T149">in</text:span><text:span text:style-name="T121"> </text:span>|</text:p>
          <text:p text:style-name="P112"><text:span text:style-name="T114">who</text:span><text:span text:style-name="T157"> </text:span><text:span text:style-name="T135">passes</text:span><text:span text:style-name="T159"> </text:span><text:span text:style-name="T135">out</text:span><text:span text:style-name="T133"> </text:span><text:span text:style-name="T122">at</text:span><text:span text:style-name="T209"> </text:span><text:span text:style-name="T135">the</text:span><text:span text:style-name="T153"> </text:span><text:span text:style-name="T138">stage</text:span><text:span text:style-name="T130"> </text:span><text:span text:style-name="T138">door</text:span><text:span text:style-name="T157"> </text:span><text:span text:style-name="T135">than</text:span><text:span text:style-name="T134"> </text:span><text:span text:style-name="T210">in</text:span><text:span text:style-name="T192"> </text:span><text:span text:style-name="T122">what</text:span><text:span text:style-name="T134"> </text:span><text:span text:style-name="T138">takes</text:span><text:span text:style-name="T133"> </text:span><text:span text:style-name="T138">place</text:span><text:span text:style-name="T130"> </text:span><text:span text:style-name="T113">on</text:span><text:span text:style-name="T159"> </text:span><text:span text:style-name="T135">the</text:span><text:span text:style-name="T133"> </text:span><text:span text:style-name="T138">stage</text:span><text:span text:style-name="T158"> </text:span>| <text:span text:style-name="T150">itself,</text:span><text:span text:style-name="T143"> </text:span><text:span text:style-name="T138">and,</text:span><text:span text:style-name="T134"> </text:span><text:span text:style-name="T113">in</text:span><text:span text:style-name="T209"> </text:span><text:span text:style-name="T149">general,</text:span><text:span text:style-name="T133"> </text:span><text:span text:style-name="T131">prefers</text:span><text:span text:style-name="T192"> </text:span><text:span text:style-name="T135">the</text:span><text:span text:style-name="T159"> </text:span><text:span text:style-name="T131">piquant</text:span><text:span text:style-name="T159"> </text:span><text:span text:style-name="T138">pleasantries</text:span><text:span text:style-name="T137"> </text:span><text:span text:style-name="T155">of</text:span><text:span text:style-name="T153"> </text:span><text:span text:style-name="T138">ofera-bouffe</text:span><text:span text:style-name="T120"> </text:span>—</text:p>
          <text:p text:style-name="P115"><text:span text:style-name="T148">to</text:span><text:span text:style-name="T169"> </text:span><text:span text:style-name="T135">the</text:span><text:span text:style-name="T142"> </text:span><text:span text:style-name="T128">more</text:span><text:span text:style-name="T153"> </text:span><text:span text:style-name="T135">demure</text:span><text:span text:style-name="T130"> </text:span><text:span text:style-name="T149">action</text:span><text:span text:style-name="T130"> </text:span><text:span text:style-name="T155">of</text:span><text:span text:style-name="T196"> </text:span><text:span text:style-name="T135">the</text:span><text:span text:style-name="T143"> </text:span><text:span text:style-name="T138">regular</text:span><text:span text:style-name="T130"> </text:span><text:span text:style-name="T131">drama.</text:span><text:span text:style-name="T212"> </text:span><text:span text:style-name="T131">‘There</text:span><text:span text:style-name="T143"> </text:span><text:span text:style-name="T147">is</text:span><text:span text:style-name="T157"> </text:span><text:span text:style-name="T140">no</text:span><text:span text:style-name="T159"> </text:span><text:span text:style-name="T149">London</text:span> <text:span text:style-name="T132">theatre</text:span><text:span text:style-name="T133"> </text:span><text:span text:style-name="T138">which,</text:span><text:span text:style-name="T143"> </text:span><text:span text:style-name="T138">during</text:span><text:span text:style-name="T130"> </text:span><text:span text:style-name="T128">the</text:span><text:span text:style-name="T143"> </text:span><text:span text:style-name="T138">season,</text:span><text:span text:style-name="T134"> </text:span><text:span text:style-name="T147">is</text:span><text:span text:style-name="T157"> </text:span><text:span text:style-name="T149">nightly</text:span><text:span text:style-name="T143"> </text:span><text:span text:style-name="T128">more</text:span><text:span text:style-name="T143"> </text:span><text:span text:style-name="T131">crowded</text:span><text:span text:style-name="T192"> </text:span><text:span text:style-name="T191">by</text:span><text:span text:style-name="T120"> </text:span><text:span text:style-name="T135">members</text:span></text:p>
          <text:p text:style-name="P122"><text:span text:style-name="T214">of</text:span><text:span text:style-name="T137"> </text:span><text:span text:style-name="T203">the</text:span><text:span text:style-name="T125"> </text:span><text:span text:style-name="T203">male</text:span><text:span text:style-name="T137"> </text:span><text:span text:style-name="T171">sex,</text:span><text:span text:style-name="T125"> </text:span><text:span text:style-name="T171">than</text:span><text:span text:style-name="T143"> </text:span><text:span text:style-name="T203">the</text:span><text:span text:style-name="T125"> </text:span><text:span text:style-name="T196">Gaiety,</text:span><text:span text:style-name="T137"> </text:span><text:span text:style-name="T171">and</text:span><text:span text:style-name="T137"> </text:span><text:span text:style-name="T203">it</text:span><text:span text:style-name="T125"> </text:span><text:span text:style-name="T171">would</text:span><text:span text:style-name="T192"> </text:span><text:span text:style-name="T144">be</text:span><text:span text:style-name="T130"> </text:span><text:span text:style-name="T203">hard</text:span><text:span text:style-name="T159"> </text:span><text:span text:style-name="T203">now</text:span><text:span text:style-name="T130"> </text:span><text:span text:style-name="T199">to</text:span><text:span text:style-name="T153"> </text:span><text:span text:style-name="T213">finda</text:span><text:span text:style-name="T153"> </text:span>|</text:p>
          <text:p text:style-name="P119"><text:span text:style-name="T132">piece</text:span><text:span text:style-name="T205"> </text:span><text:span text:style-name="T138">presented</text:span><text:span text:style-name="T133"> </text:span><text:span text:style-name="T191">on</text:span><text:span text:style-name="T120"> </text:span><text:span text:style-name="T131">its</text:span><text:span text:style-name="T143"> </text:span><text:span text:style-name="T138">boards,</text:span><text:span text:style-name="T143"> </text:span><text:span text:style-name="T149">entitled</text:span><text:span text:style-name="T169"> </text:span><text:span text:style-name="T128">to</text:span><text:span text:style-name="T133"> </text:span><text:span text:style-name="T131">aught</text:span><text:span text:style-name="T159"> </text:span><text:span text:style-name="T128">but</text:span><text:span text:style-name="T157"> </text:span><text:span text:style-name="T135">the</text:span><text:span text:style-name="T143"> </text:span><text:span text:style-name="T135">most</text:span><text:span text:style-name="T192"> </text:span><text:span text:style-name="T138">transient</text:span> <text:span text:style-name="T150">attention.</text:span><text:span text:style-name="T215"> </text:span><text:span text:style-name="T149">The</text:span><text:span text:style-name="T121"> </text:span><text:span text:style-name="T149">principal</text:span><text:span text:style-name="T216"> </text:span><text:span text:style-name="T138">supporters</text:span><text:span text:style-name="T120"> </text:span><text:span text:style-name="T155">of</text:span><text:span text:style-name="T120"> </text:span><text:span text:style-name="T131">that</text:span><text:span text:style-name="T216"> </text:span><text:span text:style-name="T138">theatre</text:span><text:span text:style-name="T192"> </text:span><text:span text:style-name="T122">are</text:span><text:span text:style-name="T202"> </text:span><text:span text:style-name="T131">among</text:span><text:span text:style-name="T158"> </text:span><text:span text:style-name="T135">the</text:span> <text:span text:style-name="T139">principal</text:span><text:span text:style-name="T130"> </text:span><text:span text:style-name="T138">supporters</text:span><text:span text:style-name="T125"> </text:span><text:span text:style-name="T149">of</text:span><text:span text:style-name="T142"> </text:span><text:span text:style-name="T138">dramatic</text:span><text:span text:style-name="T158"> </text:span><text:span text:style-name="T135">art</text:span><text:span text:style-name="T216"> </text:span><text:span text:style-name="T140">in</text:span><text:span text:style-name="T217"> </text:span><text:span text:style-name="T149">London.</text:span><text:span text:style-name="T215"> </text:span><text:span text:style-name="T135">‘The</text:span><text:span text:style-name="T159"> </text:span><text:span text:style-name="T149">chief</text:span><text:span text:style-name="T134"> </text:span><text:span text:style-name="T138">produc</text:span><text:span text:style-name="T150">tions</text:span><text:span text:style-name="T137"> </text:span><text:span text:style-name="T138">of</text:span><text:span text:style-name="T157"> </text:span><text:span text:style-name="T135">the</text:span><text:span text:style-name="T153"> </text:span><text:span text:style-name="T144">Gaiety’s</text:span><text:span text:style-name="T157"> </text:span><text:span text:style-name="T138">stage</text:span><text:span text:style-name="T130"> </text:span><text:span text:style-name="T128">are</text:span><text:span text:style-name="T153"> </text:span><text:span text:style-name="T135">the</text:span><text:span text:style-name="T133"> </text:span><text:span text:style-name="T131">burlesque</text:span><text:span text:style-name="T202"> </text:span><text:span text:style-name="T149">adaptations,</text:span><text:span text:style-name="T153"> </text:span><text:span text:style-name="T131">usually</text:span><text:span text:style-name="T143"> </text:span><text:span text:style-name="T128">from</text:span> <text:span text:style-name="T129">the</text:span><text:span text:style-name="T134"> </text:span><text:span text:style-name="T149">French,</text:span><text:span text:style-name="T137"> </text:span><text:span text:style-name="T149">of</text:span><text:span text:style-name="T195"> </text:span><text:span text:style-name="T131">Messrs.</text:span><text:span text:style-name="T125"> </text:span><text:span text:style-name="T131">Burnand</text:span><text:span text:style-name="T125"> </text:span><text:span text:style-name="T128">and</text:span><text:span text:style-name="T142"> </text:span><text:span text:style-name="T149">Byron.</text:span><text:span text:style-name="T212"> </text:span><text:span text:style-name="T147">We</text:span><text:span text:style-name="T133"> </text:span><text:span text:style-name="T135">rember</text:span><text:span text:style-name="T143"> </text:span><text:span text:style-name="T135">not</text:span><text:span text:style-name="T143"> </text:span><text:span text:style-name="T138">long</text:span><text:span text:style-name="T137"> </text:span><text:span text:style-name="T138">since</text:span> <text:span text:style-name="T148">to</text:span><text:span text:style-name="T134"> </text:span><text:span text:style-name="T122">have</text:span><text:span text:style-name="T153"> </text:span><text:span text:style-name="T138">discussed</text:span><text:span text:style-name="T121"> </text:span><text:span text:style-name="T135">the</text:span><text:span text:style-name="T143"> </text:span><text:span text:style-name="T131">merits</text:span><text:span text:style-name="T130"> </text:span><text:span text:style-name="T149">of</text:span><text:span text:style-name="T157"> </text:span><text:span text:style-name="T135">its</text:span><text:span text:style-name="T143"> </text:span><text:span text:style-name="T149">leading</text:span><text:span text:style-name="T137"> </text:span><text:span text:style-name="T138">actress</text:span><text:span text:style-name="T125"> </text:span><text:span text:style-name="T135">with</text:span><text:span text:style-name="T153"> </text:span><text:span text:style-name="T128">one</text:span><text:span text:style-name="T153"> </text:span><text:span text:style-name="T149">of</text:span><text:span text:style-name="T134"> </text:span><text:span text:style-name="T135">the</text:span><text:span text:style-name="T143"> </text:span><text:span text:style-name="T138">offi</text:span><text:span text:style-name="T139">cials</text:span><text:span text:style-name="T125"> </text:span><text:span text:style-name="T149">of</text:span><text:span text:style-name="T193"> </text:span><text:span text:style-name="T138">this</text:span><text:span text:style-name="T125"> </text:span><text:span text:style-name="T149">theatre,</text:span><text:span text:style-name="T213"> </text:span><text:span text:style-name="T128">and</text:span><text:span text:style-name="T127"> </text:span><text:span text:style-name="T128">to</text:span><text:span text:style-name="T153"> </text:span><text:span text:style-name="T140">be</text:span><text:span text:style-name="T143"> </text:span><text:span text:style-name="T131">presumptous</text:span><text:span text:style-name="T193"> </text:span><text:span text:style-name="T131">enough</text:span><text:span text:style-name="T195"> </text:span><text:span text:style-name="T149">toexpress</text:span><text:span text:style-name="T125"> </text:span><text:span text:style-name="T135">the</text:span><text:span text:style-name="T151"> </text:span><text:span text:style-name="T138">opinion</text:span> <text:span text:style-name="T136">that</text:span><text:span text:style-name="T133"> </text:span><text:span text:style-name="T122">she</text:span><text:span text:style-name="T169"> </text:span><text:span text:style-name="T113">was</text:span><text:span text:style-name="T134"> </text:span><text:span text:style-name="T138">vulgar</text:span><text:span text:style-name="T195"> </text:span><text:span text:style-name="T191">in</text:span><text:span text:style-name="T134"> </text:span><text:span text:style-name="T138">speech,</text:span><text:span text:style-name="T142"> </text:span><text:span text:style-name="T149">voice,</text:span><text:span text:style-name="T133"> </text:span><text:span text:style-name="T135">manner</text:span><text:span text:style-name="T125"> </text:span><text:span text:style-name="T128">and</text:span><text:span text:style-name="T143"> </text:span><text:span text:style-name="T149">action.</text:span><text:span text:style-name="T218"> </text:span><text:span text:style-name="T144">‘‘</text:span><text:span text:style-name="T195"> </text:span><text:span text:style-name="T131">Dear</text:span><text:span text:style-name="T133"> </text:span><text:span text:style-name="T144">me,’’</text:span> <text:span text:style-name="T136">said</text:span><text:span text:style-name="T158"> </text:span><text:span text:style-name="T135">the</text:span><text:span text:style-name="T205"> </text:span><text:span text:style-name="T155">official,</text:span><text:span text:style-name="T143"> </text:span><text:span text:style-name="T203">‘‘</text:span><text:span text:style-name="T196"> </text:span><text:span text:style-name="T191">now</text:span><text:span text:style-name="T157"> </text:span><text:span text:style-name="T155">that’s</text:span><text:span text:style-name="T151"> </text:span><text:span text:style-name="T203">strange</text:span><text:span text:style-name="T161"> </text:span>;<text:span text:style-name="T143"> </text:span><text:span text:style-name="T135">it</text:span><text:span text:style-name="T142"> </text:span><text:span text:style-name="T131">happens</text:span><text:span text:style-name="T130"> </text:span><text:span text:style-name="T131">that</text:span><text:span text:style-name="T205"> </text:span><text:span text:style-name="T128">she</text:span><text:span text:style-name="T142"> </text:span><text:span text:style-name="T191">is</text:span><text:span text:style-name="T134"> </text:span><text:span text:style-name="T122">our</text:span><text:span text:style-name="T143"> </text:span><text:span text:style-name="T138">great</text:span> <text:span text:style-name="T150">attraction.</text:span><text:span text:style-name="T219"> </text:span><text:span text:style-name="T135">She</text:span><text:span text:style-name="T153"> </text:span><text:span text:style-name="T149">fills</text:span><text:span text:style-name="T137"> </text:span><text:span text:style-name="T135">the</text:span><text:span text:style-name="T153"> </text:span><text:span text:style-name="T138">boxes,</text:span><text:span text:style-name="T137"> </text:span><text:span text:style-name="T128">and</text:span><text:span text:style-name="T153"> </text:span><text:span text:style-name="T122">she</text:span><text:span text:style-name="T142"> </text:span><text:span text:style-name="T131">packs</text:span><text:span text:style-name="T143"> </text:span><text:span text:style-name="T128">the</text:span><text:span text:style-name="T137"> </text:span><text:span text:style-name="T138">stalls</text:span><text:span text:style-name="T143"> </text:span><text:span text:style-name="T155">nightly.</text:span><text:span text:style-name="T200"> </text:span><text:span text:style-name="T144">Don’t</text:span> <text:span text:style-name="T123">know</text:span><text:span text:style-name="T133"> </text:span><text:span text:style-name="T122">what</text:span><text:span text:style-name="T120"> </text:span><text:span text:style-name="T220">we</text:span><text:span text:style-name="T192"> </text:span><text:span text:style-name="T131">should</text:span><text:span text:style-name="T151"> </text:span><text:span text:style-name="T122">do</text:span><text:span text:style-name="T130"> </text:span><text:span text:style-name="T138">without</text:span><text:span text:style-name="T142"> </text:span><text:span text:style-name="T144">’er.</text:span><text:span text:style-name="T221"> </text:span><text:span text:style-name="T149">Only</text:span><text:span text:style-name="T151"> </text:span><text:span text:style-name="T135">last</text:span><text:span text:style-name="T153"> </text:span><text:span text:style-name="T138">season,</text:span><text:span text:style-name="T137"> </text:span><text:span text:style-name="T135">the</text:span><text:span text:style-name="T153"> </text:span><text:span text:style-name="T149">Honorable</text:span></text:p>
          <text:p text:style-name="P126"><text:span text:style-name="T204">Deuceace</text:span><text:span text:style-name="T151"> </text:span><text:span text:style-name="T203">and</text:span><text:span text:style-name="T120"> </text:span><text:span text:style-name="T203">party</text:span><text:span text:style-name="T137"> </text:span><text:span text:style-name="T203">rented</text:span><text:span text:style-name="T127"> </text:span>a<text:span text:style-name="T127"> </text:span><text:span text:style-name="T203">box</text:span><text:span text:style-name="T169"> </text:span><text:span text:style-name="T203">for</text:span><text:span text:style-name="T120"> </text:span><text:span text:style-name="T203">the</text:span><text:span text:style-name="T125"> </text:span><text:span text:style-name="T203">whole</text:span><text:span text:style-name="T169"> </text:span><text:span text:style-name="T203">season,</text:span><text:span text:style-name="T133"> </text:span><text:span text:style-name="T203">and</text:span><text:span text:style-name="T134"> </text:span><text:span text:style-name="T171">solely</text:span><text:span text:style-name="T137"> </text:span><text:span text:style-name="T203">be-</text:span><text:span text:style-name="T192"> </text:span>|</text:p>
          <text:p text:style-name="P116"><text:span text:style-name="T129">cause</text:span><text:span text:style-name="T153"> </text:span><text:span text:style-name="T135">the</text:span><text:span text:style-name="T121"> </text:span><text:span text:style-name="T131">lady</text:span><text:span text:style-name="T153"> </text:span><text:span text:style-name="T122">you</text:span><text:span text:style-name="T160"> </text:span><text:span text:style-name="T138">mention</text:span><text:span text:style-name="T133"> </text:span><text:span text:style-name="T191">was</text:span><text:span text:style-name="T134"> </text:span><text:span text:style-name="T149">acting</text:span><text:span text:style-name="T192"> </text:span><text:span text:style-name="T135">the</text:span><text:span text:style-name="T143"> </text:span><text:span text:style-name="T149">leading</text:span><text:span text:style-name="T158"> </text:span><text:span text:style-name="T131">ré/e</text:span><text:span text:style-name="T205"> </text:span><text:span text:style-name="T140">in</text:span><text:span text:style-name="T222"> </text:span><text:span text:style-name="T135">the</text:span><text:span text:style-name="T153"> </text:span><text:span text:style-name="T149">piece.</text:span> <text:span text:style-name="T141">We</text:span><text:span text:style-name="T120"> </text:span><text:span text:style-name="T138">might</text:span><text:span text:style-name="T151"> </text:span><text:span text:style-name="T113">as</text:span><text:span text:style-name="T134"> </text:span><text:span text:style-name="T135">well</text:span><text:span text:style-name="T153"> </text:span><text:span text:style-name="T138">close</text:span><text:span text:style-name="T151"> </text:span><text:span text:style-name="T135">the</text:span><text:span text:style-name="T137"> </text:span><text:span text:style-name="T138">theatre</text:span><text:span text:style-name="T213"> </text:span><text:span text:style-name="T149">if</text:span><text:span text:style-name="T213"> </text:span><text:span text:style-name="T122">she</text:span><text:span text:style-name="T134"> </text:span><text:span text:style-name="T147">were</text:span><text:span text:style-name="T223"> </text:span><text:span text:style-name="T122">to</text:span><text:span text:style-name="T125"> </text:span><text:span text:style-name="T203">go.’’</text:span><text:span text:style-name="T224"> </text:span><text:span text:style-name="T138">The</text:span><text:span text:style-name="T143"> </text:span><text:span text:style-name="T149">Honorable</text:span> <text:span text:style-name="T139">Deuceace</text:span><text:span text:style-name="T225"> </text:span><text:span text:style-name="T128">and</text:span><text:span text:style-name="T208"> </text:span><text:span text:style-name="T131">party</text:span><text:span text:style-name="T226"> </text:span><text:span text:style-name="T122">may</text:span><text:span text:style-name="T158"> </text:span><text:span text:style-name="T191">be</text:span><text:span text:style-name="T209"> </text:span><text:span text:style-name="T138">fairly</text:span><text:span text:style-name="T158"> </text:span><text:span text:style-name="T131">said</text:span><text:span text:style-name="T222"> </text:span><text:span text:style-name="T191">to</text:span><text:span text:style-name="T223"> </text:span><text:span text:style-name="T131">represent</text:span><text:span text:style-name="T222"> </text:span><text:span text:style-name="T135">the</text:span><text:span text:style-name="T207"> </text:span><text:span text:style-name="T131">average</text:span> <text:span text:style-name="T132">wealthy</text:span><text:span text:style-name="T133"> </text:span><text:span text:style-name="T131">patron</text:span><text:span text:style-name="T143"> </text:span><text:span text:style-name="T149">of</text:span><text:span text:style-name="T133"> </text:span><text:span text:style-name="T138">dramatic</text:span><text:span text:style-name="T120"> </text:span><text:span text:style-name="T135">art</text:span><text:span text:style-name="T202"> </text:span><text:span text:style-name="T113">in</text:span><text:span text:style-name="T209"> </text:span><text:span text:style-name="T155">England.</text:span> <text:span text:style-name="T132">friends</text:span><text:span text:style-name="T192"> </text:span><text:span text:style-name="T122">are</text:span><text:span text:style-name="T202"> </text:span><text:span text:style-name="T149">entertained</text:span><text:span text:style-name="T133"> </text:span><text:span text:style-name="T135">with</text:span><text:span text:style-name="T159"> </text:span>a<text:span text:style-name="T155"> </text:span><text:span text:style-name="T149">spirited</text:span><text:span text:style-name="T192"> </text:span><text:span text:style-name="T128">show</text:span><text:span text:style-name="T142"> </text:span><text:span text:style-name="T138">of</text:span><text:span text:style-name="T120"> </text:span><text:span text:style-name="T155">tights,</text:span><text:span text:style-name="T130"> </text:span><text:span text:style-name="T149">skirts,</text:span><text:span text:style-name="T133"> </text:span><text:span text:style-name="T138">spangles</text:span> <text:span text:style-name="T148">and</text:span><text:span text:style-name="T157"> </text:span><text:span text:style-name="T138">busts,</text:span><text:span text:style-name="T169"> </text:span><text:span text:style-name="T131">it</text:span><text:span text:style-name="T153"> </text:span><text:span text:style-name="T131">matters</text:span><text:span text:style-name="T130"> </text:span><text:span text:style-name="T155">little</text:span><text:span text:style-name="T157"> </text:span><text:span text:style-name="T131">that</text:span><text:span text:style-name="T192"> </text:span><text:span text:style-name="T128">the</text:span><text:span text:style-name="T153"> </text:span><text:span text:style-name="T138">play</text:span><text:span text:style-name="T143"> </text:span><text:span text:style-name="T155">itself</text:span><text:span text:style-name="T142"> </text:span><text:span text:style-name="T113">be</text:span><text:span text:style-name="T157"> </text:span><text:span text:style-name="T138">bad,</text:span><text:span text:style-name="T153"> </text:span><text:span text:style-name="T191">or</text:span><text:span text:style-name="T216"> </text:span><text:span text:style-name="T131">its</text:span><text:span text:style-name="T216"> </text:span><text:span text:style-name="T149">incidents</text:span> <text:span text:style-name="T129">such</text:span><text:span text:style-name="T142"> </text:span><text:span text:style-name="T140">as</text:span><text:span text:style-name="T207"> </text:span><text:span text:style-name="T122">to</text:span><text:span text:style-name="T169"> </text:span><text:span text:style-name="T138">provoke</text:span><text:span text:style-name="T143"> </text:span><text:span text:style-name="T135">the</text:span><text:span text:style-name="T158"> </text:span><text:span text:style-name="T138">animosity</text:span><text:span text:style-name="T130"> </text:span><text:span text:style-name="T138">of</text:span><text:span text:style-name="T169"> </text:span><text:span text:style-name="T135">most</text:span><text:span text:style-name="T153"> </text:span><text:span text:style-name="T138">pure-minded</text:span><text:span text:style-name="T192"> </text:span><text:span text:style-name="T138">people.</text:span><text:span text:style-name="T227"> </text:span><text:span text:style-name="T131">With</text:span> <text:span text:style-name="T108">a</text:span><text:span text:style-name="T144"> </text:span><text:span text:style-name="T113">few</text:span><text:span text:style-name="T160"> </text:span><text:span text:style-name="T149">exceptions,</text:span><text:span text:style-name="T153"> </text:span><text:span text:style-name="T128">the</text:span><text:span text:style-name="T153"> </text:span><text:span text:style-name="T149">first-night</text:span><text:span text:style-name="T205"> </text:span><text:span text:style-name="T138">occupants</text:span><text:span text:style-name="T137"> </text:span><text:span text:style-name="T149">of</text:span><text:span text:style-name="T169"> </text:span><text:span text:style-name="T135">the</text:span><text:span text:style-name="T153"> </text:span><text:span text:style-name="T131">boxes</text:span><text:span text:style-name="T159"> </text:span><text:span text:style-name="T138">exercise</text:span><text:span text:style-name="T133"> </text:span><text:span text:style-name="T128">but</text:span><text:span text:style-name="T153"> </text:span>a <text:span text:style-name="T136">remote</text:span><text:span text:style-name="T153"> </text:span><text:span text:style-name="T138">influence</text:span><text:span text:style-name="T130"> </text:span><text:span text:style-name="T113">on</text:span><text:span text:style-name="T205"> </text:span><text:span text:style-name="T135">the</text:span><text:span text:style-name="T153"> </text:span><text:span text:style-name="T138">fortunes</text:span><text:span text:style-name="T125"> </text:span><text:span text:style-name="T122">of</text:span><text:span text:style-name="T158"> </text:span>a<text:span text:style-name="T144"> </text:span><text:span text:style-name="T113">new</text:span><text:span text:style-name="T157"> </text:span><text:span text:style-name="T131">play</text:span><text:span text:style-name="T143"> </text:span><text:span text:style-name="T140">in</text:span><text:span text:style-name="T192"> </text:span><text:span text:style-name="T149">London.</text:span></text:p>
          <text:p text:style-name="P121"><text:span text:style-name="T150">This</text:span><text:span text:style-name="T142"> </text:span><text:span text:style-name="T128">can</text:span><text:span text:style-name="T121"> </text:span><text:span text:style-name="T138">hardly</text:span><text:span text:style-name="T121"> </text:span><text:span text:style-name="T140">be</text:span><text:span text:style-name="T223"> </text:span><text:span text:style-name="T149">said,</text:span><text:span text:style-name="T142"> </text:span><text:span text:style-name="T138">however,</text:span><text:span text:style-name="T153"> </text:span><text:span text:style-name="T138">of</text:span><text:span text:style-name="T133"> </text:span><text:span text:style-name="T138">their</text:span><text:span text:style-name="T192"> </text:span><text:span text:style-name="T128">near</text:span><text:span text:style-name="T202"> </text:span><text:span text:style-name="T138">neighbors</text:span><text:span text:style-name="T159"> </text:span><text:span text:style-name="T149">of</text:span><text:span text:style-name="T169"> </text:span><text:span text:style-name="T135">the</text:span> <text:span text:style-name="T204">States</text:span><text:span text:style-name="T206"> </text:span>;<text:span text:style-name="T151"> </text:span><text:span text:style-name="T131">though</text:span><text:span text:style-name="T142"> </text:span><text:span text:style-name="T228">we</text:span><text:span text:style-name="T158"> </text:span><text:span text:style-name="T135">have</text:span><text:span text:style-name="T153"> </text:span><text:span text:style-name="T135">heard</text:span><text:span text:style-name="T142"> </text:span><text:span text:style-name="T135">it</text:span><text:span text:style-name="T158"> </text:span><text:span text:style-name="T131">remarked</text:span><text:span text:style-name="T143"> </text:span><text:span text:style-name="T122">by</text:span><text:span text:style-name="T169"> </text:span>a<text:span text:style-name="T144"> </text:span><text:span text:style-name="T149">leading</text:span><text:span text:style-name="T143"> </text:span><text:span text:style-name="T149">English</text:span><text:span text:style-name="T125"> </text:span><text:span text:style-name="T138">come</text:span><text:span text:style-name="T136">dian</text:span><text:span text:style-name="T169"> </text:span><text:span text:style-name="T131">that</text:span><text:span text:style-name="T133"> </text:span>a<text:span text:style-name="T203"> </text:span><text:span text:style-name="T135">press</text:span><text:span text:style-name="T159"> </text:span><text:span text:style-name="T149">criticism</text:span><text:span text:style-name="T137"> </text:span><text:span text:style-name="T149">of</text:span><text:span text:style-name="T169"> </text:span>a<text:span text:style-name="T137"> </text:span><text:span text:style-name="T113">new</text:span><text:span text:style-name="T121"> </text:span><text:span text:style-name="T131">play</text:span><text:span text:style-name="T133"> </text:span><text:span text:style-name="T128">can</text:span><text:span text:style-name="T169"> </text:span><text:span text:style-name="T138">neither</text:span><text:span text:style-name="T125"> </text:span><text:span text:style-name="T128">make</text:span><text:span text:style-name="T153"> </text:span><text:span text:style-name="T128">nor</text:span><text:span text:style-name="T143"> </text:span><text:span text:style-name="T147">mar</text:span><text:span text:style-name="T143"> </text:span><text:span text:style-name="T149">it.</text:span> <text:span text:style-name="T132">Whether</text:span><text:span text:style-name="T213"> </text:span><text:span text:style-name="T135">the</text:span><text:span text:style-name="T127"> </text:span><text:span text:style-name="T155">critic</text:span><text:span text:style-name="T213"> </text:span><text:span text:style-name="T140">be</text:span><text:span text:style-name="T125"> </text:span><text:span text:style-name="T149">hostile</text:span><text:span text:style-name="T193"> </text:span><text:span text:style-name="T191">or</text:span><text:span text:style-name="T125"> </text:span><text:span text:style-name="T155">friendly,</text:span><text:span text:style-name="T196"> </text:span><text:span text:style-name="T135">the</text:span><text:span text:style-name="T151"> </text:span><text:span text:style-name="T138">public</text:span><text:span text:style-name="T195"> </text:span><text:span text:style-name="T191">is</text:span><text:span text:style-name="T130"> </text:span><text:span text:style-name="T135">not</text:span><text:span text:style-name="T195"> </text:span><text:span text:style-name="T149">ordinarily</text:span><text:span text:style-name="T213"> </text:span><text:span text:style-name="T135">led</text:span><text:span text:style-name="T151"> </text:span><text:span text:style-name="T191">by</text:span></text:p>
          <text:p text:style-name="P128"><text:span text:style-name="T108">|</text:span><text:span text:style-name="T149"> </text:span><text:span text:style-name="T109">**</text:span><text:span text:style-name="T209"> </text:span><text:span text:style-name="T203">Nay’’</text:span><text:span text:style-name="T130"> </text:span><text:span text:style-name="T122">upon</text:span><text:span text:style-name="T169"> </text:span><text:span text:style-name="T128">the</text:span><text:span text:style-name="T143"> </text:span><text:span text:style-name="T135">fate</text:span><text:span text:style-name="T133"> </text:span><text:span text:style-name="T138">of</text:span><text:span text:style-name="T153"> </text:span><text:span text:style-name="T122">the</text:span><text:span text:style-name="T142"> </text:span><text:span text:style-name="T149">English</text:span><text:span text:style-name="T134"> </text:span><text:span text:style-name="T138">dramatist.</text:span></text:p>
          <text:p text:style-name="P138"><text:span text:style-name="T194">So</text:span><text:span text:style-name="T134"> </text:span><text:span text:style-name="T196">long</text:span><text:span text:style-name="T153"> </text:span><text:span text:style-name="T203">as</text:span><text:span text:style-name="T159"> </text:span><text:span text:style-name="T203">he</text:span><text:span text:style-name="T157"> </text:span><text:span text:style-name="T199">and</text:span><text:span text:style-name="T157"> </text:span><text:span text:style-name="T203">his</text:span><text:span text:style-name="T159"> </text:span>|</text:p>
          <text:p text:style-name="P139"><text:span text:style-name="T136">THE</text:span><text:span text:style-name="T143"> </text:span><text:span text:style-name="T138">AMERICAN.</text:span></text:p>
          <text:p text:style-name="P107"><text:span text:style-name="T108">'</text:span><text:span text:style-name="T169"> </text:span><text:span text:style-name="T203">bestowed</text:span><text:span text:style-name="T137"> </text:span><text:span text:style-name="T155">on</text:span><text:span text:style-name="T192"> </text:span><text:span text:style-name="T144">it</text:span><text:span text:style-name="T158"> </text:span><text:span text:style-name="T203">by</text:span><text:span text:style-name="T157"> </text:span><text:span text:style-name="T203">the</text:span><text:span text:style-name="T169"> </text:span><text:span text:style-name="T203">critics.</text:span></text:p>
          <text:p text:style-name="P110">103</text:p>
          <text:p text:style-name="P130"><text:span text:style-name="T123">to</text:span><text:span text:style-name="T142"> </text:span><text:span text:style-name="T113">be</text:span><text:span text:style-name="T134"> </text:span><text:span text:style-name="T138">acted</text:span><text:span text:style-name="T121"> </text:span><text:span text:style-name="T135">years</text:span><text:span text:style-name="T120"> </text:span><text:span text:style-name="T135">ago</text:span><text:span text:style-name="T202"> </text:span><text:span text:style-name="T140">as</text:span><text:span text:style-name="T202"> </text:span><text:span text:style-name="T210">an</text:span><text:span text:style-name="T120"> </text:span><text:span text:style-name="T149">after-piece</text:span><text:span text:style-name="T137"> </text:span><text:span text:style-name="T147">at</text:span><text:span text:style-name="T169"> </text:span><text:span text:style-name="T128">most</text:span><text:span text:style-name="T153"> </text:span><text:span text:style-name="T138">London</text:span><text:span text:style-name="T151"> </text:span><text:span text:style-name="T131">theatres</text:span><text:span text:style-name="T151"> </text:span>;<text:span text:style-name="T130"> </text:span><text:span text:style-name="T122">and</text:span> <text:span text:style-name="T136">yet</text:span><text:span text:style-name="T158"> </text:span><text:span text:style-name="T220">we</text:span><text:span text:style-name="T192"> </text:span><text:span text:style-name="T135">find</text:span><text:span text:style-name="T192"> </text:span><text:span text:style-name="T155">Mr.</text:span><text:span text:style-name="T209"> </text:span><text:span text:style-name="T149">Irving</text:span><text:span text:style-name="T216"> </text:span><text:span text:style-name="T113">now</text:span><text:span text:style-name="T217"> </text:span><text:span text:style-name="T138">presenting</text:span><text:span text:style-name="T216"> </text:span><text:span text:style-name="T135">it</text:span><text:span text:style-name="T202"> </text:span><text:span text:style-name="T113">as</text:span><text:span text:style-name="T160"> </text:span><text:span text:style-name="T135">his</text:span><text:span text:style-name="T130"> </text:span><text:span text:style-name="T128">préce</text:span><text:span text:style-name="T130"> </text:span><text:span text:style-name="T210">de</text:span><text:span text:style-name="T169"> </text:span><text:span text:style-name="T131">resistance,</text:span> <text:span text:style-name="T150">nightly</text:span><text:span text:style-name="T137"> </text:span><text:span text:style-name="T122">and</text:span><text:span text:style-name="T130"> </text:span><text:span text:style-name="T128">to</text:span><text:span text:style-name="T137"> </text:span><text:span text:style-name="T131">crowded</text:span><text:span text:style-name="T130"> </text:span><text:span text:style-name="T138">audiences,</text:span><text:span text:style-name="T143"> </text:span><text:span text:style-name="T113">in</text:span><text:span text:style-name="T120"> </text:span><text:span text:style-name="T135">face</text:span><text:span text:style-name="T125"> </text:span><text:span text:style-name="T155">of</text:span><text:span text:style-name="T137"> </text:span><text:span text:style-name="T128">the</text:span><text:span text:style-name="T143"> </text:span><text:span text:style-name="T138">faintest</text:span><text:span text:style-name="T130"> </text:span><text:span text:style-name="T138">possible</text:span><text:span text:style-name="T130"> </text:span><text:span text:style-name="T135">praise</text:span> <text:span text:style-name="T150">But</text:span><text:span text:style-name="T205"> </text:span><text:span text:style-name="T128">for</text:span><text:span text:style-name="T120"> </text:span><text:span text:style-name="T131">all</text:span><text:span text:style-name="T121"> </text:span><text:span text:style-name="T131">this</text:span><text:span text:style-name="T153"> </text:span><text:span text:style-name="T131">these</text:span><text:span text:style-name="T137"> </text:span><text:span text:style-name="T131">gentlemen</text:span><text:span text:style-name="T125"> </text:span><text:span text:style-name="T147">are</text:span> <text:span text:style-name="T132">personages</text:span><text:span text:style-name="T137"> </text:span><text:span text:style-name="T149">of</text:span><text:span text:style-name="T169"> </text:span><text:span text:style-name="T138">note,</text:span><text:span text:style-name="T133"> </text:span><text:span text:style-name="T122">and</text:span><text:span text:style-name="T121"> </text:span><text:span text:style-name="T131">represent</text:span><text:span text:style-name="T159"> </text:span>a<text:span text:style-name="T195"> </text:span><text:span text:style-name="T128">not</text:span><text:span text:style-name="T159"> </text:span><text:span text:style-name="T138">unimposing</text:span><text:span text:style-name="T120"> </text:span><text:span text:style-name="T135">array</text:span><text:span text:style-name="T133"> </text:span><text:span text:style-name="T155">of</text:span><text:span text:style-name="T143"> </text:span><text:span text:style-name="T138">literary</text:span> <text:span text:style-name="T139">talent</text:span><text:span text:style-name="T133"> </text:span><text:span text:style-name="T118">in</text:span><text:span text:style-name="T202"> </text:span><text:span text:style-name="T135">the</text:span><text:span text:style-name="T125"> </text:span><text:span text:style-name="T138">stalls</text:span><text:span text:style-name="T137"> </text:span><text:span text:style-name="T210">on</text:span><text:span text:style-name="T205"> </text:span><text:span text:style-name="T149">first-night</text:span><text:span text:style-name="T127"> </text:span><text:span text:style-name="T138">occasions.</text:span><text:span text:style-name="T212"> </text:span><text:span text:style-name="T149">Leading</text:span><text:span text:style-name="T137"> </text:span><text:span text:style-name="T128">the</text:span><text:span text:style-name="T143"> </text:span><text:span text:style-name="T149">confraternity,</text:span> <text:span text:style-name="T229">we</text:span><text:span text:style-name="T121"> </text:span><text:span text:style-name="T131">should</text:span><text:span text:style-name="T137"> </text:span><text:span text:style-name="T113">be</text:span><text:span text:style-name="T134"> </text:span><text:span text:style-name="T131">disposed</text:span><text:span text:style-name="T143"> </text:span><text:span text:style-name="T128">to</text:span><text:span text:style-name="T143"> </text:span><text:span text:style-name="T131">place</text:span><text:span text:style-name="T171"> </text:span><text:span text:style-name="T155">Mr.</text:span><text:span text:style-name="T125"> </text:span><text:span text:style-name="T138">Dutton</text:span><text:span text:style-name="T133"> </text:span><text:span text:style-name="T155">Cook,</text:span><text:span text:style-name="T213"> </text:span><text:span text:style-name="T138">of</text:span><text:span text:style-name="T133"> </text:span><text:span text:style-name="T155">Mr.</text:span><text:span text:style-name="T120"> </text:span><text:span text:style-name="T144">Yates’s</text:span><text:span text:style-name="T195"> </text:span><text:span text:style-name="T138">paper,</text:span> <text:span text:style-name="T123">The</text:span><text:span text:style-name="T158"> </text:span><text:span text:style-name="T131">World,</text:span><text:span text:style-name="T195"> </text:span><text:span text:style-name="T122">and</text:span><text:span text:style-name="T143"> </text:span><text:span text:style-name="T131">beside</text:span><text:span text:style-name="T130"> </text:span><text:span text:style-name="T147">him</text:span><text:span text:style-name="T142"> </text:span><text:span text:style-name="T135">would</text:span><text:span text:style-name="T137"> </text:span><text:span text:style-name="T128">rank</text:span><text:span text:style-name="T125"> </text:span><text:span text:style-name="T155">Mr.</text:span><text:span text:style-name="T137"> </text:span><text:span text:style-name="T135">Moy</text:span><text:span text:style-name="T213"> </text:span><text:span text:style-name="T138">Thomas,</text:span><text:span text:style-name="T195"> </text:span><text:span text:style-name="T122">whose</text:span><text:span text:style-name="T127"> </text:span><text:span text:style-name="T135">weekly</text:span> <text:span text:style-name="T136">notes</text:span><text:span text:style-name="T130"> </text:span><text:span text:style-name="T140">on</text:span><text:span text:style-name="T158"> </text:span><text:span text:style-name="T138">‘“The</text:span><text:span text:style-name="T130"> </text:span><text:span text:style-name="T155">Theatres,’’</text:span><text:span text:style-name="T133"> </text:span><text:span text:style-name="T113">in</text:span><text:span text:style-name="T169"> </text:span><text:span text:style-name="T128">the</text:span><text:span text:style-name="T127"> </text:span><text:span text:style-name="T149">Dazly</text:span><text:span text:style-name="T199"> </text:span><text:span text:style-name="T144">Vews,</text:span><text:span text:style-name="T151"> </text:span><text:span text:style-name="T122">form</text:span><text:span text:style-name="T142"> </text:span><text:span text:style-name="T128">one</text:span><text:span text:style-name="T133"> </text:span><text:span text:style-name="T138">of</text:span><text:span text:style-name="T195"> </text:span><text:span text:style-name="T128">the</text:span><text:span text:style-name="T133"> </text:span><text:span text:style-name="T138">pleasant</text:span><text:span text:style-name="T129">est</text:span><text:span text:style-name="T153"> </text:span><text:span text:style-name="T131">features</text:span><text:span text:style-name="T125"> </text:span><text:span text:style-name="T149">of</text:span><text:span text:style-name="T193"> </text:span><text:span text:style-name="T135">that</text:span><text:span text:style-name="T137"> </text:span><text:span text:style-name="T138">journal.</text:span><text:span text:style-name="T215"> </text:span><text:span text:style-name="T138">The</text:span><text:span text:style-name="T125"> </text:span><text:span text:style-name="T149">kindly</text:span><text:span text:style-name="T137"> </text:span><text:span text:style-name="T135">face</text:span><text:span text:style-name="T130"> </text:span><text:span text:style-name="T138">of</text:span><text:span text:style-name="T195"> </text:span><text:span text:style-name="T149">Mr.</text:span><text:span text:style-name="T137"> </text:span><text:span text:style-name="T144">E.</text:span><text:span text:style-name="T143"> </text:span><text:span text:style-name="T149">L.</text:span><text:span text:style-name="T142"> </text:span><text:span text:style-name="T138">Blanchard</text:span><text:span text:style-name="T130"> </text:span><text:span text:style-name="T122">is</text:span></text:p>
          <text:p text:style-name="P133"><text:span text:style-name="T108">_</text:span><text:span text:style-name="T144"> </text:span><text:span text:style-name="T131">rarely</text:span><text:span text:style-name="T125"> </text:span><text:span text:style-name="T131">absent</text:span><text:span text:style-name="T130"> </text:span><text:span text:style-name="T191">at</text:span><text:span text:style-name="T134"> </text:span><text:span text:style-name="T135">the</text:span><text:span text:style-name="T143"> </text:span><text:span text:style-name="T149">initiation</text:span><text:span text:style-name="T195"> </text:span><text:span text:style-name="T207">of</text:span><text:span text:style-name="T106"> </text:span>a<text:span text:style-name="T135"> </text:span><text:span text:style-name="T113">new</text:span><text:span text:style-name="T134"> </text:span><text:span text:style-name="T131">play</text:span><text:span text:style-name="T143"> </text:span><text:span text:style-name="T140">in</text:span><text:span text:style-name="T205"> </text:span><text:span text:style-name="T149">London,</text:span><text:span text:style-name="T130"> </text:span><text:span text:style-name="T122">and</text:span><text:span text:style-name="T169"> </text:span><text:span text:style-name="T140">in</text:span><text:span text:style-name="T120"> </text:span><text:span text:style-name="T138">fit</text:span><text:span text:style-name="T127"> </text:span><text:span text:style-name="T131">com-</text:span></text:p>
          <text:p text:style-name="P140"><text:span text:style-name="T108">|</text:span><text:span text:style-name="T122"> art</text:span><text:span text:style-name="T142"> </text:span><text:span text:style-name="T138">entitle</text:span><text:span text:style-name="T125"> </text:span><text:span text:style-name="T122">them</text:span><text:span text:style-name="T142"> </text:span><text:span text:style-name="T147">to</text:span><text:span text:style-name="T125"> </text:span><text:span text:style-name="T147">ask</text:span><text:span text:style-name="T169"> </text:span><text:span text:style-name="T122">the</text:span><text:span text:style-name="T153"> </text:span><text:span text:style-name="T138">indulgence</text:span><text:span text:style-name="T130"> </text:span><text:span text:style-name="T135">of</text:span><text:span text:style-name="T203"> </text:span>a<text:span text:style-name="T130"> </text:span><text:span text:style-name="T131">seat.</text:span></text:p>
          <text:p text:style-name="P129"><text:span text:style-name="T139">panionship</text:span><text:span text:style-name="T205"> </text:span><text:span text:style-name="T135">with</text:span><text:span text:style-name="T120"> </text:span><text:span text:style-name="T147">him</text:span><text:span text:style-name="T158"> </text:span><text:span text:style-name="T131">usually</text:span><text:span text:style-name="T192"> </text:span><text:span text:style-name="T131">sits</text:span><text:span text:style-name="T158"> </text:span><text:span text:style-name="T128">his</text:span><text:span text:style-name="T192"> </text:span><text:span text:style-name="T149">long-time</text:span><text:span text:style-name="T127"> </text:span><text:span text:style-name="T138">colleague</text:span><text:span text:style-name="T137"> </text:span><text:span text:style-name="T138">of</text:span><text:span text:style-name="T193"> </text:span><text:span text:style-name="T128">the</text:span><text:span text:style-name="T151"> </text:span><text:span text:style-name="T149">Daz/y</text:span> <text:span text:style-name="T139">Telegraph,</text:span><text:span text:style-name="T142"> </text:span><text:span text:style-name="T149">Mr.</text:span><text:span text:style-name="T153"> </text:span><text:span text:style-name="T138">Sala.</text:span><text:span text:style-name="T215"> </text:span><text:span text:style-name="T128">‘The</text:span><text:span text:style-name="T192"> </text:span><text:span text:style-name="T138">stalls</text:span><text:span text:style-name="T120"> </text:span><text:span text:style-name="T131">of</text:span><text:span text:style-name="T216"> </text:span>a<text:span text:style-name="T203"> </text:span><text:span text:style-name="T131">London</text:span><text:span text:style-name="T205"> </text:span><text:span text:style-name="T131">theatre</text:span><text:span text:style-name="T157"> </text:span><text:span text:style-name="T147">at</text:span><text:span text:style-name="T158"> </text:span><text:span text:style-name="T131">first</text:span><text:span text:style-name="T169"> </text:span><text:span text:style-name="T138">perfor</text:span><text:span text:style-name="T136">mances</text:span><text:span text:style-name="T130"> </text:span><text:span text:style-name="T122">form</text:span><text:span text:style-name="T192"> </text:span>a<text:span text:style-name="T213"> </text:span><text:span text:style-name="T131">sort</text:span><text:span text:style-name="T120"> </text:span><text:span text:style-name="T138">of</text:span><text:span text:style-name="T143"> </text:span><text:span text:style-name="T138">literary</text:span><text:span text:style-name="T169"> </text:span><text:span text:style-name="T122">and</text:span><text:span text:style-name="T192"> </text:span><text:span text:style-name="T128">art</text:span><text:span text:style-name="T159"> </text:span><text:span text:style-name="T138">club,</text:span><text:span text:style-name="T153"> </text:span><text:span text:style-name="T122">from</text:span><text:span text:style-name="T142"> </text:span><text:span text:style-name="T128">which</text:span><text:span text:style-name="T205"> </text:span><text:span text:style-name="T135">none</text:span><text:span text:style-name="T125"> </text:span><text:span text:style-name="T122">are</text:span><text:span text:style-name="T133"> </text:span><text:span text:style-name="T131">ex</text:span><text:span text:style-name="T132">cluded</text:span><text:span text:style-name="T130"> </text:span><text:span text:style-name="T191">who</text:span><text:span text:style-name="T134"> </text:span><text:span text:style-name="T128">have</text:span><text:span text:style-name="T143"> </text:span><text:span text:style-name="T128">the</text:span><text:span text:style-name="T133"> </text:span><text:span text:style-name="T149">slightest</text:span><text:span text:style-name="T125"> </text:span><text:span text:style-name="T131">pretensions</text:span><text:span text:style-name="T130"> </text:span><text:span text:style-name="T122">to</text:span><text:span text:style-name="T169"> </text:span><text:span text:style-name="T122">the</text:span><text:span text:style-name="T153"> </text:span><text:span text:style-name="T138">courtesy</text:span><text:span text:style-name="T125"> </text:span><text:span text:style-name="T138">of</text:span><text:span text:style-name="T133"> </text:span><text:span text:style-name="T138">admission.</text:span> <text:span text:style-name="T150">Indeed,</text:span><text:span text:style-name="T151"> </text:span><text:span text:style-name="T135">it</text:span><text:span text:style-name="T137"> </text:span><text:span text:style-name="T122">must</text:span><text:span text:style-name="T153"> </text:span><text:span text:style-name="T113">be</text:span><text:span text:style-name="T169"> </text:span>a<text:span text:style-name="T149"> </text:span><text:span text:style-name="T135">severe</text:span><text:span text:style-name="T125"> </text:span><text:span text:style-name="T131">strain</text:span><text:span text:style-name="T143"> </text:span><text:span text:style-name="T210">on</text:span><text:span text:style-name="T205"> </text:span><text:span text:style-name="T128">the</text:span><text:span text:style-name="T143"> </text:span><text:span text:style-name="T135">management</text:span><text:span text:style-name="T143"> </text:span><text:span text:style-name="T128">to</text:span><text:span text:style-name="T133"> </text:span><text:span text:style-name="T138">accomodate</text:span><text:span text:style-name="T199"> </text:span><text:span text:style-name="T140">on</text:span> <text:span text:style-name="T136">these</text:span><text:span text:style-name="T133"> </text:span><text:span text:style-name="T138">occasions</text:span><text:span text:style-name="T127"> </text:span><text:span text:style-name="T131">ali</text:span><text:span text:style-name="T127"> </text:span><text:span text:style-name="T122">the</text:span><text:span text:style-name="T125"> </text:span><text:span text:style-name="T131">gentlemen</text:span><text:span text:style-name="T133"> </text:span><text:span text:style-name="T122">whose</text:span><text:span text:style-name="T143"> </text:span><text:span text:style-name="T138">connection</text:span><text:span text:style-name="T192"> </text:span><text:span text:style-name="T135">with</text:span><text:span text:style-name="T120"> </text:span><text:span text:style-name="T138">literature</text:span><text:span text:style-name="T169"> </text:span><text:span text:style-name="T122">and</text:span> <text:span text:style-name="T150">Setting</text:span><text:span text:style-name="T134"> </text:span><text:span text:style-name="T131">aside</text:span><text:span text:style-name="T133"> </text:span><text:span text:style-name="T128">the</text:span><text:span text:style-name="T133"> </text:span><text:span text:style-name="T138">ac-</text:span></text:p>
          <text:p text:style-name="P145"><text:span text:style-name="T108">|</text:span><text:span text:style-name="T128"> </text:span><text:span text:style-name="T131">credited</text:span><text:span text:style-name="T130"> </text:span><text:span text:style-name="T131">representatives</text:span><text:span text:style-name="T151"> </text:span><text:span text:style-name="T135">of</text:span><text:span text:style-name="T213"> </text:span><text:span text:style-name="T147">the</text:span><text:span text:style-name="T142"> </text:span><text:span text:style-name="T135">London</text:span><text:span text:style-name="T130"> </text:span><text:span text:style-name="T191">and</text:span><text:span text:style-name="T134"> </text:span><text:span text:style-name="T131">leading</text:span><text:span text:style-name="T151"> </text:span><text:span text:style-name="T131">provincial</text:span><text:span text:style-name="T120"> </text:span><text:span text:style-name="T131">journals,</text:span></text:p>
          <text:p text:style-name="P117"><text:span text:style-name="T132">there</text:span><text:span text:style-name="T130"> </text:span><text:span text:style-name="T147">is</text:span><text:span text:style-name="T142"> </text:span>a<text:span text:style-name="T144"> </text:span><text:span text:style-name="T135">very</text:span><text:span text:style-name="T133"> </text:span><text:span text:style-name="T138">large</text:span><text:span text:style-name="T125"> </text:span><text:span text:style-name="T138">number,</text:span><text:span text:style-name="T130"> </text:span><text:span text:style-name="T191">so</text:span><text:span text:style-name="T134"> </text:span><text:span text:style-name="T128">to</text:span><text:span text:style-name="T130"> </text:span><text:span text:style-name="T138">speak,</text:span><text:span text:style-name="T153"> </text:span><text:span text:style-name="T138">of</text:span><text:span text:style-name="T143"> </text:span><text:span text:style-name="T138">outsiders</text:span><text:span text:style-name="T127"> </text:span><text:span text:style-name="T128">whose</text:span><text:span text:style-name="T134"> </text:span><text:span text:style-name="T138">claims</text:span><text:span text:style-name="T127"> </text:span><text:span text:style-name="T131">the</text:span> <text:span text:style-name="T132">management</text:span><text:span text:style-name="T130"> </text:span><text:span text:style-name="T138">cannot</text:span><text:span text:style-name="T130"> </text:span><text:span text:style-name="T131">well</text:span><text:span text:style-name="T133"> </text:span><text:span text:style-name="T131">afford</text:span><text:span text:style-name="T143"> </text:span><text:span text:style-name="T128">to</text:span><text:span text:style-name="T153"> </text:span><text:span text:style-name="T149">ignore.</text:span><text:span text:style-name="T215"> </text:span><text:span text:style-name="T135">‘Thus</text:span><text:span text:style-name="T133"> </text:span><text:span text:style-name="T135">most</text:span><text:span text:style-name="T121"> </text:span><text:span text:style-name="T131">of</text:span><text:span text:style-name="T153"> </text:span><text:span text:style-name="T135">the</text:span><text:span text:style-name="T130"> </text:span><text:span text:style-name="T138">working</text:span></text:p>
          <text:p text:style-name="P141"><text:span text:style-name="T108">'</text:span><text:span text:style-name="T137"> </text:span><text:span text:style-name="T122">members</text:span><text:span text:style-name="T205"> </text:span><text:span text:style-name="T131">of</text:span><text:span text:style-name="T134"> </text:span><text:span text:style-name="T131">The</text:span><text:span text:style-name="T192"> </text:span><text:span text:style-name="T131">Dramatic</text:span><text:span text:style-name="T202"> </text:span><text:span text:style-name="T138">Authors’</text:span><text:span text:style-name="T142"> </text:span><text:span text:style-name="T138">Society</text:span><text:span text:style-name="T142"> </text:span><text:span text:style-name="T135">will</text:span><text:span text:style-name="T216"> </text:span><text:span text:style-name="T122">have</text:span><text:span text:style-name="T169"> </text:span><text:span text:style-name="T147">to</text:span><text:span text:style-name="T169"> </text:span><text:span text:style-name="T210">be</text:span><text:span text:style-name="T157"> </text:span><text:span text:style-name="T131">provided</text:span></text:p>
          <text:p text:style-name="P124"><text:span text:style-name="T194">The</text:span><text:span text:style-name="T213"> </text:span><text:span text:style-name="T203">first</text:span><text:span text:style-name="T120"> </text:span><text:span text:style-name="T203">find</text:span><text:span text:style-name="T158"> </text:span><text:span text:style-name="T171">their</text:span><text:span text:style-name="T151"> </text:span><text:span text:style-name="T199">way,</text:span><text:span text:style-name="T137"> </text:span><text:span text:style-name="T127">asa</text:span><text:span text:style-name="T143"> </text:span>|</text:p>
          <text:p text:style-name="P118"><text:span text:style-name="T129">for</text:span><text:span text:style-name="T157"> </text:span>;<text:span text:style-name="T128"> and</text:span><text:span text:style-name="T142"> </text:span><text:span text:style-name="T138">doubtless</text:span><text:span text:style-name="T196"> </text:span>a<text:span text:style-name="T131"> </text:span><text:span text:style-name="T149">goodly</text:span><text:span text:style-name="T199"> </text:span><text:span text:style-name="T138">deputation</text:span><text:span text:style-name="T143"> </text:span><text:span text:style-name="T128">from</text:span><text:span text:style-name="T153"> </text:span><text:span text:style-name="T135">such</text:span><text:span text:style-name="T195"> </text:span><text:span text:style-name="T138">clubs</text:span><text:span text:style-name="T193"> </text:span><text:span text:style-name="T113">as</text:span><text:span text:style-name="T143"> </text:span><text:span text:style-name="T135">the</text:span><text:span text:style-name="T125"> </text:span><text:span text:style-name="T203">‘‘</text:span><text:span text:style-name="T199"> </text:span><text:span text:style-name="T155">Garrick,</text:span> <text:span text:style-name="T141">‘*</text:span><text:span text:style-name="T153"> </text:span><text:span text:style-name="T203">Arts,’’</text:span><text:span text:style-name="T125"> </text:span><text:span text:style-name="T122">and</text:span><text:span text:style-name="T120"> </text:span><text:span text:style-name="T203">‘‘</text:span><text:span text:style-name="T171"> </text:span><text:span text:style-name="T155">Savage,’’</text:span><text:span text:style-name="T133"> </text:span><text:span text:style-name="T131">submit</text:span><text:span text:style-name="T202"> </text:span><text:span text:style-name="T138">their</text:span><text:span text:style-name="T159"> </text:span><text:span text:style-name="T155">applications;</text:span><text:span text:style-name="T120"> </text:span><text:span text:style-name="T128">to</text:span><text:span text:style-name="T159"> </text:span><text:span text:style-name="T135">say</text:span><text:span text:style-name="T133"> </text:span><text:span text:style-name="T149">nothing</text:span><text:span text:style-name="T137"> </text:span><text:span text:style-name="T138">of</text:span> <text:span text:style-name="T129">such</text:span><text:span text:style-name="T134"> </text:span><text:span text:style-name="T149">indirect</text:span><text:span text:style-name="T169"> </text:span><text:span text:style-name="T138">claimants</text:span><text:span text:style-name="T137"> </text:span><text:span text:style-name="T113">as</text:span><text:span text:style-name="T134"> </text:span><text:span text:style-name="T135">the</text:span><text:span text:style-name="T143"> </text:span><text:span text:style-name="T149">editors</text:span><text:span text:style-name="T130"> </text:span><text:span text:style-name="T138">of</text:span><text:span text:style-name="T153"> </text:span><text:span text:style-name="T135">the</text:span><text:span text:style-name="T143"> </text:span><text:span text:style-name="T138">principal</text:span><text:span text:style-name="T130"> </text:span><text:span text:style-name="T149">periodical</text:span><text:span text:style-name="T137"> </text:span><text:span text:style-name="T149">publi</text:span><text:span text:style-name="T150">cations,</text:span><text:span text:style-name="T125"> </text:span><text:span text:style-name="T128">to</text:span><text:span text:style-name="T151"> </text:span><text:span text:style-name="T138">wit,</text:span><text:span text:style-name="T143"> </text:span><text:span text:style-name="T113">‘*</text:span><text:span text:style-name="T153"> </text:span><text:span text:style-name="T203">Cornhill,’’</text:span><text:span text:style-name="T133"> </text:span><text:span text:style-name="T203">‘‘ </text:span><text:span text:style-name="T144">Blackwood,”</text:span><text:span text:style-name="T125"> </text:span><text:span text:style-name="T203">‘‘</text:span><text:span text:style-name="T193"> </text:span><text:span text:style-name="T144">Fraser,’’</text:span><text:span text:style-name="T153"> </text:span><text:span text:style-name="T203">‘‘</text:span><text:span text:style-name="T196"> </text:span><text:span text:style-name="T149">Macmillans,”’</text:span> <text:span text:style-name="T145">‘‘Temple</text:span><text:span text:style-name="T127"> </text:span><text:span text:style-name="T203">Bar,’’ </text:span><text:span text:style-name="T128">and</text:span><text:span text:style-name="T127"> </text:span><text:span text:style-name="T135">the</text:span><text:span text:style-name="T133"> </text:span><text:span text:style-name="T131">rest.</text:span><text:span text:style-name="T200"> </text:span>A<text:span text:style-name="T213"> </text:span><text:span text:style-name="T131">manager</text:span><text:span text:style-name="T130"> </text:span><text:span text:style-name="T138">could</text:span><text:span text:style-name="T133"> </text:span><text:span text:style-name="T135">not</text:span><text:span text:style-name="T133"> </text:span><text:span text:style-name="T155">politely</text:span><text:span text:style-name="T127"> </text:span><text:span text:style-name="T135">say</text:span><text:span text:style-name="T142"> </text:span><text:span text:style-name="T203">‘‘nay,’’</text:span> <text:span text:style-name="T136">for</text:span><text:span text:style-name="T133"> </text:span><text:span text:style-name="T149">instance,</text:span><text:span text:style-name="T143"> </text:span><text:span text:style-name="T128">to</text:span><text:span text:style-name="T133"> </text:span><text:span text:style-name="T135">such</text:span><text:span text:style-name="T125"> </text:span>a<text:span text:style-name="T149"> prolific</text:span><text:span text:style-name="T157"> </text:span><text:span text:style-name="T128">penman</text:span><text:span text:style-name="T121"> </text:span><text:span text:style-name="T113">as</text:span><text:span text:style-name="T169"> </text:span><text:span text:style-name="T144">Mr.</text:span><text:span text:style-name="T195"> </text:span><text:span text:style-name="T138">James</text:span><text:span text:style-name="T125"> </text:span><text:span text:style-name="T149">Payn,</text:span><text:span text:style-name="T159"> </text:span><text:span text:style-name="T138">responsible</text:span> <text:span text:style-name="T150">editor</text:span><text:span text:style-name="T196"> </text:span><text:span text:style-name="T138">of</text:span><text:span text:style-name="T213"> </text:span><text:span text:style-name="T210">‘*</text:span><text:span text:style-name="T192"> </text:span><text:span text:style-name="T144">Cornhili,’’</text:span><text:span text:style-name="T213"> </text:span><text:span text:style-name="T147">who</text:span><text:span text:style-name="T127"> </text:span><text:span text:style-name="T122">can</text:span><text:span text:style-name="T169"> </text:span><text:span text:style-name="T138">discourse</text:span><text:span text:style-name="T196"> </text:span><text:span text:style-name="T113">as</text:span><text:span text:style-name="T169"> </text:span><text:span text:style-name="T149">excellently</text:span><text:span text:style-name="T171"> </text:span><text:span text:style-name="T135">well</text:span><text:span text:style-name="T137"> </text:span><text:span text:style-name="T113">on</text:span><text:span text:style-name="T169"> </text:span><text:span text:style-name="T135">the</text:span><text:span text:style-name="T137"> </text:span><text:span text:style-name="T131">dram</text:span><text:span text:style-name="T139">atic</text:span><text:span text:style-name="T130"> </text:span><text:span text:style-name="T138">unities</text:span><text:span text:style-name="T125"> </text:span><text:span text:style-name="T140">as</text:span><text:span text:style-name="T216"> </text:span><text:span text:style-name="T113">on</text:span><text:span text:style-name="T207"> </text:span><text:span text:style-name="T135">the</text:span><text:span text:style-name="T192"> </text:span><text:span text:style-name="T135">the</text:span><text:span text:style-name="T192"> </text:span><text:span text:style-name="T149">literary</text:span><text:span text:style-name="T125"> </text:span><text:span text:style-name="T138">profession</text:span><text:span text:style-name="T120"> </text:span><text:span text:style-name="T149">of</text:span><text:span text:style-name="T143"> </text:span><text:span text:style-name="T135">the</text:span><text:span text:style-name="T192"> </text:span><text:span text:style-name="T138">future,</text:span><text:span text:style-name="T143"> </text:span><text:span text:style-name="T128">and</text:span><text:span text:style-name="T192"> </text:span><text:span text:style-name="T128">whose</text:span> <text:span text:style-name="T136">powers</text:span><text:span text:style-name="T133"> </text:span><text:span text:style-name="T113">as</text:span><text:span text:style-name="T169"> </text:span>a<text:span text:style-name="T203"> </text:span><text:span text:style-name="T138">novelist</text:span><text:span text:style-name="T158"> </text:span><text:span text:style-name="T138">might</text:span><text:span text:style-name="T130"> </text:span><text:span text:style-name="T135">well</text:span><text:span text:style-name="T205"> </text:span><text:span text:style-name="T138">suggest</text:span><text:span text:style-name="T133"> </text:span><text:span text:style-name="T191">no</text:span><text:span text:style-name="T158"> </text:span><text:span text:style-name="T147">mean</text:span><text:span text:style-name="T121"> </text:span><text:span text:style-name="T138">aptitude</text:span><text:span text:style-name="T130"> </text:span><text:span text:style-name="T128">for</text:span><text:span text:style-name="T133"> </text:span><text:span text:style-name="T135">the</text:span><text:span text:style-name="T153"> </text:span><text:span text:style-name="T128">work</text:span> <text:span text:style-name="T150">of</text:span><text:span text:style-name="T196"> </text:span><text:span text:style-name="T138">dramatic</text:span><text:span text:style-name="T125"> </text:span><text:span text:style-name="T149">author.</text:span><text:span text:style-name="T212"> </text:span><text:span text:style-name="T122">On</text:span><text:span text:style-name="T134"> </text:span><text:span text:style-name="T131">grand</text:span><text:span text:style-name="T192"> </text:span><text:span text:style-name="T149">occasions,</text:span><text:span text:style-name="T127"> </text:span><text:span text:style-name="T128">such</text:span><text:span text:style-name="T202"> </text:span><text:span text:style-name="T113">as</text:span><text:span text:style-name="T216"> </text:span><text:span text:style-name="T135">the</text:span><text:span text:style-name="T192"> </text:span><text:span text:style-name="T138">recent</text:span><text:span text:style-name="T159"> </text:span><text:span text:style-name="T135">debut</text:span><text:span text:style-name="T134"> </text:span><text:span text:style-name="T138">of</text:span> <text:span text:style-name="T156">Mr.</text:span><text:span text:style-name="T153"> </text:span><text:span text:style-name="T138">Edwin</text:span><text:span text:style-name="T202"> </text:span><text:span text:style-name="T138">Booth</text:span><text:span text:style-name="T205"> </text:span><text:span text:style-name="T147">at</text:span><text:span text:style-name="T230"> </text:span><text:span text:style-name="T128">the</text:span><text:span text:style-name="T216"> </text:span><text:span text:style-name="T149">Princess’</text:span><text:span text:style-name="T159"> </text:span><text:span text:style-name="T155">Theatre,</text:span><text:span text:style-name="T143"> </text:span><text:span text:style-name="T113">in</text:span><text:span text:style-name="T217"> </text:span><text:span text:style-name="T203">‘‘</text:span><text:span text:style-name="T193"> </text:span><text:span text:style-name="T144">Hamlet,’’</text:span><text:span text:style-name="T159"> </text:span><text:span text:style-name="T131">it</text:span><text:span text:style-name="T192"> </text:span><text:span text:style-name="T135">would</text:span> <text:span text:style-name="T211">be</text:span><text:span text:style-name="T217"> </text:span><text:span text:style-name="T149">strictiy</text:span><text:span text:style-name="T159"> </text:span><text:span text:style-name="T138">correct</text:span><text:span text:style-name="T133"> </text:span><text:span text:style-name="T128">to</text:span><text:span text:style-name="T133"> </text:span><text:span text:style-name="T135">say</text:span><text:span text:style-name="T133"> </text:span><text:span text:style-name="T131">that</text:span><text:span text:style-name="T169"> </text:span><text:span text:style-name="T203">‘‘</text:span><text:span text:style-name="T193"> </text:span><text:span text:style-name="T135">not</text:span><text:span text:style-name="T153"> </text:span><text:span text:style-name="T131">less</text:span><text:span text:style-name="T130"> </text:span><text:span text:style-name="T135">than</text:span><text:span text:style-name="T121"> </text:span><text:span text:style-name="T138">half</text:span><text:span text:style-name="T192"> </text:span><text:span text:style-name="T135">the</text:span><text:span text:style-name="T121"> </text:span><text:span text:style-name="T138">available</text:span><text:span text:style-name="T157"> </text:span><text:span text:style-name="T131">space</text:span> <text:span text:style-name="T141">in</text:span><text:span text:style-name="T134"> </text:span><text:span text:style-name="T122">the</text:span><text:span text:style-name="T134"> </text:span><text:span text:style-name="T138">theatre</text:span><text:span text:style-name="T153"> </text:span><text:span text:style-name="T191">is</text:span><text:span text:style-name="T157"> </text:span><text:span text:style-name="T149">occupied</text:span><text:span text:style-name="T133"> </text:span><text:span text:style-name="T191">by</text:span><text:span text:style-name="T120"> </text:span><text:span text:style-name="T149">leading</text:span><text:span text:style-name="T120"> </text:span><text:span text:style-name="T149">literary</text:span><text:span text:style-name="T133"> </text:span><text:span text:style-name="T135">men,</text:span><text:span text:style-name="T134"> </text:span><text:span text:style-name="T138">their</text:span><text:span text:style-name="T159"> </text:span><text:span text:style-name="T135">wives</text:span><text:span text:style-name="T125"> </text:span><text:span text:style-name="T128">and</text:span><text:span text:style-name="T153"> </text:span><text:span text:style-name="T149">dis</text:span><text:span text:style-name="T156">ciples,</text:span><text:span text:style-name="T143"> </text:span><text:span text:style-name="T138">interspersed</text:span><text:span text:style-name="T143"> </text:span><text:span text:style-name="T135">with</text:span><text:span text:style-name="T142"> </text:span><text:span text:style-name="T128">the</text:span><text:span text:style-name="T133"> </text:span><text:span text:style-name="T138">greater</text:span><text:span text:style-name="T151"> </text:span><text:span text:style-name="T138">junior</text:span><text:span text:style-name="T125"> </text:span><text:span text:style-name="T138">artists</text:span><text:span text:style-name="T137"> </text:span><text:span text:style-name="T131">of</text:span><text:span text:style-name="T137"> </text:span><text:span text:style-name="T128">the</text:span><text:span text:style-name="T153"> </text:span><text:span text:style-name="T155">Academy,</text:span><text:span text:style-name="T130"> </text:span><text:span text:style-name="T135">such</text:span> <text:span text:style-name="T141">as</text:span><text:span text:style-name="T142"> </text:span><text:span text:style-name="T149">Prinsep,</text:span><text:span text:style-name="T137"> </text:span><text:span text:style-name="T138">Marks,</text:span><text:span text:style-name="T133"> </text:span><text:span text:style-name="T149">Boughton,</text:span><text:span text:style-name="T151"> </text:span><text:span text:style-name="T155">Fildes,</text:span><text:span text:style-name="T195"> </text:span><text:span text:style-name="T155">Eyre,</text:span><text:span text:style-name="T127"> </text:span><text:span text:style-name="T138">Crowe,</text:span><text:span text:style-name="T151"> </text:span><text:span text:style-name="T122">and</text:span><text:span text:style-name="T169"> </text:span><text:span text:style-name="T138">others.</text:span><text:span text:style-name="T208"> </text:span><text:span text:style-name="T149">Unques</text:span><text:span text:style-name="T156">tionably,</text:span><text:span text:style-name="T143"> </text:span><text:span text:style-name="T131">this</text:span><text:span text:style-name="T125"> </text:span><text:span text:style-name="T131">array</text:span><text:span text:style-name="T120"> </text:span><text:span text:style-name="T155">of</text:span><text:span text:style-name="T171"> </text:span><text:span text:style-name="T155">ability</text:span><text:span text:style-name="T137"> </text:span><text:span text:style-name="T122">has</text:span><text:span text:style-name="T133"> </text:span>a<text:span text:style-name="T144"> </text:span><text:span text:style-name="T149">voice</text:span><text:span text:style-name="T133"> </text:span><text:span text:style-name="T210">in</text:span><text:span text:style-name="T192"> </text:span><text:span text:style-name="T138">shaping</text:span><text:span text:style-name="T193"> </text:span><text:span text:style-name="T138">public</text:span><text:span text:style-name="T195"> </text:span><text:span text:style-name="T138">opinion</text:span><text:span text:style-name="T125"> </text:span><text:span text:style-name="T122">and</text:span> <text:span text:style-name="T156">deciding</text:span><text:span text:style-name="T125"> </text:span><text:span text:style-name="T128">the</text:span><text:span text:style-name="T142"> </text:span><text:span text:style-name="T138">fortunes</text:span><text:span text:style-name="T157"> </text:span><text:span text:style-name="T149">of</text:span><text:span text:style-name="T133"> </text:span>a<text:span text:style-name="T144"> </text:span><text:span text:style-name="T191">new</text:span><text:span text:style-name="T134"> </text:span><text:span text:style-name="T155">play.</text:span><text:span text:style-name="T231"> </text:span><text:span text:style-name="T135">But</text:span><text:span text:style-name="T142"> </text:span><text:span text:style-name="T135">it</text:span><text:span text:style-name="T142"> </text:span><text:span text:style-name="T138">is,</text:span><text:span text:style-name="T153"> </text:span><text:span text:style-name="T138">nevertheless,</text:span><text:span text:style-name="T153"> </text:span><text:span text:style-name="T135">true</text:span><text:span text:style-name="T169"> </text:span><text:span text:style-name="T131">that</text:span> <text:span text:style-name="T129">some</text:span><text:span text:style-name="T143"> </text:span><text:span text:style-name="T138">plays</text:span><text:span text:style-name="T157"> </text:span><text:span text:style-name="T135">which</text:span><text:span text:style-name="T192"> </text:span><text:span text:style-name="T128">have</text:span><text:span text:style-name="T158"> </text:span><text:span text:style-name="T138">encountered</text:span><text:span text:style-name="T158"> </text:span><text:span text:style-name="T122">but</text:span><text:span text:style-name="T157"> </text:span>a<text:span text:style-name="T130"> </text:span><text:span text:style-name="T131">poor</text:span><text:span text:style-name="T143"> </text:span><text:span text:style-name="T138">reception</text:span><text:span text:style-name="T143"> </text:span><text:span text:style-name="T147">at</text:span><text:span text:style-name="T169"> </text:span><text:span text:style-name="T138">first</text:span><text:span text:style-name="T125"> </text:span><text:span text:style-name="T128">have</text:span> <text:span text:style-name="T132">become</text:span><text:span text:style-name="T133"> </text:span><text:span text:style-name="T138">extremely</text:span><text:span text:style-name="T151"> </text:span><text:span text:style-name="T131">popular</text:span><text:span text:style-name="T157"> </text:span><text:span text:style-name="T138">afterwards,</text:span><text:span text:style-name="T143"> </text:span><text:span text:style-name="T122">and</text:span><text:span text:style-name="T160"> </text:span><text:span text:style-name="T122">have</text:span><text:span text:style-name="T202"> </text:span><text:span text:style-name="T122">made</text:span><text:span text:style-name="T192"> </text:span>a<text:span text:style-name="T195"> </text:span><text:span text:style-name="T131">small</text:span><text:span text:style-name="T192"> </text:span><text:span text:style-name="T131">fortune</text:span> <text:span text:style-name="T132">both</text:span><text:span text:style-name="T153"> </text:span><text:span text:style-name="T135">for</text:span><text:span text:style-name="T153"> </text:span><text:span text:style-name="T131">manager</text:span><text:span text:style-name="T137"> </text:span><text:span text:style-name="T128">and</text:span><text:span text:style-name="T142"> </text:span><text:span text:style-name="T149">author.</text:span><text:span text:style-name="T232"> </text:span><text:span text:style-name="T193">‘‘H.</text:span><text:span text:style-name="T127"> </text:span><text:span text:style-name="T135">M.</text:span><text:span text:style-name="T134"> </text:span><text:span text:style-name="T138">S.</text:span><text:span text:style-name="T157"> </text:span><text:span text:style-name="T155">Pinafore’’</text:span><text:span text:style-name="T153"> </text:span><text:span text:style-name="T191">was</text:span><text:span text:style-name="T133"> </text:span><text:span text:style-name="T122">by</text:span><text:span text:style-name="T142"> </text:span><text:span text:style-name="T191">no</text:span><text:span text:style-name="T157"> </text:span><text:span text:style-name="T135">means</text:span> <text:span text:style-name="T108">a</text:span><text:span text:style-name="T203"> </text:span><text:span text:style-name="T131">remarkable</text:span><text:span text:style-name="T125"> </text:span><text:span text:style-name="T138">success</text:span><text:span text:style-name="T137"> </text:span><text:span text:style-name="T191">at</text:span><text:span text:style-name="T207"> </text:span><text:span text:style-name="T149">first,</text:span><text:span text:style-name="T195"> </text:span><text:span text:style-name="T122">and</text:span><text:span text:style-name="T202"> </text:span><text:span text:style-name="T228">we</text:span><text:span text:style-name="T200"> </text:span><text:span text:style-name="T122">are</text:span><text:span text:style-name="T121"> </text:span><text:span text:style-name="T149">sufficiently</text:span><text:span text:style-name="T137"> </text:span><text:span text:style-name="T155">old,</text:span><text:span text:style-name="T133"> </text:span><text:span text:style-name="T191">or</text:span><text:span text:style-name="T160"> </text:span><text:span text:style-name="T131">young</text:span><text:span text:style-name="T143"> </text:span><text:span text:style-name="T131">(as</text:span> <text:span text:style-name="T136">the</text:span><text:span text:style-name="T153"> </text:span><text:span text:style-name="T135">reader</text:span><text:span text:style-name="T153"> </text:span><text:span text:style-name="T155">wills),</text:span><text:span text:style-name="T153"> </text:span><text:span text:style-name="T147">to</text:span><text:span text:style-name="T169"> </text:span><text:span text:style-name="T135">remember</text:span><text:span text:style-name="T153"> </text:span><text:span text:style-name="T131">that</text:span><text:span text:style-name="T142"> </text:span><text:span text:style-name="T128">for</text:span><text:span text:style-name="T130"> </text:span>a<text:span text:style-name="T171"> </text:span><text:span text:style-name="T138">long</text:span><text:span text:style-name="T169"> </text:span><text:span text:style-name="T135">time</text:span><text:span text:style-name="T133"> </text:span><text:span text:style-name="T131">after</text:span><text:span text:style-name="T153"> </text:span><text:span text:style-name="T144">‘‘</text:span><text:span text:style-name="T193"> </text:span><text:span text:style-name="T138">The</text:span><text:span text:style-name="T133"> </text:span><text:span text:style-name="T155">Colleen</text:span> <text:span text:style-name="T136">3awn’’</text:span><text:span text:style-name="T125"> </text:span><text:span text:style-name="T113">was</text:span><text:span text:style-name="T133"> </text:span><text:span text:style-name="T131">produced</text:span><text:span text:style-name="T143"> </text:span><text:span text:style-name="T122">at</text:span><text:span text:style-name="T134"> </text:span><text:span text:style-name="T128">the</text:span><text:span text:style-name="T143"> </text:span><text:span text:style-name="T155">Adelphi</text:span><text:span text:style-name="T157"> </text:span><text:span text:style-name="T149">Theatre</text:span><text:span text:style-name="T125"> </text:span><text:span text:style-name="T113">in</text:span><text:span text:style-name="T159"> </text:span><text:span text:style-name="T149">London,</text:span><text:span text:style-name="T133"> </text:span><text:span text:style-name="T131">there</text:span><text:span text:style-name="T130"> </text:span><text:span text:style-name="T191">was</text:span><text:span text:style-name="T142"> </text:span><text:span text:style-name="T128">am</text:span><text:span text:style-name="T132">ple</text:span><text:span text:style-name="T223"> </text:span><text:span text:style-name="T138">accomodation</text:span><text:span text:style-name="T207"> </text:span><text:span text:style-name="T122">to</text:span><text:span text:style-name="T207"> </text:span><text:span text:style-name="T118">be</text:span><text:span text:style-name="T223"> </text:span><text:span text:style-name="T122">had</text:span><text:span text:style-name="T158"> </text:span><text:span text:style-name="T138">there.</text:span><text:span text:style-name="T233"> </text:span><text:span text:style-name="T128">It</text:span><text:span text:style-name="T223"> </text:span><text:span text:style-name="T147">is</text:span><text:span text:style-name="T207"> </text:span><text:span text:style-name="T138">needless</text:span><text:span text:style-name="T158"> </text:span><text:span text:style-name="T128">to</text:span><text:span text:style-name="T192"> </text:span><text:span text:style-name="T128">say</text:span><text:span text:style-name="T143"> </text:span><text:span text:style-name="T138">that</text:span><text:span text:style-name="T120"> </text:span><text:span text:style-name="T138">that</text:span> <text:span text:style-name="T132">drama,</text:span><text:span text:style-name="T125"> </text:span><text:span text:style-name="T210">in</text:span><text:span text:style-name="T159"> </text:span><text:span text:style-name="T210">an</text:span><text:span text:style-name="T205"> </text:span><text:span text:style-name="T128">era</text:span><text:span text:style-name="T120"> </text:span><text:span text:style-name="T138">almost</text:span><text:span text:style-name="T158"> </text:span><text:span text:style-name="T149">destitute</text:span><text:span text:style-name="T125"> </text:span><text:span text:style-name="T138">of</text:span><text:span text:style-name="T157"> </text:span><text:span text:style-name="T203">‘‘long</text:span><text:span text:style-name="T196"> </text:span><text:span text:style-name="T155">runs,’’</text:span><text:span text:style-name="T153"> </text:span><text:span text:style-name="T135">became</text:span><text:span text:style-name="T159"> </text:span><text:span text:style-name="T128">one</text:span><text:span text:style-name="T121"> </text:span><text:span text:style-name="T138">of</text:span><text:span text:style-name="T205"> </text:span><text:span text:style-name="T128">the</text:span> <text:span text:style-name="T139">greatest</text:span><text:span text:style-name="T143"> </text:span><text:span text:style-name="T149">theatrical</text:span><text:span text:style-name="T142"> </text:span><text:span text:style-name="T131">successes</text:span><text:span text:style-name="T133"> </text:span><text:span text:style-name="T210">on</text:span><text:span text:style-name="T158"> </text:span><text:span text:style-name="T138">record.</text:span></text:p>
          <text:p text:style-name="P113"><text:span text:style-name="T114">In</text:span><text:span text:style-name="T192"> </text:span><text:span text:style-name="T122">more</text:span><text:span text:style-name="T142"> </text:span><text:span text:style-name="T128">ways</text:span><text:span text:style-name="T159"> </text:span><text:span text:style-name="T135">than</text:span><text:span text:style-name="T169"> </text:span><text:span text:style-name="T138">one,</text:span><text:span text:style-name="T142"> </text:span><text:span text:style-name="T128">the</text:span><text:span text:style-name="T159"> </text:span><text:span text:style-name="T138">audience</text:span><text:span text:style-name="T125"> </text:span><text:span text:style-name="T149">of</text:span><text:span text:style-name="T143"> </text:span><text:span text:style-name="T128">the</text:span><text:span text:style-name="T143"> </text:span><text:span text:style-name="T149">gallery</text:span><text:span text:style-name="T130"> </text:span><text:span text:style-name="T135">makes</text:span><text:span text:style-name="T120"> </text:span><text:span text:style-name="T138">its</text:span><text:span text:style-name="T137"> </text:span><text:span text:style-name="T149">voice</text:span> <text:span text:style-name="T136">heard</text:span><text:span text:style-name="T121"> </text:span><text:span text:style-name="T210">in</text:span><text:span text:style-name="T217"> </text:span><text:span text:style-name="T138">judgment</text:span><text:span text:style-name="T130"> </text:span><text:span text:style-name="T113">on</text:span><text:span text:style-name="T209"> </text:span><text:span text:style-name="T113">new</text:span><text:span text:style-name="T157"> </text:span><text:span text:style-name="T138">plays</text:span><text:span text:style-name="T202"> </text:span><text:span text:style-name="T113">in</text:span><text:span text:style-name="T208"> </text:span><text:span text:style-name="T149">London.</text:span><text:span text:style-name="T232"> </text:span><text:span text:style-name="T113">We</text:span><text:span text:style-name="T157"> </text:span><text:span text:style-name="T128">know</text:span><text:span text:style-name="T143"> </text:span><text:span text:style-name="T149">of</text:span><text:span text:style-name="T142"> </text:span>a<text:span text:style-name="T144"> </text:span><text:span text:style-name="T131">worthy</text:span> <text:span text:style-name="T132">fellow</text:span><text:span text:style-name="T143"> </text:span><text:span text:style-name="T191">who</text:span><text:span text:style-name="T216"> </text:span><text:span text:style-name="T131">always</text:span><text:span text:style-name="T158"> </text:span><text:span text:style-name="T138">occupies</text:span><text:span text:style-name="T205"> </text:span>a<text:span text:style-name="T127"> </text:span><text:span text:style-name="T138">front</text:span><text:span text:style-name="T159"> </text:span><text:span text:style-name="T135">seat</text:span><text:span text:style-name="T133"> </text:span><text:span text:style-name="T135">among</text:span><text:span text:style-name="T169"> </text:span><text:span text:style-name="T203">‘‘the</text:span><text:span text:style-name="T157"> </text:span><text:span text:style-name="T203">Gods’’</text:span><text:span text:style-name="T137"> </text:span><text:span text:style-name="T191">on</text:span><text:span text:style-name="T120"> </text:span><text:span text:style-name="T138">first</text:span><text:span text:style-name="T150">nights,</text:span><text:span text:style-name="T142"> </text:span><text:span text:style-name="T191">who</text:span><text:span text:style-name="T134"> </text:span><text:span text:style-name="T138">insists</text:span><text:span text:style-name="T130"> </text:span><text:span text:style-name="T131">that</text:span><text:span text:style-name="T142"> </text:span><text:span text:style-name="T155">they,</text:span><text:span text:style-name="T153"> </text:span><text:span text:style-name="T138">indeed,</text:span><text:span text:style-name="T142"> </text:span><text:span text:style-name="T128">rule</text:span><text:span text:style-name="T158"> </text:span><text:span text:style-name="T128">the</text:span><text:span text:style-name="T153"> </text:span><text:span text:style-name="T155">play.</text:span><text:span text:style-name="T201"> </text:span><text:span text:style-name="T149">Like</text:span><text:span text:style-name="T130"> </text:span><text:span text:style-name="T128">the</text:span><text:span text:style-name="T142"> </text:span><text:span text:style-name="T138">ladies</text:span><text:span text:style-name="T137"> </text:span><text:span text:style-name="T149">of</text:span> <text:span text:style-name="T136">the</text:span><text:span text:style-name="T192"> </text:span><text:span text:style-name="T131">Roman</text:span><text:span text:style-name="T120"> </text:span><text:span text:style-name="T138">amphitheatre,</text:span><text:span text:style-name="T137"> </text:span><text:span text:style-name="T147">who</text:span><text:span text:style-name="T169"> </text:span><text:span text:style-name="T149">held,</text:span><text:span text:style-name="T153"> </text:span><text:span text:style-name="T149">literally</text:span><text:span text:style-name="T125"> </text:span><text:span text:style-name="T113">in</text:span><text:span text:style-name="T120"> </text:span><text:span text:style-name="T138">their</text:span><text:span text:style-name="T137"> </text:span><text:span text:style-name="T138">hands,</text:span><text:span text:style-name="T153"> </text:span><text:span text:style-name="T135">the</text:span><text:span text:style-name="T143"> </text:span><text:span text:style-name="T135">fate</text:span><text:span text:style-name="T133"> </text:span><text:span text:style-name="T149">of</text:span> <text:span text:style-name="T129">the</text:span><text:span text:style-name="T121"> </text:span><text:span text:style-name="T131">Roman</text:span><text:span text:style-name="T159"> </text:span><text:span text:style-name="T149">gladiators,</text:span><text:span text:style-name="T143"> </text:span><text:span text:style-name="T135">the</text:span><text:span text:style-name="T169"> </text:span><text:span text:style-name="T138">London</text:span><text:span text:style-name="T125"> </text:span><text:span text:style-name="T203">‘‘</text:span><text:span text:style-name="T196"> </text:span><text:span text:style-name="T203">Gods’’</text:span><text:span text:style-name="T133"> </text:span><text:span text:style-name="T131">profess</text:span><text:span text:style-name="T134"> </text:span><text:span text:style-name="T128">to</text:span><text:span text:style-name="T159"> </text:span><text:span text:style-name="T135">say</text:span><text:span text:style-name="T125"> </text:span><text:span text:style-name="T203">‘‘</text:span><text:span text:style-name="T196"> </text:span><text:span text:style-name="T171">Yea’’</text:span><text:span text:style-name="T137"> </text:span><text:span text:style-name="T122">or</text:span> <text:span text:style-name="T123">We</text:span><text:span text:style-name="T143"> </text:span><text:span text:style-name="T122">are</text:span><text:span text:style-name="T153"> </text:span><text:span text:style-name="T135">not</text:span><text:span text:style-name="T159"> </text:span><text:span text:style-name="T138">disposed</text:span> <text:span text:style-name="T156">tacitly</text:span><text:span text:style-name="T120"> </text:span><text:span text:style-name="T128">to</text:span><text:span text:style-name="T216"> </text:span><text:span text:style-name="T131">admit</text:span><text:span text:style-name="T159"> </text:span><text:span text:style-name="T131">this</text:span><text:span text:style-name="T205"> </text:span><text:span text:style-name="T149">claim,</text:span><text:span text:style-name="T133"> </text:span><text:span text:style-name="T128">but</text:span><text:span text:style-name="T160"> </text:span><text:span text:style-name="T131">have,</text:span><text:span text:style-name="T158"> </text:span><text:span text:style-name="T149">notwithstanding,</text:span><text:span text:style-name="T133"> </text:span><text:span text:style-name="T128">many</text:span><text:span text:style-name="T159"> </text:span><text:span text:style-name="T131">reasons</text:span> <text:span text:style-name="T129">for</text:span><text:span text:style-name="T205"> </text:span><text:span text:style-name="T138">asserting</text:span><text:span text:style-name="T205"> </text:span><text:span text:style-name="T131">that</text:span><text:span text:style-name="T143"> </text:span><text:span text:style-name="T135">the</text:span><text:span text:style-name="T133"> </text:span><text:span text:style-name="T149">gallery</text:span><text:span text:style-name="T137"> </text:span><text:span text:style-name="T138">audience</text:span><text:span text:style-name="T125"> </text:span><text:span text:style-name="T149">of</text:span><text:span text:style-name="T169"> </text:span>a<text:span text:style-name="T203"> </text:span><text:span text:style-name="T138">London</text:span><text:span text:style-name="T192"> </text:span><text:span text:style-name="T138">theatre</text:span><text:span text:style-name="T153"> </text:span><text:span text:style-name="T191">is</text:span><text:span text:style-name="T142"> </text:span><text:span text:style-name="T140">an</text:span><text:span text:style-name="T202"> </text:span><text:span text:style-name="T131">asso</text:span><text:span text:style-name="T150">ciation</text:span><text:span text:style-name="T205"> </text:span><text:span text:style-name="T135">not</text:span><text:span text:style-name="T121"> </text:span><text:span text:style-name="T122">to</text:span><text:span text:style-name="T223"> </text:span><text:span text:style-name="T113">be</text:span><text:span text:style-name="T157"> </text:span><text:span text:style-name="T138">trifled</text:span><text:span text:style-name="T159"> </text:span><text:span text:style-name="T138">with.</text:span><text:span text:style-name="T212"> </text:span><text:span text:style-name="T131">And</text:span><text:span text:style-name="T205"> </text:span><text:span text:style-name="T220">we</text:span><text:span text:style-name="T200"> </text:span><text:span text:style-name="T147">use</text:span><text:span text:style-name="T121"> </text:span><text:span text:style-name="T135">the</text:span><text:span text:style-name="T205"> </text:span><text:span text:style-name="T128">term</text:span><text:span text:style-name="T169"> </text:span><text:span text:style-name="T199">‘association</text:span><text:span text:style-name="T234"> </text:span><text:span text:style-name="T131">’”’</text:span> <text:span text:style-name="T156">advisedly,</text:span><text:span text:style-name="T130"> </text:span><text:span text:style-name="T135">it</text:span><text:span text:style-name="T160"> </text:span><text:span text:style-name="T138">being</text:span><text:span text:style-name="T159"> </text:span><text:span text:style-name="T131">within</text:span><text:span text:style-name="T216"> </text:span><text:span text:style-name="T122">our</text:span><text:span text:style-name="T223"> </text:span><text:span text:style-name="T138">knowledge</text:span><text:span text:style-name="T205"> </text:span><text:span text:style-name="T131">that</text:span><text:span text:style-name="T192"> </text:span>a<text:span text:style-name="T203"> </text:span><text:span text:style-name="T131">large</text:span><text:span text:style-name="T205"> </text:span><text:span text:style-name="T138">section</text:span><text:span text:style-name="T130"> </text:span><text:span text:style-name="T149">of</text:span><text:span text:style-name="T134"> </text:span><text:span text:style-name="T135">the</text:span> <text:span text:style-name="T150">first-night</text:span><text:span text:style-name="T133"> </text:span><text:span text:style-name="T131">frequenters</text:span><text:span text:style-name="T130"> </text:span><text:span text:style-name="T149">of</text:span><text:span text:style-name="T143"> </text:span><text:span text:style-name="T128">the</text:span><text:span text:style-name="T142"> </text:span><text:span text:style-name="T131">uppermost</text:span><text:span text:style-name="T133"> </text:span><text:span text:style-name="T131">seats</text:span><text:span text:style-name="T137"> </text:span><text:span text:style-name="T122">are</text:span><text:span text:style-name="T120"> </text:span><text:span text:style-name="T140">as</text:span><text:span text:style-name="T120"> </text:span><text:span text:style-name="T135">well</text:span><text:span text:style-name="T143"> </text:span><text:span text:style-name="T128">known</text:span><text:span text:style-name="T142"> </text:span><text:span text:style-name="T128">to</text:span><text:span text:style-name="T133"> </text:span><text:span text:style-name="T135">each</text:span> <text:span text:style-name="T156">other,</text:span><text:span text:style-name="T213"> </text:span><text:span text:style-name="T122">and</text:span><text:span text:style-name="T142"> </text:span><text:span text:style-name="T140">as</text:span><text:span text:style-name="T142"> </text:span><text:span text:style-name="T135">well</text:span><text:span text:style-name="T127"> </text:span><text:span text:style-name="T155">disciplined,</text:span><text:span text:style-name="T137"> </text:span><text:span text:style-name="T140">as</text:span><text:span text:style-name="T153"> </text:span><text:span text:style-name="T128">the</text:span><text:span text:style-name="T130"> </text:span><text:span text:style-name="T138">individual</text:span><text:span text:style-name="T137"> </text:span><text:span text:style-name="T135">members</text:span><text:span text:style-name="T151"> </text:span><text:span text:style-name="T149">of</text:span><text:span text:style-name="T199"> </text:span>a<text:span text:style-name="T138"> </text:span><text:span text:style-name="T149">sub-section</text:span> <text:span text:style-name="T139">of</text:span><text:span text:style-name="T125"> </text:span><text:span text:style-name="T149">metropolitan</text:span><text:span text:style-name="T143"> </text:span><text:span text:style-name="T155">police.</text:span><text:span text:style-name="T215"> </text:span><text:span text:style-name="T149">Years</text:span><text:span text:style-name="T151"> </text:span><text:span text:style-name="T131">ago</text:span><text:span text:style-name="T130"> </text:span><text:span text:style-name="T228">we</text:span><text:span text:style-name="T202"> </text:span><text:span text:style-name="T131">happened</text:span><text:span text:style-name="T142"> </text:span><text:span text:style-name="T147">to</text:span><text:span text:style-name="T169"> </text:span><text:span text:style-name="T128">make</text:span><text:span text:style-name="T143"> </text:span><text:span text:style-name="T135">the</text:span><text:span text:style-name="T143"> </text:span><text:span text:style-name="T149">acquaint-</text:span></text:p>
          <text:p text:style-name="P123"><text:span text:style-name="T108">|</text:span><text:span text:style-name="T203"> ance</text:span><text:span text:style-name="T127"> </text:span><text:span text:style-name="T195">of</text:span><text:span text:style-name="T193"> </text:span>a<text:span text:style-name="T195"> </text:span><text:span text:style-name="T171">youth</text:span><text:span text:style-name="T137"> </text:span><text:span text:style-name="T203">who</text:span><text:span text:style-name="T127"> </text:span><text:span text:style-name="T171">exercised</text:span><text:span text:style-name="T127"> </text:span><text:span text:style-name="T171">the</text:span><text:span text:style-name="T127"> </text:span><text:span text:style-name="T171">function</text:span><text:span text:style-name="T137"> </text:span><text:span text:style-name="T195">of</text:span><text:span text:style-name="T213"> </text:span><text:span text:style-name="T199">out-door</text:span><text:span text:style-name="T143"> </text:span><text:span text:style-name="T203">messenger</text:span><text:span text:style-name="T151"> </text:span><text:span text:style-name="T171">to</text:span><text:span text:style-name="T151"> </text:span>a</text:p>
          <text:p text:style-name="P134"><text:span text:style-name="T139">responsible</text:span><text:span text:style-name="T205"> </text:span><text:span text:style-name="T138">London</text:span><text:span text:style-name="T202"> </text:span><text:span text:style-name="T138">publishing</text:span><text:span text:style-name="T130"> </text:span><text:span text:style-name="T131">firm,</text:span><text:span text:style-name="T133"> </text:span><text:span text:style-name="T147">and</text:span><text:span text:style-name="T134"> </text:span><text:span text:style-name="T191">who</text:span><text:span text:style-name="T134"> </text:span><text:span text:style-name="T140">was</text:span><text:span text:style-name="T134"> </text:span>a<text:span text:style-name="T144"> </text:span><text:span text:style-name="T131">leader</text:span><text:span text:style-name="T158"> </text:span><text:span text:style-name="T113">in</text:span><text:span text:style-name="T160"> </text:span><text:span text:style-name="T128">the</text:span><text:span text:style-name="T130"> </text:span><text:span text:style-name="T149">gal</text:span><text:span text:style-name="T136">lery</text:span><text:span text:style-name="T143"> </text:span><text:span text:style-name="T147">at</text:span><text:span text:style-name="T133"> </text:span><text:span text:style-name="T131">first</text:span><text:span text:style-name="T143"> </text:span><text:span text:style-name="T131">performances.</text:span><text:span text:style-name="T232"> </text:span><text:span text:style-name="T149">It</text:span><text:span text:style-name="T130"> </text:span><text:span text:style-name="T140">was</text:span><text:span text:style-name="T157"> </text:span><text:span text:style-name="T122">the</text:span><text:span text:style-name="T134"> </text:span><text:span text:style-name="T135">pride</text:span><text:span text:style-name="T143"> </text:span><text:span text:style-name="T131">of</text:span><text:span text:style-name="T205"> </text:span><text:span text:style-name="T131">this</text:span><text:span text:style-name="T130"> </text:span><text:span text:style-name="T131">youth</text:span><text:span text:style-name="T130"> </text:span><text:span text:style-name="T131">that</text:span><text:span text:style-name="T130"> </text:span><text:span text:style-name="T210">he</text:span><text:span text:style-name="T157"> </text:span><text:span text:style-name="T138">could</text:span></text:p>
          <text:p text:style-name="P125"><text:span text:style-name="T108">|</text:span><text:span text:style-name="T199"> </text:span><text:span text:style-name="T203">pay</text:span><text:span text:style-name="T137"> </text:span><text:span text:style-name="T203">his</text:span><text:span text:style-name="T127"> </text:span><text:span text:style-name="T203">way</text:span><text:span text:style-name="T125"> </text:span><text:span text:style-name="T203">at</text:span><text:span text:style-name="T125"> </text:span><text:span text:style-name="T203">the</text:span><text:span text:style-name="T137"> </text:span><text:span text:style-name="T171">theatre,</text:span><text:span text:style-name="T130"> </text:span><text:span text:style-name="T203">and</text:span><text:span text:style-name="T120"> </text:span><text:span text:style-name="T203">that</text:span><text:span text:style-name="T192"> </text:span><text:span text:style-name="T144">he</text:span><text:span text:style-name="T192"> </text:span><text:span text:style-name="T203">knew</text:span><text:span text:style-name="T137"> </text:span><text:span text:style-name="T171">thoroughly</text:span><text:span text:style-name="T127"> </text:span><text:span text:style-name="T203">all</text:span><text:span text:style-name="T205"> </text:span><text:span text:style-name="T203">the</text:span><text:span text:style-name="T127"> </text:span><text:span text:style-name="T203">many</text:span></text:p>
          <text:p text:style-name="P103"><text:span text:style-name="T156">writers</text:span><text:span text:style-name="T130"> </text:span><text:span text:style-name="T135">in</text:span><text:span text:style-name="T157"> </text:span><text:span text:style-name="T155">the</text:span><text:span text:style-name="T133"> </text:span><text:span text:style-name="T144">newspapers—at</text:span><text:span text:style-name="T130"> </text:span><text:span text:style-name="T144">least</text:span><text:span text:style-name="T192"> </text:span><text:span text:style-name="T138">so</text:span><text:span text:style-name="T143"> </text:span><text:span text:style-name="T155">rules</text:span><text:span text:style-name="T193"> </text:span><text:span text:style-name="T149">our</text:span><text:span text:style-name="T133"> </text:span><text:span text:style-name="T144">friend</text:span><text:span text:style-name="T125"> </text:span><text:span text:style-name="T155">the</text:span><text:span text:style-name="T130"> </text:span><text:span text:style-name="T203">leading</text:span><text:span text:style-name="T127"> </text:span><text:span text:style-name="T203">com-</text:span><text:span text:style-name="T205"> </text:span>|</text:p>
          <text:p text:style-name="P120"><text:span text:style-name="T139">edian.</text:span><text:span text:style-name="T232"> </text:span><text:span text:style-name="T135">And</text:span><text:span text:style-name="T169"> </text:span><text:span text:style-name="T128">it</text:span><text:span text:style-name="T134"> </text:span><text:span text:style-name="T203">isa</text:span><text:span text:style-name="T143"> </text:span><text:span text:style-name="T155">little</text:span><text:span text:style-name="T205"> </text:span><text:span text:style-name="T138">remarkable,</text:span><text:span text:style-name="T143"> </text:span><text:span text:style-name="T131">that</text:span><text:span text:style-name="T133"> </text:span><text:span text:style-name="T128">some</text:span><text:span text:style-name="T134"> </text:span><text:span text:style-name="T131">plays</text:span><text:span text:style-name="T130"> </text:span><text:span text:style-name="T135">which</text:span><text:span text:style-name="T153"> </text:span><text:span text:style-name="T128">have</text:span><text:span text:style-name="T143"> </text:span><text:span text:style-name="T128">been</text:span> <text:span text:style-name="T132">almost</text:span><text:span text:style-name="T133"> </text:span><text:span text:style-name="T138">universally</text:span><text:span text:style-name="T130"> </text:span><text:span text:style-name="T138">condemned</text:span><text:span text:style-name="T192"> </text:span><text:span text:style-name="T128">by</text:span><text:span text:style-name="T142"> </text:span><text:span text:style-name="T135">the</text:span><text:span text:style-name="T216"> </text:span><text:span text:style-name="T155">critics,</text:span><text:span text:style-name="T125"> </text:span><text:span text:style-name="T128">have</text:span><text:span text:style-name="T133"> </text:span><text:span text:style-name="T149">attained</text:span><text:span text:style-name="T130"> </text:span><text:span text:style-name="T149">lengthened</text:span> <text:span text:style-name="T204">‘‘runs,’’</text:span><text:span text:style-name="T133"> </text:span><text:span text:style-name="T131">while</text:span><text:span text:style-name="T133"> </text:span><text:span text:style-name="T138">others</text:span><text:span text:style-name="T153"> </text:span><text:span text:style-name="T135">which</text:span><text:span text:style-name="T158"> </text:span><text:span text:style-name="T128">have</text:span><text:span text:style-name="T205"> </text:span><text:span text:style-name="T128">been</text:span><text:span text:style-name="T121"> </text:span><text:span text:style-name="T135">somewhat</text:span><text:span text:style-name="T202"> </text:span><text:span text:style-name="T138">lavishly</text:span><text:span text:style-name="T192"> </text:span><text:span text:style-name="T138">praised</text:span><text:span text:style-name="T121"> </text:span><text:span text:style-name="T122">by</text:span> <text:span text:style-name="T136">these</text:span><text:span text:style-name="T133"> </text:span><text:span text:style-name="T138">gentlemen</text:span><text:span text:style-name="T133"> </text:span><text:span text:style-name="T128">have</text:span><text:span text:style-name="T157"> </text:span><text:span text:style-name="T122">been</text:span><text:span text:style-name="T142"> </text:span><text:span text:style-name="T149">ignominiously</text:span><text:span text:style-name="T125"> </text:span><text:span text:style-name="T131">erased</text:span><text:span text:style-name="T121"> </text:span><text:span text:style-name="T128">from</text:span><text:span text:style-name="T142"> </text:span><text:span text:style-name="T128">the</text:span><text:span text:style-name="T153"> </text:span><text:span text:style-name="T149">bills</text:span><text:span text:style-name="T127"> </text:span><text:span text:style-name="T128">at</text:span><text:span text:style-name="T153"> </text:span><text:span text:style-name="T138">short</text:span> <text:span text:style-name="T150">notice.</text:span><text:span text:style-name="T219"> </text:span><text:span text:style-name="T138">Not</text:span><text:span text:style-name="T158"> </text:span><text:span text:style-name="T149">unfrequently,</text:span><text:span text:style-name="T153"> </text:span><text:span text:style-name="T135">it</text:span><text:span text:style-name="T158"> </text:span><text:span text:style-name="T135">seems</text:span><text:span text:style-name="T160"> </text:span><text:span text:style-name="T147">to</text:span><text:span text:style-name="T160"> </text:span><text:span text:style-name="T118">us</text:span><text:span text:style-name="T159"> </text:span><text:span text:style-name="T135">the</text:span><text:span text:style-name="T153"> </text:span><text:span text:style-name="T149">London</text:span><text:span text:style-name="T125"> </text:span><text:span text:style-name="T149">public</text:span><text:span text:style-name="T125"> </text:span><text:span text:style-name="T131">lead</text:span><text:span text:style-name="T143"> </text:span><text:span text:style-name="T135">the</text:span> <text:span text:style-name="T156">critics,</text:span><text:span text:style-name="T130"> </text:span><text:span text:style-name="T122">and</text:span><text:span text:style-name="T169"> </text:span><text:span text:style-name="T135">not</text:span><text:span text:style-name="T121"> </text:span><text:span text:style-name="T135">the</text:span><text:span text:style-name="T202"> </text:span><text:span text:style-name="T149">London</text:span><text:span text:style-name="T159"> </text:span><text:span text:style-name="T149">critics</text:span><text:span text:style-name="T120"> </text:span><text:span text:style-name="T135">the</text:span><text:span text:style-name="T121"> </text:span><text:span text:style-name="T155">public;</text:span><text:span text:style-name="T120"> </text:span><text:span text:style-name="T128">and</text:span><text:span text:style-name="T159"> </text:span><text:span text:style-name="T118">an</text:span><text:span text:style-name="T192"> </text:span><text:span text:style-name="T149">illustration</text:span><text:span text:style-name="T130"> </text:span><text:span text:style-name="T149">of</text:span> <text:span text:style-name="T132">this</text:span><text:span text:style-name="T133"> </text:span><text:span text:style-name="T138">may,</text:span><text:span text:style-name="T153"> </text:span><text:span text:style-name="T220">we</text:span><text:span text:style-name="T158"> </text:span><text:span text:style-name="T149">think,</text:span><text:span text:style-name="T143"> </text:span><text:span text:style-name="T191">be</text:span><text:span text:style-name="T134"> </text:span><text:span text:style-name="T135">found</text:span><text:span text:style-name="T153"> </text:span><text:span text:style-name="T113">in</text:span><text:span text:style-name="T205"> </text:span><text:span text:style-name="T135">the</text:span><text:span text:style-name="T133"> </text:span><text:span text:style-name="T138">continued</text:span><text:span text:style-name="T130"> </text:span><text:span text:style-name="T138">successes</text:span><text:span text:style-name="T130"> </text:span><text:span text:style-name="T149">of</text:span><text:span text:style-name="T169"> </text:span><text:span text:style-name="T144">Mr.</text:span><text:span text:style-name="T143"> </text:span><text:span text:style-name="T155">Irving.</text:span> <text:span text:style-name="T129">It</text:span><text:span text:style-name="T169"> </text:span><text:span text:style-name="T135">would</text:span><text:span text:style-name="T153"> </text:span><text:span text:style-name="T149">certainly</text:span><text:span text:style-name="T195"> </text:span><text:span text:style-name="T113">be</text:span><text:span text:style-name="T157"> </text:span><text:span text:style-name="T131">within</text:span><text:span text:style-name="T143"> </text:span><text:span text:style-name="T135">the</text:span><text:span text:style-name="T133"> </text:span><text:span text:style-name="T128">mark</text:span><text:span text:style-name="T169"> </text:span><text:span text:style-name="T128">to</text:span><text:span text:style-name="T133"> </text:span><text:span text:style-name="T128">say</text:span><text:span text:style-name="T130"> </text:span><text:span text:style-name="T131">that</text:span><text:span text:style-name="T143"> </text:span><text:span text:style-name="T138">London</text:span><text:span text:style-name="T133"> </text:span><text:span text:style-name="T149">play-goers,</text:span><text:span text:style-name="T127"> </text:span><text:span text:style-name="T147">at</text:span> <text:span text:style-name="T139">present,</text:span><text:span text:style-name="T142"> </text:span><text:span text:style-name="T135">care</text:span><text:span text:style-name="T153"> </text:span><text:span text:style-name="T128">not</text:span><text:span text:style-name="T153"> </text:span>a<text:span text:style-name="T138"> </text:span><text:span text:style-name="T155">jot</text:span><text:span text:style-name="T137"> </text:span><text:span text:style-name="T128">what</text:span><text:span text:style-name="T169"> </text:span><text:span text:style-name="T135">the</text:span><text:span text:style-name="T127"> </text:span><text:span text:style-name="T138">journals</text:span><text:span text:style-name="T120"> </text:span><text:span text:style-name="T128">have</text:span><text:span text:style-name="T153"> </text:span><text:span text:style-name="T135">to</text:span><text:span text:style-name="T130"> </text:span><text:span text:style-name="T128">say</text:span><text:span text:style-name="T158"> </text:span><text:span text:style-name="T138">of</text:span><text:span text:style-name="T192"> </text:span><text:span text:style-name="T131">that</text:span><text:span text:style-name="T133"> </text:span><text:span text:style-name="T149">tragedian,</text:span> <text:span text:style-name="T139">good</text:span><text:span text:style-name="T133"> </text:span><text:span text:style-name="T191">or</text:span><text:span text:style-name="T169"> </text:span><text:span text:style-name="T138">bad.</text:span><text:span text:style-name="T235"> </text:span><text:span text:style-name="T149">Places</text:span><text:span text:style-name="T137"> </text:span><text:span text:style-name="T122">are</text:span><text:span text:style-name="T153"> </text:span><text:span text:style-name="T138">booked</text:span><text:span text:style-name="T130"> </text:span><text:span text:style-name="T122">at</text:span><text:span text:style-name="T134"> </text:span><text:span text:style-name="T135">his</text:span><text:span text:style-name="T142"> </text:span><text:span text:style-name="T149">theatre,</text:span><text:span text:style-name="T169"> </text:span><text:span text:style-name="T138">long</text:span><text:span text:style-name="T130"> </text:span><text:span text:style-name="T140">in</text:span><text:span text:style-name="T205"> </text:span><text:span text:style-name="T138">advance</text:span><text:span text:style-name="T130"> </text:span><text:span text:style-name="T138">of</text:span><text:span text:style-name="T151"> </text:span><text:span text:style-name="T135">the</text:span></text:p>
          <text:p text:style-name="P131"><text:span text:style-name="T139">publication</text:span><text:span text:style-name="T133"> </text:span><text:span text:style-name="T131">of</text:span><text:span text:style-name="T205"> </text:span><text:span text:style-name="T128">the</text:span><text:span text:style-name="T143"> </text:span><text:span text:style-name="T128">usual</text:span><text:span text:style-name="T169"> </text:span><text:span text:style-name="T135">newspaper</text:span><text:span text:style-name="T133"> </text:span><text:span text:style-name="T149">critique,</text:span><text:span text:style-name="T143"> </text:span><text:span text:style-name="T149">incident</text:span><text:span text:style-name="T125"> </text:span><text:span text:style-name="T122">upon</text:span><text:span text:style-name="T157"> </text:span><text:span text:style-name="T128">the</text:span><text:span text:style-name="T143"> </text:span><text:span text:style-name="T138">produc-</text:span><text:span text:style-name="T202"> </text:span>|</text:p>
          <text:p text:style-name="P127"><text:span text:style-name="T204">tion</text:span><text:span text:style-name="T157"> </text:span><text:span text:style-name="T213">of </text:span>a<text:span text:style-name="T127"> </text:span><text:span text:style-name="T144">new</text:span><text:span text:style-name="T137"> </text:span><text:span text:style-name="T203">play</text:span><text:span text:style-name="T127"> </text:span><text:span text:style-name="T203">or</text:span><text:span text:style-name="T127"> </text:span><text:span text:style-name="T203">revival</text:span><text:span text:style-name="T125"> </text:span><text:span text:style-name="T213">of </text:span><text:span text:style-name="T155">an</text:span><text:span text:style-name="T133"> </text:span><text:span text:style-name="T171">old</text:span><text:span text:style-name="T195"> </text:span><text:span text:style-name="T203">one.</text:span><text:span text:style-name="T215"> </text:span><text:span text:style-name="T193">His</text:span><text:span text:style-name="T213"> </text:span><text:span text:style-name="T203">theatre</text:span><text:span text:style-name="T137"> </text:span><text:span text:style-name="T203">seems</text:span><text:span text:style-name="T151"> </text:span><text:span text:style-name="T171">to</text:span><text:span text:style-name="T195"> </text:span><text:span text:style-name="T203">fill,</text:span></text:p>
          <text:p text:style-name="P146"><text:span text:style-name="T156">and,</text:span><text:span text:style-name="T125"> </text:span><text:span text:style-name="T144">indeed,</text:span><text:span text:style-name="T196"> </text:span><text:span text:style-name="T149">does</text:span><text:span text:style-name="T151"> </text:span><text:span text:style-name="T144">fill,</text:span><text:span text:style-name="T130"> </text:span><text:span text:style-name="T149">whatever</text:span><text:span text:style-name="T195"> </text:span><text:span text:style-name="T131">may</text:span><text:span text:style-name="T151"> </text:span><text:span text:style-name="T128">be</text:span><text:span text:style-name="T125"> </text:span><text:span text:style-name="T138">the</text:span><text:span text:style-name="T151"> </text:span><text:span text:style-name="T144">meritsof</text:span><text:span text:style-name="T193"> </text:span><text:span text:style-name="T138">the</text:span><text:span text:style-name="T213"> </text:span><text:span text:style-name="T203">play.</text:span><text:span text:style-name="T205"> </text:span><text:span text:style-name="T203">At</text:span><text:span text:style-name="T213"> </text:span><text:span text:style-name="T149">present</text:span><text:span text:style-name="T202"> </text:span>|</text:p>
          <text:p text:style-name="P147">7?</text:p>
          <text:p text:style-name="P142"><text:span text:style-name="T139">Mr.</text:span><text:span text:style-name="T142"> </text:span><text:span text:style-name="T138">Irving</text:span><text:span text:style-name="T130"> </text:span><text:span text:style-name="T113">is</text:span><text:span text:style-name="T133"> </text:span><text:span text:style-name="T138">acting</text:span><text:span text:style-name="T133"> </text:span><text:span text:style-name="T210">in</text:span><text:span text:style-name="T158"> </text:span><text:span text:style-name="T144">‘‘</text:span><text:span text:style-name="T193"> </text:span><text:span text:style-name="T131">The</text:span><text:span text:style-name="T153"> </text:span><text:span text:style-name="T138">Corsican</text:span><text:span text:style-name="T125"> </text:span><text:span text:style-name="T135">Brothers,’’</text:span><text:span text:style-name="T215"> </text:span>a<text:span text:style-name="T127"> </text:span><text:span text:style-name="T135">well-worn</text:span><text:span text:style-name="T209"> </text:span><text:span text:style-name="T135">drama,</text:span></text:p>
          <text:p text:style-name="P135"><text:span text:style-name="T211">as</text:span><text:span text:style-name="T226"> </text:span><text:span text:style-name="T128">most</text:span><text:span text:style-name="T153"> </text:span><text:span text:style-name="T131">persons</text:span><text:span text:style-name="T130"> </text:span><text:span text:style-name="T131">know,</text:span><text:span text:style-name="T169"> </text:span><text:span text:style-name="T138">of</text:span><text:span text:style-name="T169"> </text:span><text:span text:style-name="T128">the</text:span><text:span text:style-name="T143"> </text:span><text:span text:style-name="T138">sensational</text:span><text:span text:style-name="T159"> </text:span><text:span text:style-name="T149">order,</text:span><text:span text:style-name="T143"> </text:span><text:span text:style-name="T138">possessing</text:span><text:span text:style-name="T205"> </text:span><text:span text:style-name="T210">no</text:span><text:span text:style-name="T205"> </text:span><text:span text:style-name="T131">interest</text:span><text:span text:style-name="T202"> </text:span>| <text:span text:style-name="T108">|</text:span><text:span text:style-name="T147"> </text:span><text:span text:style-name="T149">stalls</text:span><text:span text:style-name="T137"> </text:span><text:span text:style-name="T131">without</text:span><text:span text:style-name="T125"> </text:span><text:span text:style-name="T131">being</text:span><text:span text:style-name="T130"> </text:span><text:span text:style-name="T131">saluted</text:span><text:span text:style-name="T196"> </text:span><text:span text:style-name="T128">with</text:span><text:span text:style-name="T153"> </text:span>a<text:span text:style-name="T147"> </text:span><text:span text:style-name="T138">volley</text:span><text:span text:style-name="T125"> </text:span><text:span text:style-name="T138">of</text:span><text:span text:style-name="T193"> </text:span><text:span text:style-name="T138">disgraceful</text:span><text:span text:style-name="T125"> </text:span><text:span text:style-name="T135">abuse</text:span><text:span text:style-name="T125"> </text:span><text:span text:style-name="T122">and</text:span><text:span text:style-name="T153"> </text:span><text:span text:style-name="T131">vulgar</text:span></text:p>
          <text:p text:style-name="P143"><text:span text:style-name="T114">at</text:span><text:span text:style-name="T134"> </text:span><text:span text:style-name="T135">all</text:span><text:span text:style-name="T142"> </text:span><text:span text:style-name="T140">in</text:span><text:span text:style-name="T120"> </text:span><text:span text:style-name="T131">point</text:span><text:span text:style-name="T130"> </text:span><text:span text:style-name="T131">of</text:span><text:span text:style-name="T213"> </text:span><text:span text:style-name="T138">dialogue,</text:span><text:span text:style-name="T133"> </text:span><text:span text:style-name="T147">and</text:span><text:span text:style-name="T134"> </text:span><text:span text:style-name="T131">only</text:span><text:span text:style-name="T130"> </text:span>a<text:span text:style-name="T193"> </text:span><text:span text:style-name="T147">mere</text:span><text:span text:style-name="T169"> </text:span><text:span text:style-name="T131">passing</text:span><text:span text:style-name="T133"> </text:span><text:span text:style-name="T131">interest</text:span><text:span text:style-name="T169"> </text:span><text:span text:style-name="T210">in</text:span><text:span text:style-name="T205"> </text:span><text:span text:style-name="T128">the</text:span><text:span text:style-name="T153"> </text:span><text:span text:style-name="T210">way</text:span> <text:span text:style-name="T211">of</text:span><text:span text:style-name="T158"> </text:span><text:span text:style-name="T138">plot.</text:span><text:span text:style-name="T202"> </text:span><text:span text:style-name="T138">Scenic</text:span><text:span text:style-name="T133"> </text:span><text:span text:style-name="T131">accessories</text:span><text:span text:style-name="T143"> </text:span><text:span text:style-name="T147">form</text:span><text:span text:style-name="T134"> </text:span><text:span text:style-name="T135">its</text:span><text:span text:style-name="T130"> </text:span><text:span text:style-name="T138">principal</text:span><text:span text:style-name="T130"> </text:span><text:span text:style-name="T149">attractions.</text:span><text:span text:style-name="T202"> </text:span><text:span text:style-name="T122">‘The</text:span><text:span text:style-name="T143"> </text:span><text:span text:style-name="T135">play</text:span><text:span text:style-name="T137"> </text:span><text:span text:style-name="T147">used</text:span></text:p>
          <text:p text:style-name="P144"><text:span text:style-name="T108">|</text:span><text:span text:style-name="T128"> </text:span><text:span text:style-name="T138">professionally.</text:span></text:p>
          <text:p text:style-name="P132"><text:span text:style-name="T108">|</text:span><text:span text:style-name="T131"> </text:span><text:span text:style-name="T138">night</text:span><text:span text:style-name="T125"> </text:span><text:span text:style-name="T138">of</text:span><text:span text:style-name="T133"> </text:span>a<text:span text:style-name="T144"> </text:span><text:span text:style-name="T140">new</text:span><text:span text:style-name="T157"> </text:span><text:span text:style-name="T149">play.</text:span></text:p>
          <text:p text:style-name="P136"><text:span text:style-name="T123">ins</text:span><text:span text:style-name="T143"> </text:span><text:span text:style-name="T122">and</text:span><text:span text:style-name="T130"> </text:span><text:span text:style-name="T135">outs</text:span><text:span text:style-name="T133"> </text:span><text:span text:style-name="T131">of</text:span><text:span text:style-name="T213"> </text:span><text:span text:style-name="T149">stage-craft.</text:span><text:span text:style-name="T232"> </text:span><text:span text:style-name="T128">He</text:span><text:span text:style-name="T153"> </text:span><text:span text:style-name="T140">was</text:span><text:span text:style-name="T157"> </text:span><text:span text:style-name="T122">one</text:span><text:span text:style-name="T142"> </text:span><text:span text:style-name="T135">of</text:span><text:span text:style-name="T127"> </text:span><text:span text:style-name="T155">thirty,</text:span><text:span text:style-name="T130"> </text:span><text:span text:style-name="T191">who</text:span><text:span text:style-name="T169"> </text:span><text:span text:style-name="T122">made</text:span><text:span text:style-name="T143"> </text:span>a<text:span text:style-name="T155"> </text:span><text:span text:style-name="T131">point</text:span><text:span text:style-name="T133"> </text:span><text:span text:style-name="T138">of</text:span> <text:span text:style-name="T139">being</text:span><text:span text:style-name="T137"> </text:span><text:span text:style-name="T147">at</text:span><text:span text:style-name="T134"> </text:span><text:span text:style-name="T128">the</text:span><text:span text:style-name="T133"> </text:span><text:span text:style-name="T138">gallery</text:span><text:span text:style-name="T137"> </text:span><text:span text:style-name="T131">door</text:span><text:span text:style-name="T130"> </text:span><text:span text:style-name="T135">well</text:span><text:span text:style-name="T216"> </text:span><text:span text:style-name="T113">in</text:span><text:span text:style-name="T134"> </text:span><text:span text:style-name="T131">advance</text:span><text:span text:style-name="T133"> </text:span><text:span text:style-name="T131">of</text:span><text:span text:style-name="T134"> </text:span><text:span text:style-name="T131">its</text:span><text:span text:style-name="T195"> </text:span><text:span text:style-name="T138">opening</text:span><text:span text:style-name="T125"> </text:span><text:span text:style-name="T118">on</text:span><text:span text:style-name="T208"> </text:span><text:span text:style-name="T135">every</text:span><text:span text:style-name="T133"> </text:span><text:span text:style-name="T138">first</text:span><text:span text:style-name="T236">‘‘We</text:span><text:span text:style-name="T237"> </text:span><text:span text:style-name="T135">never</text:span><text:span text:style-name="T158"> </text:span><text:span text:style-name="T128">miss</text:span><text:span text:style-name="T158"> </text:span><text:span text:style-name="T131">being</text:span><text:span text:style-name="T202"> </text:span><text:span text:style-name="T155">present,’</text:span><text:span text:style-name="T130"> </text:span><text:span text:style-name="T210">he</text:span><text:span text:style-name="T200"> </text:span><text:span text:style-name="T131">informed</text:span> <text:span text:style-name="T150">us;</text:span><text:span text:style-name="T202"> </text:span><text:span text:style-name="T144">‘‘we</text:span><text:span text:style-name="T205"> </text:span><text:span text:style-name="T122">know</text:span><text:span text:style-name="T153"> </text:span><text:span text:style-name="T135">every</text:span><text:span text:style-name="T133"> </text:span><text:span text:style-name="T155">celebrity,</text:span><text:span text:style-name="T125"> </text:span><text:span text:style-name="T147">and</text:span><text:span text:style-name="T121"> </text:span><text:span text:style-name="T131">all</text:span><text:span text:style-name="T121"> </text:span><text:span text:style-name="T128">the</text:span><text:span text:style-name="T143"> </text:span><text:span text:style-name="T131">actors</text:span><text:span text:style-name="T137"> </text:span><text:span text:style-name="T122">and</text:span><text:span text:style-name="T121"> </text:span><text:span text:style-name="T138">actresses,</text:span><text:span text:style-name="T143"> </text:span><text:span text:style-name="T122">from</text:span> <text:span text:style-name="T129">the</text:span><text:span text:style-name="T142"> </text:span><text:span text:style-name="T138">highest</text:span><text:span text:style-name="T133"> </text:span><text:span text:style-name="T147">to</text:span><text:span text:style-name="T134"> </text:span><text:span text:style-name="T128">the</text:span><text:span text:style-name="T143"> </text:span><text:span text:style-name="T138">lowest.</text:span><text:span text:style-name="T232"> </text:span>I<text:span text:style-name="T196"> </text:span><text:span text:style-name="T122">can</text:span><text:span text:style-name="T142"> </text:span><text:span text:style-name="T138">tell</text:span><text:span text:style-name="T133"> </text:span><text:span text:style-name="T131">off</text:span><text:span text:style-name="T143"> </text:span><text:span text:style-name="T128">the</text:span><text:span text:style-name="T142"> </text:span><text:span text:style-name="T122">names</text:span><text:span text:style-name="T153"> </text:span><text:span text:style-name="T131">of</text:span><text:span text:style-name="T134"> </text:span><text:span text:style-name="T131">all</text:span><text:span text:style-name="T133"> </text:span><text:span text:style-name="T128">the</text:span><text:span text:style-name="T157"> </text:span><text:span text:style-name="T138">dramatic</text:span> <text:span text:style-name="T150">critics</text:span><text:span text:style-name="T127"> </text:span><text:span text:style-name="T210">on</text:span><text:span text:style-name="T223"> </text:span><text:span text:style-name="T140">my</text:span><text:span text:style-name="T120"> </text:span><text:span text:style-name="T155">fingers,’’</text:span><text:span text:style-name="T130"> </text:span><text:span text:style-name="T135">said</text:span><text:span text:style-name="T192"> </text:span><text:span text:style-name="T131">this</text:span><text:span text:style-name="T134"> </text:span><text:span text:style-name="T138">genial</text:span><text:span text:style-name="T143"> </text:span><text:span text:style-name="T203">youth</text:span><text:span text:style-name="T220"> </text:span>;<text:span text:style-name="T193"> </text:span><text:span text:style-name="T122">and</text:span><text:span text:style-name="T134"> </text:span><text:span text:style-name="T131">forthwith</text:span><text:span text:style-name="T130"> </text:span><text:span text:style-name="T135">began</text:span><text:span text:style-name="T134"> </text:span><text:span text:style-name="T147">to</text:span> <text:span text:style-name="T132">descant</text:span><text:span text:style-name="T160"> </text:span><text:span text:style-name="T122">to</text:span><text:span text:style-name="T153"> </text:span><text:span text:style-name="T118">us</text:span><text:span text:style-name="T205"> </text:span><text:span text:style-name="T122">upon</text:span><text:span text:style-name="T216"> </text:span><text:span text:style-name="T138">their</text:span><text:span text:style-name="T127"> </text:span><text:span text:style-name="T131">several</text:span><text:span text:style-name="T133"> </text:span><text:span text:style-name="T138">peculiarities.</text:span><text:span text:style-name="T232"> </text:span><text:span text:style-name="T128">How</text:span><text:span text:style-name="T153"> </text:span><text:span text:style-name="T131">that</text:span><text:span text:style-name="T205"> </text:span><text:span text:style-name="T138">this</text:span><text:span text:style-name="T134"> </text:span><text:span text:style-name="T122">one</text:span><text:span text:style-name="T153"> </text:span><text:span text:style-name="T113">was</text:span> <text:span text:style-name="T132">uncommonly</text:span><text:span text:style-name="T133"> </text:span><text:span text:style-name="T138">bald,</text:span><text:span text:style-name="T143"> </text:span><text:span text:style-name="T122">and</text:span><text:span text:style-name="T160"> </text:span><text:span text:style-name="T135">that</text:span><text:span text:style-name="T216"> </text:span><text:span text:style-name="T128">one</text:span><text:span text:style-name="T192"> </text:span><text:span text:style-name="T131">sucked</text:span><text:span text:style-name="T121"> </text:span><text:span text:style-name="T131">cough</text:span><text:span text:style-name="T121"> </text:span><text:span text:style-name="T138">lozenges</text:span><text:span text:style-name="T159"> </text:span><text:span text:style-name="T155">continually,</text:span> <text:span text:style-name="T123">and</text:span><text:span text:style-name="T153"> </text:span>a<text:span text:style-name="T144"> </text:span><text:span text:style-name="T131">third</text:span><text:span text:style-name="T143"> </text:span><text:span text:style-name="T135">chewed</text:span><text:span text:style-name="T216"> </text:span><text:span text:style-name="T147">and</text:span><text:span text:style-name="T142"> </text:span><text:span text:style-name="T128">seemed</text:span><text:span text:style-name="T121"> </text:span><text:span text:style-name="T138">greatly</text:span><text:span text:style-name="T130"> </text:span><text:span text:style-name="T147">to</text:span><text:span text:style-name="T134"> </text:span><text:span text:style-name="T131">relish</text:span><text:span text:style-name="T125"> </text:span><text:span text:style-name="T138">quill</text:span><text:span text:style-name="T130"> </text:span><text:span text:style-name="T149">tooth-picks,</text:span><text:span text:style-name="T133"> </text:span><text:span text:style-name="T122">and</text:span> <text:span text:style-name="T123">the</text:span><text:span text:style-name="T134"> </text:span><text:span text:style-name="T131">fourth</text:span><text:span text:style-name="T121"> </text:span><text:span text:style-name="T147">had</text:span><text:span text:style-name="T169"> </text:span>a<text:span text:style-name="T149"> </text:span><text:span text:style-name="T131">remarkably</text:span><text:span text:style-name="T133"> </text:span><text:span text:style-name="T131">yawning</text:span><text:span text:style-name="T158"> </text:span><text:span text:style-name="T128">mouth</text:span><text:span text:style-name="T216"> </text:span><text:span text:style-name="T122">and</text:span><text:span text:style-name="T157"> </text:span><text:span text:style-name="T128">very</text:span><text:span text:style-name="T143"> </text:span><text:span text:style-name="T138">unsightly</text:span><text:span text:style-name="T130"> </text:span><text:span text:style-name="T131">nose,</text:span> <text:span text:style-name="T123">and</text:span><text:span text:style-name="T142"> </text:span><text:span text:style-name="T140">so</text:span><text:span text:style-name="T120"> </text:span><text:span text:style-name="T131">on.</text:span><text:span text:style-name="T219"> </text:span><text:span text:style-name="T135">‘The</text:span><text:span text:style-name="T130"> </text:span><text:span text:style-name="T138">enterprising</text:span><text:span text:style-name="T157"> </text:span><text:span text:style-name="T138">editor</text:span><text:span text:style-name="T137"> </text:span><text:span text:style-name="T138">of</text:span><text:span text:style-name="T195"> </text:span><text:span text:style-name="T122">the</text:span><text:span text:style-name="T142"> </text:span><text:span text:style-name="T131">London</text:span><text:span text:style-name="T143"> </text:span><text:span text:style-name="T203">/igaro</text:span><text:span text:style-name="T213"> </text:span><text:span text:style-name="T140">was</text:span><text:span text:style-name="T157"> </text:span><text:span text:style-name="T135">held</text:span><text:span text:style-name="T143"> </text:span><text:span text:style-name="T147">by</text:span> <text:span text:style-name="T132">this</text:span><text:span text:style-name="T130"> </text:span><text:span text:style-name="T135">youth</text:span><text:span text:style-name="T158"> </text:span><text:span text:style-name="T122">and</text:span><text:span text:style-name="T207"> </text:span><text:span text:style-name="T135">his</text:span><text:span text:style-name="T130"> </text:span><text:span text:style-name="T155">co-disciples,</text:span><text:span text:style-name="T153"> </text:span><text:span text:style-name="T118">in</text:span><text:span text:style-name="T230"> </text:span><text:span text:style-name="T138">particular</text:span><text:span text:style-name="T158"> </text:span><text:span text:style-name="T149">detestation,</text:span><text:span text:style-name="T133"> </text:span><text:span text:style-name="T147">and</text:span><text:span text:style-name="T158"> </text:span><text:span text:style-name="T210">he</text:span><text:span text:style-name="T205"> </text:span><text:span text:style-name="T135">per</text:span><text:span text:style-name="T238">sonally</text:span><text:span text:style-name="T239"> </text:span><text:span text:style-name="T131">did</text:span><text:span text:style-name="T143"> </text:span><text:span text:style-name="T135">not</text:span><text:span text:style-name="T153"> </text:span><text:span text:style-name="T138">hesitate</text:span><text:span text:style-name="T130"> </text:span><text:span text:style-name="T122">to</text:span><text:span text:style-name="T142"> </text:span><text:span text:style-name="T128">say</text:span><text:span text:style-name="T153"> </text:span><text:span text:style-name="T128">very</text:span><text:span text:style-name="T143"> </text:span><text:span text:style-name="T131">unpleasant</text:span><text:span text:style-name="T143"> </text:span><text:span text:style-name="T138">things</text:span><text:span text:style-name="T130"> </text:span><text:span text:style-name="T131">of</text:span><text:span text:style-name="T127"> </text:span><text:span text:style-name="T135">that</text:span><text:span text:style-name="T130"> </text:span><text:span text:style-name="T149">journalist,</text:span> <text:span text:style-name="T123">In</text:span><text:span text:style-name="T169"> </text:span><text:span text:style-name="T149">fact,</text:span><text:span text:style-name="T133"> </text:span><text:span text:style-name="T128">the</text:span><text:span text:style-name="T143"> </text:span><text:span text:style-name="T131">gentleman</text:span><text:span text:style-name="T153"> </text:span><text:span text:style-name="T149">indicated</text:span><text:span text:style-name="T125"> </text:span><text:span text:style-name="T122">was,</text:span><text:span text:style-name="T134"> </text:span><text:span text:style-name="T210">on</text:span><text:span text:style-name="T205"> </text:span><text:span text:style-name="T128">one</text:span><text:span text:style-name="T133"> </text:span><text:span text:style-name="T149">occasion,</text:span> <text:span text:style-name="T136">led</text:span><text:span text:style-name="T153"> </text:span><text:span text:style-name="T131">into</text:span><text:span text:style-name="T125"> </text:span>a<text:span text:style-name="T144"> </text:span><text:span text:style-name="T128">very</text:span><text:span text:style-name="T143"> </text:span><text:span text:style-name="T131">serious</text:span><text:span text:style-name="T193"> </text:span><text:span text:style-name="T135">wrangle</text:span><text:span text:style-name="T143"> </text:span><text:span text:style-name="T128">with</text:span><text:span text:style-name="T153"> </text:span><text:span text:style-name="T128">the</text:span><text:span text:style-name="T143"> </text:span><text:span text:style-name="T138">occupants</text:span><text:span text:style-name="T213"> </text:span><text:span text:style-name="T131">of</text:span><text:span text:style-name="T151"> </text:span><text:span text:style-name="T122">the</text:span><text:span text:style-name="T137"> </text:span><text:span text:style-name="T155">gallery,</text:span><text:span text:style-name="T151"> </text:span><text:span text:style-name="T135">headed</text:span> <text:span text:style-name="T123">by</text:span><text:span text:style-name="T169"> </text:span><text:span text:style-name="T122">the</text:span><text:span text:style-name="T169"> </text:span><text:span text:style-name="T135">youth</text:span><text:span text:style-name="T169"> </text:span><text:span text:style-name="T140">in</text:span><text:span text:style-name="T120"> </text:span><text:span text:style-name="T138">question.</text:span></text:p>
          <text:p text:style-name="P114"><text:span text:style-name="T129">The</text:span><text:span text:style-name="T133"> </text:span><text:span text:style-name="T144">Figaro’s</text:span><text:span text:style-name="T193"> </text:span><text:span text:style-name="T149">editor</text:span><text:span text:style-name="T127"> </text:span><text:span text:style-name="T138">could</text:span><text:span text:style-name="T202"> </text:span><text:span text:style-name="T147">at</text:span><text:span text:style-name="T160"> </text:span><text:span text:style-name="T128">one</text:span><text:span text:style-name="T160"> </text:span><text:span text:style-name="T131">time</text:span><text:span text:style-name="T205"> </text:span><text:span text:style-name="T135">never</text:span><text:span text:style-name="T158"> </text:span><text:span text:style-name="T131">take</text:span><text:span text:style-name="T143"> </text:span><text:span text:style-name="T131">his</text:span><text:span text:style-name="T130"> </text:span><text:span text:style-name="T138">place</text:span><text:span text:style-name="T120"> </text:span><text:span text:style-name="T191">in</text:span><text:span text:style-name="T121"> </text:span><text:span text:style-name="T135">the</text:span></text:p>
          <text:p text:style-name="P137"><text:span text:style-name="T139">chaff</text:span><text:span text:style-name="T169"> </text:span><text:span text:style-name="T131">of</text:span><text:span text:style-name="T157"> </text:span><text:span text:style-name="T203">‘‘the</text:span><text:span text:style-name="T142"> </text:span><text:span text:style-name="T144">gods.’’</text:span><text:span text:style-name="T225"> </text:span><text:span text:style-name="T155">‘‘</text:span><text:span text:style-name="T151"> </text:span><text:span text:style-name="T155">There’s</text:span><text:span text:style-name="T169"> </text:span><text:span text:style-name="T122">the</text:span><text:span text:style-name="T142"> </text:span><text:span text:style-name="T138">editor</text:span><text:span text:style-name="T125"> </text:span><text:span text:style-name="T131">of</text:span><text:span text:style-name="T169"> </text:span><text:span text:style-name="T135">that</text:span><text:span text:style-name="T158"> </text:span><text:span text:style-name="T131">penny</text:span><text:span text:style-name="T159"> </text:span><text:span text:style-name="T144">rag,’’</text:span><text:span text:style-name="T143"> </text:span><text:span text:style-name="T135">they</text:span></text:p>
        </draw:text-box>
      </draw:frame>
      <draw:frame draw:style-name="fr2" draw:name="Frame2" text:anchor-type="page" text:anchor-page-number="1" svg:x="0cm" svg:y="0cm" svg:width="30.665cm" draw:z-index="1">
        <draw:text-box fo:min-height="40.64cm">
          <text:p text:style-name="P55"/>
        </draw:text-box>
      </draw:frame>
      <text:h text:style-name="P157" text:outline-level="3"/>
      <text:p text:style-name="P93"><text:span text:style-name="T4">VIAF has a record for “Pascoe, Charles Eyre, 1842-1912 at </text:span><text:a xlink:type="simple" xlink:href="https://viaf.org/viaf/90514675" text:style-name="Internet_20_link" text:visited-style-name="Visited_20_Internet_20_Link"><text:span text:style-name="T4">https://viaf.org/viaf/90514675</text:span></text:a><text:span text:style-name="T4"> also at <text:s/></text:span><text:a xlink:type="simple" xlink:href="https://viaf.org/viaf/282704079" text:style-name="Internet_20_link" text:visited-style-name="Visited_20_Internet_20_Link"><text:span text:style-name="T4">https://viaf.org/viaf/282704079</text:span></text:a><text:span text:style-name="T4"> (which lists 8 works)</text:span></text:p>
      <text:p text:style-name="P93"><text:span text:style-name="T95">N</text:span><text:span text:style-name="T3">ot to be confused with Pascoe, </text:span><text:span text:style-name="T4"><text:s/>Charles Frederick b. 1854 </text:span><text:a xlink:type="simple" xlink:href="https://viaf.org/viaf/26243233" text:style-name="Internet_20_link" text:visited-style-name="Visited_20_Internet_20_Link"><text:span text:style-name="T4">https://viaf.org/viaf/26243233</text:span></text:a><text:span text:style-name="T4">, author of “</text:span>Two hundred years of the S.P.G.: an historical account of the Society for the Propagation of the Gospel in Foreign Parts, 1701-1900. (based on a digest of the Society's records)”</text:p>
      <text:p text:style-name="P65"/>
      <text:p text:style-name="P7">1842: birth 22 June 1842; baptism 29 Jul at Yeovil St John, father Richard, mother Mary <text:span text:style-name="T7">Ann</text:span> <text:span text:style-name="T5">[media/pascoe1842baptism.png] </text:span></text:p>
      <text:p text:style-name="P8"><text:span text:style-name="T5">[media/pascoe1842Birth.png] &lt;</text:span><text:a xlink:type="simple" xlink:href="https://www.ancestry.co.uk/search/collections/8912/records/26760090" text:style-name="Internet_20_link" text:visited-style-name="Visited_20_Internet_20_Link"><text:span text:style-name="T4">https://www.ancestry.co.uk/search/collections/8912/records/26760090</text:span></text:a><text:span text:style-name="T4">&gt;</text:span></text:p>
      <text:p text:style-name="P8"><text:s/></text:p>
      <text:p text:style-name="P8">1851 census shows him age 8 “scholar”, son of Richard Pascoe, Capt Royal Marines, <text:span text:style-name="T8">retired on Half Pay; </text:span><text:s/>Mary <text:span text:style-name="T8">Ann</text:span> age 43; <text:span text:style-name="T8">brother William age 15 “scholar”, born Stonehouse; </text:span>62 Kill<text:span text:style-name="T9">i</text:span>grew <text:span text:style-name="T9">Str</text:span>, Falmouth. <text:span text:style-name="T9">Now Wing Cheung House, chinese take away. </text:span><text:span text:style-name="T10">[media/pascoe1851/pascoe1851Address-1.png &lt;</text:span><text:a xlink:type="simple" xlink:href="https://www.ancestry.co.uk/search/collections/8860/records/17025515" text:style-name="Internet_20_link" text:visited-style-name="Visited_20_Internet_20_Link"><text:span text:style-name="T10">https://www.ancestry.co.uk/search/collections/8860/records/17025515</text:span></text:a><text:span text:style-name="T10">&gt; </text:span><text:span text:style-name="T7">[media/1851census.png]</text:span></text:p>
      <text:p text:style-name="P8"/>
      <text:p text:style-name="P10">1859 “At a competative examination on Tuesday the 27<text:span text:style-name="T11">th</text:span> ult., Mr Charles Eyre Pascoe, sixth son of Major Pascoe, R.M. Light Infantry, received his certificate of qualification from the Civil Service Commissioners; in addition to which an honorary certificate for his creditable knowledge of Euclid”. </text:p>
      <text:p text:style-name="P11">Lake's Falmouth Packet and Cornwall Advertiser Sat, 8 Oct 1859 [media/pascoe1859*.pdf] &lt;https://www.newspapers.com/image/1276458847/&gt;</text:p>
      <text:p text:style-name="P11"/>
      <text:p text:style-name="P15">186<text:span text:style-name="T92">4 </text:span><text:s/><text:span text:style-name="T93">in debt: <text:s/></text:span><text:span text:style-name="T92">“PASCOE, Charles Eyre (Oct 28) clerk in admiralty office, Somerset-house, Hereford-rd-north. Trustee – Thomas Sheffield Robinson, gentleman, Wimpole-st. Deed of arrangement to pay debts by quarterly payments of £5 each. (9561)”</text:span></text:p>
      <text:p text:style-name="P15">"Trust, Composition, and Inspectorship Deeds." Perry's Bankrupt Gazette, 5 Nov. 1864, pp. 780 / 781</text:p>
      <text:p text:style-name="P15"><text:s/>[media/pascoe186<text:span text:style-name="T92">4-</text:span>bankrupt.png] <text:span text:style-name="T93">["Trust, Composition, and Inspectorship Deeds." Perry's Bankrupt</text:span></text:p>
      <text:p text:style-name="P15">Gazette, 5 Nov. 1864, pp. 780 / 781+. British Library Newspapers,</text:p>
      <text:p text:style-name="P15">link.gale.com/apps/doc/IG3220220848<text:span text:style-name="T93">]</text:span></text:p>
      <text:p text:style-name="P15"/>
      <text:p text:style-name="P61">1866 “From the Gazette of yesterday: Bankrupts: … <text:s/>Cornwall-road, Bayswater, clerk in Somerset-house, Oct. 3 at 12. <text:span text:style-name="T14">[media/pascoe186</text:span>6<text:span text:style-name="T14">bankrupt.png] </text:span></text:p>
      <text:p text:style-name="P12"/>
      <text:p text:style-name="P33"/>
      <text:p text:style-name="P83">1867 Les Belges a Londres par Bertram. Bruxelles, A l’Office de Publicite. <text:s/>[describes visit of Belgian/English volunmteers; Pascoe name<text:span text:style-name="T103">d</text:span> as <text:s/>one of two “secretaires honoraires assistants to a committee comprising a dozen noble militaires <text:span text:style-name="T103">i</text:span>. [media/</text:p>
      <text:p text:style-name="P83"/>
      <text:p text:style-name="P33">1867 “The Reception of the Belgians” letter to Royal Cornwall Gazette. <text:span text:style-name="T43">[media/belgianReception_1867.png]<text:tab/> </text:span></text:p>
      <text:p text:style-name="P12"/>
      <text:p text:style-name="P35">1869 father Richard dies</text:p>
      <text:p text:style-name="P35"/>
      <text:p text:style-name="P6">30 aug 1870: St Michael, Chester Sq., marriage between Charles Eyre Pascoe, age 28, bachelor, H.M. Civil Service, <text:span text:style-name="T12">and Jane Catherine Smith, age 25, </text:span>residing 51 cambridge St. <text:span text:style-name="T13">Father</text:span><text:span text:style-name="T95">s:</text:span> Richard William <text:soft-page-break/><text:span text:style-name="T95">Pascoe</text:span>; <text:span text:style-name="T49">Charles Samuel Smith (1817-1885)</text:span> <text:a xlink:type="simple" xlink:href="https://www.ancestry.co.uk/search/collections/8860/records/17025515" text:style-name="Internet_20_link" text:visited-style-name="Visited_20_Internet_20_Link">https://www.ancestry.co.uk/search/collections/8860/records/17025515</text:a> <text:span text:style-name="T7">[media/pascoe1870marriage.png] [media/pascoe1870</text:span><text:span text:style-name="T14">residence</text:span><text:span text:style-name="T7">.png]</text:span></text:p>
      <text:p text:style-name="P39"/>
      <text:p text:style-name="P151">CEP has a fairly complete family tree at </text:p>
      <text:p text:style-name="P38">https://www.familysearch.org/en/tree/person/details/GN65-WLR</text:p>
      <text:p text:style-name="P38"/>
      <text:p text:style-name="P38"><text:a xlink:type="simple" xlink:href="https://www.myheritage.com/research/record-40001-2208778873/charles-eyre-pascoe-in-familysearch-family-tree" text:style-name="Internet_20_link" text:visited-style-name="Visited_20_Internet_20_Link">https://www.myheritage.com/research/record-40001-2208778873/charles-eyre-pascoe-in-familysearch-family-tree</text:a></text:p>
      <text:p text:style-name="P38"/>
      <text:p text:style-name="P36">187<text:span text:style-name="T246">1 </text:span>Daughter Ethel <text:span text:style-name="T246">Mary </text:span>born <text:span text:style-name="T246">in </text:span><text:span text:style-name="T247">USA, but not recorded in Mass. Archives</text:span></text:p>
      <text:p text:style-name="P36"/>
      <text:p text:style-name="P42">Arrives <text:span text:style-name="T44">B</text:span>oston sep 23 1873 with Wife (age 28) and Ethel (“2”) on SS Hecla. Occupn Journalist</text:p>
      <text:p text:style-name="P42">"Massachusetts, Index to Boston Passenger Lists, 1848-1891", <text:span text:style-name="T15">FamilySearch</text:span> (https://www.familysearch.org/ark:/61903/1:1:QV51-5XZJ : Tue Apr 08 23:39:26 UTC 2025), Entry for Charles E Pascoe, 1873.</text:p>
      <text:p text:style-name="P40"/>
      <text:p text:style-name="P89">1872 dec following a a dinner for H.M. Stanley, CEP is among the founder members of the</text:p>
      <text:p text:style-name="P89">celebrated Boston dining club called the Papyrus Club. <text:s/>“We shall, <text:span text:style-name="T242">perhaps, never</text:span> know whether the father of Papyrus was a short and sturdy Briton named Pas<text:span text:style-name="T242">c</text:span>oe, or one who still lingers with us, and who has been sometimes spoken of as ‘ Causeur.’ “ P is named as secretary. “Pa<text:span text:style-name="T243">s</text:span>coe was always called upon to sing “Guy Fawkes,” and was always ready to do it;”</text:p>
      <text:p text:style-name="P154"/>
      <text:p text:style-name="P40"><text:span text:style-name="T41">1874 <text:s/></text:span><text:span text:style-name="T95">Pamphlet: “</text:span><text:span text:style-name="T34">The prohibitory law of Massachusetts versus the licensing law of England : with an account of the latter” &lt;http://hdl.handle.net/2027/hvd.hwh1zw&gt;</text:span></text:p>
      <text:p text:style-name="P17"/>
      <text:p text:style-name="P19">1<text:span text:style-name="T10">8</text:span>75 PO directory shows address 6A Vigo St, off 223 Regent St (W)</text:p>
      <text:p text:style-name="P19">as “editor of Pascoe’s guides”, along with a tailors, financ. <text:span text:style-name="T12">ag</text:span>ts, short makers, wine mrchts [media/pascoe1875POdir1.png] or as “editor of Pascoe’s Guide for American Travellers, Boston &amp; New york” [media/pascoe1875POdir2.png] <text:span text:style-name="T10">[media/pascoe1875Address.png]</text:span></text:p>
      <text:p text:style-name="P19"/>
      <text:p text:style-name="P37">1876 Son Charles C<text:span text:style-name="T56">orbett</text:span>. Born <text:span text:style-name="T56">24 april</text:span> ; <text:span text:style-name="T56">baptised 13 oct 1876 Wimbledon [media/pascoe1876baptism.png] fathers profession given as “journalist”</text:span></text:p>
      <text:p text:style-name="P37"/>
      <text:p text:style-name="P69"><text:bookmark-start text:name="__DdeLink__21051_1107220413"/><text:span text:style-name="T95">1876 </text:span><text:s/><text:span text:style-name="T95">Article “I</text:span>n Memoriam: Temple Bar.” Illus. <text:s text:c="2"/><text:span text:style-name="T95">New York: </text:span>Appleton’s journal. <text:s/>vol 2 <text:s/>pp 75-8<text:span text:style-name="T95">1</text:span></text:p>
      <text:p text:style-name="P69"/>
      <text:p text:style-name="P69"><text:span text:style-name="T95">1877 “An </text:span>English By-Lane”, <text:s text:c="2"/><text:span text:style-name="T95">New York: </text:span>Appleton’s journal. <text:s/><text:span text:style-name="T95">Vol 1</text:span> <text:span text:style-name="T95"><text:s/></text:span>pp 231-233</text:p>
      <text:p text:style-name="P69"><text:bookmark-end text:name="__DdeLink__21051_1107220413"/></text:p>
      <text:p text:style-name="P34">1877 jan, A Practical Handbook to the Principal Schools of England, noticed in Examiner “This is <text:s/>excee<text:span text:style-name="T30">d</text:span>ingly useful work, and one that was much wanted…” [media/pascoe1877review.png</text:p>
      <text:p text:style-name="P13"/>
      <text:p text:style-name="P13">1877 <text:span text:style-name="T28">june </text:span>Review of Art Gallery directory in the Examiner [media/pascoe1877examinerReview.png]</text:p>
      <text:p text:style-name="P69"/>
      <text:p text:style-name="P34"><text:span text:style-name="T29">18</text:span>78 Aug Review in PMG of <text:s/>practical handbook to the principal professions. [media/pascoe1878pmgreview.png]</text:p>
      <text:p text:style-name="P34"/>
      <text:p text:style-name="P92"><text:span text:style-name="T92">1878 Oct Review of A</text:span> practical handbook to the principal professions.<text:bookmark-start text:name="__DdeLink__18375_1335538775"/> <text:span text:style-name="T15">The Spectator, 51</text:span>, 1280. <text:span text:style-name="T91">1878</text:span><text:bookmark-end text:name="__DdeLink__18375_1335538775"/></text:p>
      <text:p text:style-name="P92"><text:soft-page-break/><text:span text:style-name="T95">1878 </text:span><text:span text:style-name="T91"><text:s/>Review of Dramatic List in Morning Post <text:s/>[media/pascoe1878MPostReview.png]</text:span></text:p>
      <text:p text:style-name="P20">1879 Review of Dramatic List by Joseph Knight, Athenaeum 12/4, pp 483-4</text:p>
      <text:p text:style-name="P20">1879 Review of Dramatic List . <text:span text:style-name="T14">Era [media/pascoe1879eraReview.png]</text:span></text:p>
      <text:p text:style-name="P20"/>
      <text:p text:style-name="P1"><text:span text:style-name="T62">O</text:span>ur Actors and Actresses.</text:p>
      <text:p text:style-name="P20">Under the title of “Our Dramatic List,” Mr C. E. Pas<text:span text:style-name="T62">coe gives</text:span> in <text:span text:style-name="T62">a</text:span> compact volume a record of the performances of <text:span text:style-name="T62">living </text:span>actors and actresses of the British Stage. The work is published by Mr David Bogue, of St. Martin’s-place, Trafalgar-square, and will serve as a useful memorial of some of the</text:p>
      <text:p text:style-name="P20">most important representations of the present time. The book is arranged in alphabetical style, so that the name of the actor or actress and their chief performances may be readily ascertained. All the best known of our popular performers are included in the work, which we can easily imagine has cost</text:p>
      <text:p text:style-name="P20">the author no little time and trouble. As a work of reference for the actor or the playgoer it will be welcome, as those who wish to recall a<text:span text:style-name="T62">n</text:span>y special performance, or the characters </text:p>
      <text:p text:style-name="P21">sustained by any popular histrionic celebrity, will be enabled t<text:span text:style-name="T62">o </text:span>do so with ease by referring to a work of this kind. We say nothing on the score of dramatic criticism, because a work of <text:s/>this kind should be and is rather a record of actual work done than a critical inquiry as to its merits. ‘Dramatic Notes,” by</text:p>
      <text:p text:style-name="P20">the same author, is a series of sketches of performances now proceeding at our principal Theatres, with illustrations of some of the chief scenes in the pieces,</text:p>
      <text:p text:style-name="P20"/>
      <text:p text:style-name="P20">1879 Review of Dramatic List <text:s/>, <text:span text:style-name="T14">Literary Examiner [media/pascoe1879litexamReview.png]</text:span></text:p>
      <text:p text:style-name="P20"/>
      <text:p text:style-name="Standard"><text:span text:style-name="T61">1879 </text:span><text:a xlink:type="simple" xlink:href="https://www.cambridge.org/core/books/schools-for-girls-and-colleges-for-women/CB6375EBBAD917878EE61D12A08B0C83" text:style-name="Internet_20_link" text:visited-style-name="Visited_20_Internet_20_Link"><text:span text:style-name="T60">Schools for Girls and Colleges for Women</text:span></text:a><text:span text:style-name="T59"> A Handbook of Female Education Chiefly Designed for the Use of Persons of the Upper Middle Class <text:s/></text:span></text:p>
      <text:p text:style-name="P45"><draw:frame draw:style-name="fr1" draw:name="Frame1" text:anchor-type="char" svg:width="0.041cm" draw:z-index="0"><draw:text-box fo:min-height="0.041cm"><text:p text:style-name="P55">[Opens in a new window]</text:p></draw:text-box></draw:frame><text:span text:style-name="T51">DOI: </text:span><text:a xlink:type="simple" xlink:href="https://doi.org/10.1017/CBO9781107338159" office:target-frame-name="_blank" xlink:show="new" text:style-name="Internet_20_link" text:visited-style-name="Visited_20_Internet_20_Link"><text:span text:style-name="T50">https://doi.org/10.1017/CBO9781107338159</text:span></text:a></text:p>
      <text:p text:style-name="P46">Publisher: Cambridge University Press</text:p>
      <text:p text:style-name="P46">Print publication year: 2013</text:p>
      <text:p text:style-name="P46"/>
      <text:p text:style-name="P54">1879 jun: Review of schools for girls in PMG [media/pascoe1879pmgreview.png]</text:p>
      <text:p text:style-name="P54"><text:bookmark-start text:name="__DdeLink__18400_1335538775"/><text:span text:style-name="T58">N</text:span>EW BOOKS AND NEW EDITIONS.<text:bookmark-end text:name="__DdeLink__18400_1335538775"/></text:p>
      <text:p text:style-name="P54">“<text:bookmark-start text:name="__DdeLink__18402_1335538775"/>Schools for Gi<text:span text:style-name="T52">rls </text:span>and C<text:span text:style-name="T52">o</text:span>lleg<text:span text:style-name="T52">e</text:span>s for Women : Handbook of Female Educat<text:span text:style-name="T52">i</text:span>on <text:span text:style-name="T52">chiefl</text:span>y designed for the use <text:span text:style-name="T56">o</text:span>f Pe<text:span text:style-name="T56">rs</text:span>ons of the Upper Middle Class; together with some Chapters on the H<text:span text:style-name="T56">i</text:span>gher Employment of Women” By Ch<text:span text:style-name="T53">arl</text:span>es <text:span text:style-name="T53">Eyre </text:span>Pasc<text:span text:style-name="T53">o</text:span>e) (Hardwicke and Bogue) ‘The author of this handboo<text:span text:style-name="T56">k l</text:span>aments the want of gi<text:span text:style-name="T56">r</text:span>l<text:span text:style-name="T56">s</text:span>’ schools su<text:span text:style-name="T56">ita</text:span>ble for pe<text:span text:style-name="T56">r</text:span>sons of limited income, and considers that in every large town a schoo<text:span text:style-name="T56">l</text:span> for g<text:span text:style-name="T56">ir</text:span>ls should be e<text:span text:style-name="T56">stabli</text:span>shed si<text:span text:style-name="T58">imilar</text:span> in cha<text:span text:style-name="T56">r</text:span>acter and purpose to the Clty of London School for bo<text:span text:style-name="T56">y</text:span>s. This is the object which the Gi<text:span text:style-name="T58">rls</text:span>’ Public Day School Company <text:span text:style-name="T58">is</text:span> seeking to accomplish; aod, cons<text:span text:style-name="T58">i</text:span>dering the success they have met with in London and the provinces, they a<text:span text:style-name="T58">r</text:span>e likely to supply a very distinct want. <text:span text:style-name="T58">Mr. </text:span>Pascoe qu<text:span text:style-name="T58">ot</text:span>es with. approval the sound remark that the t<text:span text:style-name="T58">r</text:span>ue meas<text:span text:style-name="T58">ure </text:span>of <text:span text:style-name="T58">a woman</text:span>'s <text:span text:style-name="T58">ri</text:span>ght to k<text:span text:style-name="T58">n</text:span>owledge is her capacity for rece<text:span text:style-name="T58">i</text:span>vi<text:span text:style-name="T58">n</text:span>g i<text:span text:style-name="T58">r</text:span> and <text:span text:style-name="T58">n</text:span>ot a<text:span text:style-name="T58">n</text:span>y theories of c<text:span text:style-name="T58">o</text:span>u<text:span text:style-name="T58">r</text:span>s as to what she <text:span text:style-name="T58">i</text:span>s <text:span text:style-name="T58">fi</text:span>t for or what she is lik<text:span text:style-name="T58">e</text:span>ly to make of i<text:span text:style-name="T58">t</text:span>; and be cannot understand why the education of a daughter should <text:span text:style-name="T58">les</text:span>s an <text:span text:style-name="T58">o</text:span>bject of sol<text:span text:style-name="T58">ici</text:span>tude with paren<text:span text:style-name="T58">t</text:span>s than the ed<text:span text:style-name="T58">u</text:span>cation of a son. <text:span text:style-name="T58">I</text:span>n a ch<text:span text:style-name="T58">a</text:span>pter devoted to Jun<text:span text:style-name="T58">io</text:span>r Local Examinations M<text:span text:style-name="T58">r</text:span>. Pascoe sn<text:span text:style-name="T58">e</text:span>ers at the notion that <text:span text:style-name="T58">gir</text:span>ls should be especially prepared for them, an<text:span text:style-name="T58">d</text:span>, af<text:span text:style-name="T58">t</text:span>er givi<text:span text:style-name="T58">n</text:span>g some examples from the papers set to candidates, asks whether they <text:span text:style-name="T58">r</text:span>epre<text:span text:style-name="T58">s</text:span>en t<text:span text:style-name="T58">o</text:span>o high a standard for a gi<text:span text:style-name="T58">rl</text:span> of si<text:span text:style-name="T58">x</text:span>teen, He complains that ou<text:span text:style-name="T58">r d</text:span>au<text:span text:style-name="T58">g</text:span>h<text:span text:style-name="T58">t</text:span>ers are t<text:span text:style-name="T58">au</text:span>ght the subjects dealt with at the Oxford and Cambridge Local Examinations <text:span text:style-name="T58">a</text:span>s if those <text:span text:style-name="T58">su</text:span>bje<text:span text:style-name="T58">c</text:span>ts ma<text:span text:style-name="T58">r</text:span>ked the culminating <text:soft-page-break/>point of woman's education, <text:span text:style-name="T58">bu</text:span>t ticks not<text:span text:style-name="T58">wi</text:span>th<text:span text:style-name="T58">s</text:span>t<text:span text:style-name="T58">a</text:span>nding that the best guarantee of <text:span text:style-name="T58">a </text:span>School's ef<text:span text:style-name="T58">fi</text:span>ci<text:span text:style-name="T58">e</text:span>ncy <text:span text:style-name="T58">is</text:span> the fact that pupils trained in it have obtalned with “<text:span text:style-name="T58">honours” or without</text:span>, the “loc<text:span text:style-name="T58">a</text:span>l examinations” certificate of the universities and <text:span text:style-name="T58">Co</text:span>llege of Precepts. <text:s/><text:span text:style-name="T58">Info</text:span>rmation of every <text:span text:style-name="T58">k</text:span>ind <text:span text:style-name="T58">li</text:span>ke<text:span text:style-name="T58">l</text:span>y to as<text:span text:style-name="T58">s</text:span>ist a parent in the choice of school will be found in thee pages, which abound with deta<text:span text:style-name="T58">il</text:span>s and e<text:span text:style-name="T58">st</text:span>imates of <text:span text:style-name="T58">c</text:span>ost. <text:s/>Gi<text:span text:style-name="T58">rls’</text:span> <text:span text:style-name="T58">sc</text:span>hools, in general, the writer s<text:span text:style-name="T58">a</text:span>y<text:span text:style-name="T58">s</text:span>, are Iackirg i<text:span text:style-name="T58">n</text:span> s<text:span text:style-name="T58">t</text:span>imul<text:span text:style-name="T58">u</text:span>s ard inducement to work: but it w<text:span text:style-name="T58">o</text:span>uld be more comect to <text:span text:style-name="T58">sa</text:span>y th<text:span text:style-name="T58">a</text:span>t they we<text:span text:style-name="T58">r</text:span>e formely de<text:span text:style-name="T58">fi</text:span>c<text:span text:style-name="T58">i</text:span>ent in these respect; for the examinations <text:span text:style-name="T58">no</text:span>w <text:span text:style-name="T58">s</text:span>o c<text:span text:style-name="T58">om</text:span>mon supply the stimulus <text:span text:style-name="T58">t</text:span>hat was lacking. The fear <text:span text:style-name="T58">i</text:span>s lest these examinations should be t<text:span text:style-name="T58">rea</text:span>ted a<text:span text:style-name="T58">s</text:span> of pri<text:span text:style-name="T58">m</text:span>ary importance, and all school work <text:s/>made to tu<text:span text:style-name="T58">r</text:span>n upon them. The wish to pass an examination <text:span text:style-name="T58">c</text:span>re<text:span text:style-name="T58">d</text:span>it<text:span text:style-name="T58">a</text:span>bly may act as <text:span text:style-name="T58">a</text:span> spur to the students; bu<text:span text:style-name="T58">t</text:span> success of this sort <text:span text:style-name="T58">is no</text:span>t the <text:span text:style-name="T58">o</text:span>bject of ed<text:span text:style-name="T58">uca</text:span>t<text:span text:style-name="T58">i</text:span>on. We may add. that Mr. Pascoe supplies ample information with regard to women's colleges, and the <text:span text:style-name="T58">h</text:span>igher or <text:span text:style-name="T58">uni</text:span>ve<text:span text:style-name="T58">r</text:span>s<text:span text:style-name="T58">i</text:span>ty <text:span text:style-name="T58">education of women.</text:span><text:bookmark-end text:name="__DdeLink__18402_1335538775"/></text:p>
      <text:p text:style-name="P74"><text:bookmark-start text:name="__DdeLink__20974_1107220413"/><text:span text:style-name="T79">187</text:span><text:span text:style-name="T78">9</text:span><text:span text:style-name="T79"> <text:s/>“Great Public Schools of Englan</text:span><text:span text:style-name="T78">d</text:span><text:span text:style-name="T79">” </text:span><text:span text:style-name="T78">series </text:span><text:span text:style-name="T79"><text:s/></text:span><text:span text:style-name="T78">of articles <text:s/></text:span><text:span text:style-name="Strong_20_Emphasis"><text:span text:style-name="T72">The Leisure hour, Jan. 1877-Oct. 1903:</text:span></text:span></text:p>
      <text:p text:style-name="P74"><text:span text:style-name="T81">`</text:span><text:span text:style-name="T80">C</text:span><text:span text:style-name="T81">hrist’s Hospital’</text:span><text:span text:style-name="T80"> </text:span><text:span text:style-name="T74"><text:s/>(Mar 1, 1879): </text:span><text:span text:style-name="T78">issue 1418 pp </text:span><text:span text:style-name="T74">135-140. </text:span></text:p>
      <text:p text:style-name="P73"><text:span text:style-name="T81">`The Charterhouse School’ (Jul 26, 1879): <text:s/></text:span><text:span text:style-name="T74">Iss</text:span><text:span text:style-name="T81">ue </text:span><text:span text:style-name="T74">1439, </text:span><text:span text:style-name="T81">pp </text:span><text:span text:style-name="T74"><text:s/>471-475. </text:span></text:p>
      <text:p text:style-name="P73"><text:span text:style-name="T81">`St Paul’s School’ (Nov 29, 1879): </text:span><text:span text:style-name="T74">Iss</text:span><text:span text:style-name="T81">ue </text:span><text:span text:style-name="T74">1457, </text:span><text:span text:style-name="T81">pp </text:span><text:span text:style-name="T74">763-766. </text:span></text:p>
      <text:p text:style-name="P73"><text:span text:style-name="T81">`Merchant Taylors’ School (Dec 13, 1879): Issue </text:span><text:span text:style-name="T74">1459, </text:span><text:span text:style-name="T81">pp </text:span><text:span text:style-name="T74">796-800. </text:span><text:bookmark-end text:name="__DdeLink__20974_1107220413"/></text:p>
      <text:p text:style-name="P12"><text:span text:style-name="T96">1</text:span>880 ? notice of Dramatic Notes publication [media/pascoe1880review.png]</text:p>
      <text:p text:style-name="P12"/>
      <text:p text:style-name="P22">1881 census shows Charles E Pascoe, married to Jane <text:span text:style-name="T17">C</text:span>, age 38, “Retired Civil Servant author”, born Yeovil; <text:span text:style-name="T17">2 Mayfield Villas, Merton Rd: also Ethel </text:span><text:span text:style-name="T246">M </text:span><text:span text:style-name="T29">(age 8) <text:s/></text:span><text:span text:style-name="T246">born Boston</text:span><text:span text:style-name="T17">, Charles </text:span><text:span text:style-name="T29">C</text:span><text:span text:style-name="T17">, </text:span><text:span text:style-name="T29">(age 5) </text:span><text:span text:style-name="T17"><text:s/>and Mary</text:span><text:span text:style-name="T29">Hart </text:span><text:span text:style-name="T17"><text:s/>(servt) </text:span><text:span text:style-name="T5">[media/pascoe1881census.png]</text:span></text:p>
      <text:p text:style-name="P22"/>
      <text:p text:style-name="P36">1881 Mary Agnes born, Wandsworth</text:p>
      <text:p text:style-name="P50"/>
      <text:p text:style-name="P50"><text:span text:style-name="T32">1881 “</text:span><text:span text:style-name="T45">Everyday Life in Our Public Schools. </text:span>Sketched by Head-scholars of Eton, Winchester, Westminster, Shrewsbury, Harrow, Rugby, Charterhouse : to which is Added a Brief Notice of St. Paul's and Merchant Taylors' Schools, and Christ's Hospital : with a Glossary of Some Words in Common Use in Those Schools” <text:s/><text:span text:style-name="T31">Griffith and Farran , new rev ed 1889 </text:span><text:span text:style-name="T32">in Hathitrust</text:span></text:p>
      <text:p text:style-name="P50"/>
      <text:p text:style-name="P23">1882 Electoral Reg shows Pascoe Charles E, occupying as tenant 2 St Marys Terrace, Garratt, Wandsworth <text:span text:style-name="T18">[since demolished if it’s the one in W2; Garratt Lane exists in Wandsworth, but no S</text:span><text:span text:style-name="T19">t</text:span><text:span text:style-name="T18"> Mary’s Terr.]</text:span></text:p>
      <text:p text:style-name="P70"/>
      <text:p text:style-name="P155" loext:marker-style-name="T39"><text:span text:style-name="T36">1884 </text:span><text:span text:style-name="T34">Where shall I Educate my Son? A manual for parents of moderate means<text:line-break/></text:span><text:span text:style-name="T37">&lt;publisher&gt;</text:span><text:span text:style-name="T34">Houlston </text:span><text:span text:style-name="T38">&amp;amp;</text:span><text:span text:style-name="T34"> Sons </text:span><text:span text:style-name="T37">&lt;/publisher&gt;</text:span><text:span text:style-name="T34"><text:line-break/></text:span><text:span text:style-name="T37"> &lt;https://babel.hathitrust.org/cgi/pt?id=mdp.39015062727741&amp;seq=5&gt;</text:span></text:p>
      <text:p text:style-name="P8"/>
      <text:p text:style-name="P28"><text:bookmark-start text:name="__DdeLink__20977_1107220413"/><text:span text:style-name="T14">1884 “Am</text:span><text:span text:style-name="T20">erican</text:span><text:span text:style-name="T14"> Payments </text:span><text:span text:style-name="T21">to </text:span><text:span text:style-name="T14">English Authors” letter in </text:span><text:a xlink:type="simple" xlink:href="https://www.proquest.com/docview/9520051?accountid=13042&amp;pq-origsite=primo&amp;sourcetype=Historical%20Periodicals#" text:style-name="Internet_20_link" text:visited-style-name="Visited_20_Internet_20_Link"><text:span text:style-name="T14">The Athenaeum</text:span></text:a><text:bookmark text:name="publicationPreview-MSTAR_9520051"/><text:span text:style-name="Strong_20_Emphasis"><text:span text:style-name="T14">; London</text:span></text:span><text:a xlink:type="simple" xlink:href="https://www.proquest.com/indexingvolumeissuelinkhandler/2299/The+Athenaeum/01884Y11Y08$23Nov+8,+1884$3b++$282976$29/$B/2976?accountid=13042" text:style-name="Internet_20_link" text:visited-style-name="Visited_20_Internet_20_Link"><text:span text:style-name="T14"> Iss. 2976, </text:span></text:a><text:span text:style-name="T14"> (Nov 8, 1884): 592-592. <text:s text:c="2"/>[media/pascoe1884AthPayments-1.png][media/pascoe1884AthPayments-2.png]</text:span></text:p>
      <text:p text:style-name="P28"><text:bookmark-end text:name="__DdeLink__20977_1107220413"/></text:p>
      <text:p text:style-name="P28">“AMERICAN PAYMENTS TO ENGLISH AUTHORS. From London Athenaeum.</text:p>
      <text:p text:style-name="P28"/>
      <text:p text:style-name="P152">PERHAPS the following facts may have an interest for English authors whose works are occasionally reprinted in America without their leave and without compensation. The other day I received a letter <text:soft-page-break/>from a firm of Boston publishers asking me if I would ascertain the address of a certain English author whose books are published anonymously, because, wrote they, “‘we want to pay her something.’’ Being naturally solicitous that this message of conciliation and justice should reach the author as speedily as possible, I enclosed a stamped unaddressed letter to him (or her) in a letter to his (or her) London publisher. I waited some little time for a reply, and not receiving any acknowledgment one way or the other, I wrote again to the London publisher. I said that I had ventured to trouble him with my former letter, which had reference to the payment of some money, because. at the moment, I knew of no better way of reaching the author, and that if my letter had not been forwarded, I might consider the propriety of publishing an advertisement in the Atheneum, This elicited a reply, saying, ‘‘ The author is at present abroad, and will no doubt send an answer to your note if he considers one necessary ; but having many similar ones [the italics are mine] from other people, he may not feel called upon to do so.”’</text:p>
      <text:p text:style-name="P152"/>
      <text:p text:style-name="P153">This last paragraph is so rich that I ask permission to submit it to your consideration. <text:s/><text:span text:style-name="T240">It appears to be a fact that there is at least one </text:span>English author in existence who can boast receiving ‘‘ many’’ letters having reference to the payment of American copyright money, and who can afford to ignore them. It is hardly of much interest to your readers to know that, though acting as ‘‘ literary agent” in England for the Boston firm in question, I am no more answerable for what English books they publish than the man in the moon. lam as earnest an advocate of international copyright as their honesty in this case leads me to hope they are; and whenever the opportunity has served during the past twelve years, I have done my utmost with them and others in America to insist on the right of the English author to a fair measure of compensation. Perhaps, after all, the London publisher may have misjudged his client. | shall rest in hope. CHARLES Eyre Pasco </text:p>
      <text:p text:style-name="P153"><text:span text:style-name="Strong_20_Emphasis"><text:span text:style-name="T78"/></text:span></text:p>
      <text:p text:style-name="P153"><text:bookmark-start text:name="__DdeLink__20979_1107220413"/><text:span text:style-name="Strong_20_Emphasis"><text:span text:style-name="T78">1884 `Buying a house’ </text:span></text:span><text:span text:style-name="Strong_20_Emphasis"><text:span text:style-name="T74">The Leisure hour, Jan. 1877-Oct. 1903; Londo</text:span></text:span><text:span text:style-name="T74"> ay 1884): 294-298. &lt;</text:span><text:span text:style-name="T77">buyingHouse1884.pdf&gt;</text:span><text:bookmark-end text:name="__DdeLink__20979_1107220413"/></text:p>
      <text:p text:style-name="P25"/>
      <text:p text:style-name="P25"><text:span text:style-name="T33">1885 </text:span>London of today. An illustrated handbook for the season; <text:span text:style-name="T33">Boston: Roberts Brothers, 1885. &lt;</text:span><text:a xlink:type="simple" xlink:href="https://babel.hathitrust.org/cgi/pt?id=nyp.33433071387207&amp;seq=13" text:style-name="Internet_20_link" text:visited-style-name="Visited_20_Internet_20_Link"><text:span text:style-name="T33">https://babel.hathitrust.org/cgi/pt?id=nyp.33433071387207&amp;seq=13</text:span></text:a><text:span text:style-name="T33">&gt;</text:span></text:p>
      <text:p text:style-name="P25"/>
      <text:p text:style-name="P82"><text:span text:style-name="T102">1885: A.W. Pinero writes to Augustin Daly <text:s/>“Mr Pascoe has written me for particulars of your company. I have answered his letter with especial reference to your performances of old English comedy.,” <text:s/>[</text:span><text:span text:style-name="T45">The collected letters of Sir Arthur Pinero </text:span><text:span text:style-name="T102">no 57, p.85] &lt;</text:span>ark:/13960/t7qp3rb77 &gt;</text:p>
      <text:p text:style-name="P25"/>
      <text:p text:style-name="P25"><text:span text:style-name="T33">1</text:span>886 Review of “Londo<text:span text:style-name="T27">n</text:span> of Today” , Pall Mall Gazette, 1886 [media/pascoe1886pmgRev.png]</text:p>
      <text:p text:style-name="P14"/>
      <text:p text:style-name="P26"><text:bookmark-start text:name="__DdeLink__23972_1107220413"/><text:bookmark-start text:name="__DdeLink__20981_1107220413"/>1886 Letter complaining about performance hours Daily News, 1886 <text:s/>[media/pascoe1886dailynewsLetter.png]</text:p>
      <text:p text:style-name="P26">“</text:p>
      <text:p text:style-name="P26">Mr. Pascoe, author of the “Dramatic List”</text:p>
      <text:p text:style-name="P26">and other well-known publications, sends us the</text:p>
      <text:p text:style-name="P26">following note regarding a grievance which,</text:p>
      <text:p text:style-name="P26">judging from the letters w<text:span text:style-name="T248">e</text:span> receive from time</text:p>
      <text:p text:style-name="P26">to time, is widely felt by a large and important</text:p>
      <text:p text:style-name="P26">section of the playgoing <text:s/>public:</text:p>
      <text:p text:style-name="P26"/>
      <text:p text:style-name="P26">Is this a subject you would draw attention to? I</text:p>
      <text:p text:style-name="P26">feel sure it is one of some interest to many. In these</text:p>
      <text:p text:style-name="P26">times of co-operation and cheap trading, is there no</text:p>
      <text:p text:style-name="P26">manager of a London theatre wise and enterprising</text:p>
      <text:p text:style-name="P26"><text:soft-page-break/>enough to conciliate the interests of a very large section</text:p>
      <text:p text:style-name="P26">of the middle-class—the hard-working and thrifty?</text:p>
      <text:p text:style-name="P26">The most of that class rise early and go to bed early,</text:p>
      <text:p text:style-name="P26">and live in the suburbs. It ordinarily dines at six and</text:p>
      <text:p text:style-name="P26">gets to bed about 11. Moreover, it can afford a few</text:p>
      <text:p text:style-name="P26">pounds a year, for amusements and holidays.</text:p>
      <text:p text:style-name="P26">Because Mayfair, which neither toils nor spins,</text:p>
      <text:p text:style-name="P26">turns night into day, and chooses to dine when all sen-</text:p>
      <text:p text:style-name="P26">sible folk are thinking of going to bed, no inconsiderable</text:p>
      <text:p text:style-name="P26">section of this middle-class is debarred going to the</text:p>
      <text:p text:style-name="P26">theatres. The stall régime, for which we have to thank</text:p>
      <text:p text:style-name="P26">Mr Bancroft, is becoming an intolerable nuisance. The</text:p>
      <text:p text:style-name="P26">managers seem to think there is no public out-</text:p>
      <text:p text:style-name="P26">side of Mayfair, aud we of liberal tendencies (as to our</text:p>
      <text:p text:style-name="P26">shillings for the play) and of Home Rule influences</text:p>
      <text:p text:style-name="P26">suburbwise are, forsooth, compelled to accept an alien</text:p>
      <text:p text:style-name="P26">form of government most foreign to our tastes. We</text:p>
      <text:p text:style-name="P26">have to pay 10s. for a stall when 6s. are amply suffi-</text:p>
      <text:p text:style-name="P26">cient; to wait till 6.15 for our play when 7.30</text:p>
      <text:p text:style-name="P26">is a reasonable hour for its commencement; and to be</text:p>
      <text:p text:style-name="P26">content to get to bed at 1 when 11 is an hour</text:p>
      <text:p text:style-name="P26">beyond which a wise man will not wish to be kicking</text:p>
      <text:p text:style-name="P26">his heels about.outside of it. Who will rise and deliver</text:p>
      <text:p text:style-name="P26">us from this aristocratic thraldom? What has Mayfair</text:p>
      <text:p text:style-name="P26">to do with Putney that it should be thus dictated to by</text:p>
      <text:p text:style-name="P26">an oligarchy of voluptuous diners at eight, with which,</text:p>
      <text:p text:style-name="P26">Conservative, alas! as it is, Putney should have no</text:p>
      <text:p text:style-name="P26">affinity, Our ancestors, whose rule it would</text:p>
      <text:p text:style-name="P26">conserve, dined early and went to bed early, and got</text:p>
      <text:p text:style-name="P26">home from the theatre at 10. - I am, &amp;c., Charles E.</text:p>
      <text:p text:style-name="P26">Pascoe.</text:p>
      <text:p text:style-name="P26"><text:bookmark-end text:name="__DdeLink__23972_1107220413"/></text:p>
      <text:p text:style-name="P26">“</text:p>
      <text:p text:style-name="P50"><text:bookmark-end text:name="__DdeLink__20981_1107220413"/></text:p>
      <text:p text:style-name="P84">Report of the Committee on the Library of the Bostonian Society, agm 1887: CEP donated one volume.</text:p>
      <text:p text:style-name="P50"/>
      <text:p text:style-name="P90">[leisureHour50yrs.pdf, page 187]</text:p>
      <text:p text:style-name="P91"><text:bookmark-start text:name="__DdeLink__20983_1107220413"/><text:span text:style-name="T78">1887 `</text:span><text:span text:style-name="T80">A R</text:span><text:span text:style-name="T78">amble round Windsor’ </text:span><text:span text:style-name="T74">  </text:span><text:span text:style-name="Strong_20_Emphasis"><text:span text:style-name="T74">The Leisure hour, Jan. 1877-Oct. 1903; London</text:span></text:span><text:span text:style-name="T74"> (Apr 1887): 251-260. </text:span></text:p>
      <text:p text:style-name="P94"><text:span text:style-name="T78">1888 `The Queen’s Homes’ <text:s/>( series of articles): </text:span><text:span text:style-name="T72"><text:s/></text:span><text:span text:style-name="Strong_20_Emphasis"><text:span text:style-name="T72">The Leisure hour, Jan. 1877-Oct. 1903</text:span></text:span><text:span text:style-name="Strong_20_Emphasis"><text:span text:style-name="T78"> : </text:span></text:span><text:span text:style-name="Strong_20_Emphasis"><text:span text:style-name="T74"><text:s/></text:span></text:span><text:span text:style-name="Strong_20_Emphasis"><text:span text:style-name="T75">Jan </text:span></text:span><text:span text:style-name="Strong_20_Emphasis"><text:span text:style-name="T74">1888, pp. 16-21; </text:span></text:span><text:span text:style-name="Strong_20_Emphasis"><text:span text:style-name="T71"><text:s/>Feb 1888: 115-123; <text:s/></text:span></text:span><text:span text:style-name="Strong_20_Emphasis"><text:span text:style-name="T74">Mar 1888: 167-174. </text:span></text:span><text:span text:style-name="Strong_20_Emphasis"><text:span text:style-name="T76">(Frogmore House. Illus Victor Prout); </text:span></text:span><text:span text:style-name="Strong_20_Emphasis"><text:span text:style-name="T73"><text:s/></text:span></text:span><text:span text:style-name="Strong_20_Emphasis"><text:span text:style-name="T74">Apr 1888: 237-241; <text:s/></text:span></text:span><text:span text:style-name="T74">May 1888: 317-324. ; </text:span><text:span text:style-name="T82">Jul 1888: 515-524 <text:s/>(Windsor Castle &amp; Virginia Water);’ </text:span><text:span text:style-name="T74">Aug 1888: 515-524; <text:s/>Sep 1888: 598-604; </text:span><text:span text:style-name="T78">Nov 1888 :</text:span><text:span text:style-name="T74"> 753-759 </text:span><text:span text:style-name="T78">(Balmoral).</text:span><text:span text:style-name="T74"> </text:span></text:p>
      <text:p text:style-name="P91"><text:span text:style-name="T78">1888 `Downing Street: </text:span><text:span text:style-name="T79">the Official Residence of the First Lord of the Treasury. W</text:span><text:span text:style-name="T77">ith</text:span><text:span text:style-name="T79"> Illustrations by Philip Norman.</text:span><text:span text:style-name="T74"> </text:span><text:span text:style-name="Strong_20_Emphasis"><text:span text:style-name="T74">The Leisure hour, Jan. 1877-Oct. 1903; London</text:span></text:span><text:span text:style-name="T74"> (Jun 1888): 374-384. </text:span></text:p>
      <text:p text:style-name="P91"><text:bookmark-end text:name="__DdeLink__20983_1107220413"/><text:span text:style-name="T74"/></text:p>
      <text:p text:style-name="P80"><text:span text:style-name="T40">188? </text:span><text:span text:style-name="T34">Brighton : a pocket-book of local information for visitors. &lt;http://hdl.handle.net/2027/hvd.hn3b5s</text:span></text:p>
      <text:p text:style-name="P79"><text:soft-page-break/><text:span text:style-name="T74"/></text:p>
      <text:p text:style-name="P24"><text:bookmark-start text:name="__DdeLink__20985_1107220413"/>1889 Discussion of Maybrick case [media/pascoe1889Maybrick.png] <text:s/><text:bookmark-end text:name="__DdeLink__20985_1107220413"/></text:p>
      <text:p text:style-name="P71"/>
      <text:p text:style-name="P83">1889 quoted in Notes &amp; Queries [p 317 viii. <text:s/>Oct <text:s/>19, ‘89]</text:p>
      <text:p text:style-name="P83">i</text:p>
      <text:p text:style-name="P72"><text:span text:style-name="T40">1887 </text:span>The joyous neighbourhood of Covent Garden : a literary souvenir of the Tavistock Hotel, done in celebration of its hundredth anniversary. <text:s/><text:span text:style-name="T40">Illus John Jellicoe, &lt;</text:span><text:a xlink:type="simple" xlink:href="https://hdl.handle.net/2027/hvd.32044088989520" text:style-name="Internet_20_link" text:visited-style-name="Visited_20_Internet_20_Link"><text:span text:style-name="T40">https://hdl.handle.net/2027/hvd.32044088989520</text:span></text:a><text:span text:style-name="T40">&gt;</text:span></text:p>
      <text:p text:style-name="P72"><text:span text:style-name="T40">&lt;</text:span><text:a xlink:type="simple" xlink:href="http://hdl.handle.net/2027/nnc1.1000419826" text:style-name="Internet_20_link" text:visited-style-name="Visited_20_Internet_20_Link"><text:span text:style-name="T34">http://hdl.handle.net/2027/nnc1.1000419826</text:span></text:a>&gt;</text:p>
      <text:p text:style-name="P72"/>
      <text:p text:style-name="P78"><text:span text:style-name="T34"/></text:p>
      <text:p text:style-name="P36">1891 Pascoes living in St Leonards Streatham <text:s/><text:span text:style-name="T48">1891 census entry shows Jane </text:span><text:span text:style-name="T246">C</text:span><text:span text:style-name="T48">, </text:span><text:span text:style-name="T246">(age 45) </text:span><text:span text:style-name="T48">as </text:span><text:span text:style-name="T246">household head</text:span><text:span text:style-name="T48">; with ethel m (age 19), </text:span><text:span text:style-name="T97">M</text:span><text:span text:style-name="T48">ary <text:s/>(age 9) and Ka</text:span><text:span text:style-name="T245">t</text:span><text:span text:style-name="T48">e Coope</text:span><text:span text:style-name="T97">r</text:span><text:span text:style-name="T48"> age 26 servant. </text:span></text:p>
      <text:p text:style-name="P36">"England and Wales, Census, 1891", <text:span text:style-name="T15">FamilySearch</text:span> (https://www.familysearch.org/ark:/61903/1:1:QSG2-HZM : Sat Jul 06 03:45:05 UTC 2024), Entry for Jane C Pascoe and Ethel M Pascoe, 1891. <text:span text:style-name="T245">Ethel is shown as born in Boston USA. </text:span></text:p>
      <text:p text:style-name="P36"/>
      <text:p text:style-name="P156" loext:marker-style-name="T39"><text:span text:style-name="T35">1891 </text:span><text:span text:style-name="T34">The American roads through England : a pocket-book of matter-of-fact information. &lt;</text:span><text:a xlink:type="simple" xlink:href="http://hdl.handle.net/2027/hvd.32044024495145" text:style-name="Internet_20_link" text:visited-style-name="Visited_20_Internet_20_Link">http://hdl.handle.net/2027/hvd.32044024495145</text:a><text:span text:style-name="T34">&gt;</text:span></text:p>
      <text:p text:style-name="P156" loext:marker-style-name="T39"><text:span text:style-name="T34"/></text:p>
      <text:p text:style-name="P51">1891 Bright<text:span text:style-name="T66">on</text:span> : a pocket book of local information</text:p>
      <text:p text:style-name="P51">Eastbourne Hastings and St Leonards</text:p>
      <text:p text:style-name="P51"/>
      <text:p text:style-name="P51"><text:span text:style-name="T99">1891 </text:span>roads to paris</text:p>
      <text:p text:style-name="P52"/>
      <text:p text:style-name="P52"><text:span text:style-name="T64">Claude says </text:span>Pascoe positions the book as a modest, unpretentious guide — a "trifle" not requiring grand introduction ;Argues that "most pleasing things are, comparatively speaking, small" ;Notes that care and expense went into production; hopes neither was wasted <text:span text:style-name="T65">[media/pascoe1891Preface.png]</text:span></text:p>
      <text:p text:style-name="P9"/>
      <text:p text:style-name="P62"><text:span text:style-name="T101">1893 <text:s/></text:span>London’s World’s Fair 1892 and Great Social, Political and Moral Exposition. Sampson Low, Marston, and Co. [reviewed in <text:bookmark-start text:name="__DdeLink__18389_1335538775"/>Daily Graphic, 1 may 1893, p12<text:bookmark-end text:name="__DdeLink__18389_1335538775"/> <text:a xlink:type="simple" xlink:href="https://www.newspapers.com/image/1281486390/" text:style-name="Internet_20_link" text:visited-style-name="Visited_20_Internet_20_Link">https://www.newspapers.com/image/1281486390/</text:a></text:p>
      <text:p text:style-name="P63">[media/pascoe1893review.png]</text:p>
      <text:p text:style-name="P8"><text:bookmark-start text:name="__DdeLink__18387_1335538775"/>LONDON's WORLD'S FAIR, 1893</text:p>
      <text:p text:style-name="P8"/>
      <text:p text:style-name="P8">“Let who will go to Chicago” is the tenour of a book, pamphlet, brochure, or call it what you will,</text:p>
      <text:p text:style-name="P8">by a Mr. Charles Eyre Pascoe, “ but I can show you without going out of London a world’s fair of even</text:p>
      <text:p text:style-name="P8"><text:s/>greater interest.” <text:s/>It is an introduction to men and manners, an essay on the queer side of things, a social skit, a political and moral “expedition,” to use a villainous Yankee word now becoming ac<text:span text:style-name="T97">c</text:span>limatised. Mr. Pegram, whose clever studies are the saving of the production, is one of the most brilliant, as he is, we believe, quite the youngest of the new black and white school, and no caricaturist, but an excellent draughtsman. It is worth while <text:span text:style-name="T97">t</text:span>o wade through some of Mr. Pascoe’s discursive</text:p>
      <text:p text:style-name="P8">dissertations on things in general and follies in particular to come across his clever sketches, and if the</text:p>
      <text:p text:style-name="P8">rest is padding—well, it is sometimes amusing padding. <text:s/>To be Heinesque is not given to every one; even to be fanciful needs a lighter touch, and to satirise the world’s weaknesses and the degenerate spirit of the age is a cheap pastime nowadays. One illustration which we reproduce shows the interior of <text:s/>"The Temple of Fashion,” the <text:s/>"enchanting or enchanted circle with the female devotees prostrate around it, The presiding priestess, with her magic wand, is e<text:span text:style-name="T97">x</text:span>plaining some of its mysteries, into which no man dare seek to penetrate. It is a striking picture, made up of women, mortal women, genuflecting, <text:soft-page-break/>even more so than is customary in other temples.” In this diluted “Sartor Resartus” strain does the description continue. A little of it might do very well, but <text:s/>anything more is too much. ("London's World's Fair, 1893, and Great Social, Political, and Moral Exposition,” by Charles Eyre Pascoe and Fred Pegram, Sampson Low, Marston, and Co.)<text:bookmark-end text:name="__DdeLink__18387_1335538775"/></text:p>
      <text:p text:style-name="P8"/>
      <text:p text:style-name="P41">1895 “Londoners at home” article in Quarterly Review <text:span text:style-name="T42">no 363 <text:s/></text:span><text:span text:style-name="T44">references </text:span><text:span text:style-name="T42"><text:s/>“londo</text:span><text:span text:style-name="T44">n</text:span><text:span text:style-name="T42"> of today” p 59</text:span></text:p>
      <text:p text:style-name="P8"/>
      <text:p text:style-name="P24"><text:bookmark-start text:name="__DdeLink__20987_1107220413"/>1896 “A word for the skipper” letter to Daily News [media/pascoe1896dailynewsletter.png]</text:p>
      <text:p text:style-name="P24"/>
      <text:p text:style-name="P62">1896 “A literary Londoner in Liverpool” letter to Liverpool Daily Post, 25 May 1896 [<text:a xlink:type="simple" xlink:href="https://www.newspapers.com/image/796699159/" text:style-name="Internet_20_link" text:visited-style-name="Visited_20_Internet_20_Link">https://www.newspapers.com/image/796699159/</text:a>] &lt;<text:span text:style-name="T94">media/pascoe1896liverpool.png]</text:span><text:bookmark-end text:name="__DdeLink__20987_1107220413"/></text:p>
      <text:p text:style-name="P62"/>
      <text:p text:style-name="P24">1897 Notice of letter “in which that well known writer earnestly counsels Americans landing at Liverpool not to hurry off to London” [media/pascoe1897derby.png] <text:span text:style-name="T94">(i.e. the foregoing)</text:span></text:p>
      <text:p text:style-name="P24"/>
      <text:p text:style-name="P65"><text:span text:style-name="T101">1898 </text:span><text:span text:style-name="T5">Letter </text:span>"WANTED, A THEATRICAL DIRECTORY." Morning Post, 3 Mar. 1898, p. 8. British Library Newspapers, link.gale.com/apps/doc/GS3214978832/BNCN?u=oxford&amp;sid=bookmark-BNCN&amp;pg=8&amp;xid=38e8fc5b. Accessed 28 Mar. 2026. <text:s text:c="2"/><text:span text:style-name="T5">[media/pascoe1898MornWanted.</text:span><text:span text:style-name="T6">png</text:span><text:span text:style-name="T5">]</text:span></text:p>
      <text:p text:style-name="P65"/>
      <text:p text:style-name="P75">1899 Letter<text:span text:style-name="T101">s</text:span> <text:span text:style-name="T101">on Transvaal war </text:span>in Daily News (sat 30 dec 1899, p 9; 30 sept 1899 p6)</text:p>
      <text:p text:style-name="P75"/>
      <text:p text:style-name="P67">1900 Response from Silas Hocking &lt;<text:a xlink:type="simple" xlink:href="https://en.wikipedia.org/wiki/Silas_K._Hocking" text:style-name="Internet_20_link" text:visited-style-name="Visited_20_Internet_20_Link">https://en.wikipedia.org/wiki/Silas_K._Hocking</text:a>&gt; to <text:span text:style-name="T98">the foregoing</text:span></text:p>
      <text:p text:style-name="P67">Daily News 1 Jan 1900 p.6 <text:s/><text:a xlink:type="simple" xlink:href="https://www.newspapers.com/image/390567970/" text:style-name="Internet_20_link" text:visited-style-name="Visited_20_Internet_20_Link">https://www.newspapers.com/image/390567970/</text:a>[media/pascoe1900rebuked.png]</text:p>
      <text:p text:style-name="P66"/>
      <text:p text:style-name="P22">1901 Census shows same name age 58 and family; occ<text:span text:style-name="T22">u</text:span>pation “Literary Pursuits”, daughter Ethel M age 28 now “author”; also son Charles C<text:span text:style-name="T49">orbett </text:span><text:s/>age 24 ditto. <text:s/>22 <text:span text:style-name="T23">Ho</text:span>pton Rd, Wandsworth, parish St Leonards, Streatham; <text:s/><text:span text:style-name="T17">visitor Jose Lopez “student” born “Phillipines (Fillipino) and other visitors”</text:span></text:p>
      <text:p text:style-name="P22">England and Wales, Census, 1901", <text:span text:style-name="T15">FamilySearch</text:span> (https://www.familysearch.org/ark:/61903/1:1:X9C6-92W : Thu Feb 13 04:10:33 UTC 2025), Entry for Charles E Pascoe and Jane C Pascoe, 31 Mar 1901.</text:p>
      <text:p text:style-name="P22"/>
      <text:p text:style-name="P27">1902 notice of special edition of London toDay for the coronation : <text:span text:style-name="T8">[</text:span>media/pascoe1902plug.png<text:span text:style-name="T8">]</text:span></text:p>
      <text:p text:style-name="P156" loext:marker-style-name="T39"><text:span text:style-name="T34">The pageant </text:span><text:span text:style-name="T38">&amp;amp;</text:span><text:span text:style-name="T34"> ceremony of the coronation of Their Majesties King Edward the Seventh and Queen Alexandra &lt;http://hdl.handle.net/2027/coo.31924027939671</text:span></text:p>
      <text:p text:style-name="P156" loext:marker-style-name="T39"><text:span text:style-name="T34">&gt;</text:span></text:p>
      <text:p text:style-name="P68"/>
      <text:p text:style-name="P29"><text:span text:style-name="T24">1906 </text:span><text:s/>Royal Literary Fund <text:span text:style-name="T25">Application dated 22 sep</text:span><text:span text:style-name="T26">t</text:span><text:span text:style-name="T25"> 1906 rejected “authorship insufficient”.</text:span></text:p>
      <text:p text:style-name="P28">&lt;<text:a xlink:type="simple" xlink:href="https://solo.bodleian.ox.ac.uk/permalink/44OXF_INST/1h8il1q/cdi_gale_digitalcollections_AHHXKK910557078" text:style-name="Internet_20_link" text:visited-style-name="Visited_20_Internet_20_Link">https://solo.bodleian.ox.ac.uk/permalink/44OXF_INST/1h8il1q/cdi_gale_digitalcollections_AHHXKK910557078</text:a>&gt;</text:p>
      <text:p text:style-name="P95"/>
      <text:p text:style-name="P53">Marchmont Rd, Wallington does not appear on maps before 1911: it is adjacent to an area of farmland called Beddington which (ironically) by 1932 is the site of the London (Croydon) air field. <text:span text:style-name="T89">Hillside </text:span><text:span text:style-name="T90">Avenue does not exist, but Hillside Gardens does, and runs into Marchmont Rd.</text:span></text:p>
      <text:p text:style-name="P30"/>
      <text:p text:style-name="P48"><text:span text:style-name="T54">1908 <text:s/>Published (Duckworth) a volume enti</text:span><text:span text:style-name="T83">t</text:span><text:span text:style-name="T54">led </text:span><text:span text:style-name="T16">No. 10, Downing Street, Whitehall: Its History and Associations Large octavo (25 x 19cm), pp.[16] x; 344 [2]. With eight colour plates after illustrations by Flower, including a frontispiece; as wells as four sketches; six plans; and 40 black and white </text:span><text:soft-page-break/><text:span text:style-name="T16">portraits of Prime Ministers. </text:span><text:span text:style-name="T67"><text:s/></text:span><text:span text:style-name="T68">[recycled from contribs to Leisure Hour] &lt;</text:span><text:a xlink:type="simple" xlink:href="https://catalog.hathitrust.org/Record/000196244" text:style-name="Internet_20_link" text:visited-style-name="Visited_20_Internet_20_Link"><text:span text:style-name="T68">https://catalog.hathitrust.org/Record/000196244</text:span></text:a><text:span text:style-name="T68"> access limited by hathitrust&gt;</text:span></text:p>
      <text:p text:style-name="P48"><text:span text:style-name="T68">&lt;</text:span><text:a xlink:type="simple" xlink:href="https://archive.org/details/nodowningstreet02pascgoog" text:style-name="Internet_20_link" text:visited-style-name="Visited_20_Internet_20_Link"><text:span text:style-name="T68">https://archive.org/details/nodowningstreet02pascgoog</text:span></text:a><text:span text:style-name="T68">&gt;</text:span></text:p>
      <text:p text:style-name="P48"><text:span text:style-name="T68"/></text:p>
      <text:p text:style-name="P48"><text:span text:style-name="T70">1902 </text:span><text:span text:style-name="T69">noticed in </text:span><text:bookmark-start text:name="__DdeLink__18392_1335538775"/><text:span text:style-name="T68">Rosa, Sub. "Under Cover." The Gentlewoman and Modern Life, vol.</text:span></text:p>
      <text:p text:style-name="P148">XXIV, no. 613, 5 Apr. 1902, p. 461<text:bookmark-end text:name="__DdeLink__18392_1335538775"/>. Nineteenth Century Collections</text:p>
      <text:p text:style-name="P148">Online, link.gale.com/apps/doc/IGWHGE441398212</text:p>
      <text:p text:style-name="P48"><text:span text:style-name="T16"/></text:p>
      <text:p text:style-name="P48">1909 <text:span text:style-name="T63">Published </text:span><text:s/><text:span text:style-name="T15">The chambers of commerce year-book. A directory of places in the united kingdom where they are instituted, and a record of their aims and work. supplemented by specially contributed articles and other information. edited by charles eyre pascoe. vol. 1. jan. 1908 - jan. 1909</text:span>. York, England: Retrieved from https://www.proquest.com/books/chambers-commerce-year-book-directory-places/docview/2741450979/se-2 </text:p>
      <text:p text:style-name="P18"/>
      <text:p text:style-name="P64">1912 “Dickens in Yorkshire. ” Review . <text:bookmark-start text:name="__DdeLink__18394_1335538775"/>Weekly Examiner 22 Jun 1912, p9<text:bookmark-end text:name="__DdeLink__18394_1335538775"/> <text:a xlink:type="simple" xlink:href="https://www.newspapers.com/image/833926096/" text:style-name="Internet_20_link" text:visited-style-name="Visited_20_Internet_20_Link">https://www.newspapers.com/image/833926096/</text:a></text:p>
      <text:p text:style-name="P64">[media/pascoe1912review-1.png media/pascoe1912review-2.png]</text:p>
      <text:p text:style-name="P18"/>
      <text:p text:style-name="P49">In Jan 1912, his son Charles Corbett Pascoe, <text:span text:style-name="T57">is </text:span>described as an “Advertising agent” in the baptism certificate for Pascoe’s first grand child, <text:s/>Jean Marion Carbett Pascoe. He moved to Canada, and is recorded in Calgary Alberta in 1917, 1919</text:p>
      <text:p text:style-name="P16"/>
      <text:p text:style-name="P2">1912: died at <text:span text:style-name="T1">his</text:span> home in <text:span text:style-name="T2">Hill-side Ave, Wallington. “He was the son of Major Pascoe, of the Royal Marines, who saw active service in the French and American Wars. He was educated at Christ’s Hospital, and was ten years in the Admiralty. In 1869 he retired on a commuted pension and took up journalism, and in the next year he got married and went to America, where he </text:span><text:span text:style-name="T46">j</text:span><text:span text:style-name="T2">oined the staff of the “Boston Globe” as foreign editor. After three years he returned to England, and acted as London correspondent for several American newspapers. Among the work he did was an investigation of the English prison system for the New York Journal. Later he joined the staff of The Standard, and wrote for that paper some striking articles on English canal life. During his later years, he wrote several books.”</text:span></text:p>
      <text:p text:style-name="P2"/>
      <text:p text:style-name="P47">Author’s Fatal Excitement</text:p>
      <text:p text:style-name="P47"/>
      <text:p text:style-name="P47">The barking of dogs near his house, it was stated at an inquest yesterday at Wallington (Surrey) on Mr Charles Eyre Pascoe, an author, had worried him for some time past, and on Saturday he became very excited at the barking of a neighbour’s dog and went to its owner to complain. Noticing that he looked ill, the neighbour asked him to come indoors and sit down, but while he was crossing the threshold he fell dead. A doctor said Mr Pascoe’s heart was very weak, and in his opinion the heart was ruptured through becoming excited over the barking of the dogs. The jury returned a verdict of “Death from natural causes.” [South Wales Echo, 13 nov 1912, p4 &lt;<text:a xlink:type="simple" xlink:href="https://www.newspapers.com/image/943912884/" text:style-name="Internet_20_link" text:visited-style-name="Visited_20_Internet_20_Link">https://www.newspapers.com/image/943912884/</text:a>&gt;]</text:p>
      <text:p text:style-name="P47"/>
      <text:p text:style-name="P81">[same para more or less appears over the next week in <text:span text:style-name="T100">the Yorkshire Evening Arg</text:span>u<text:span text:style-name="T100">s, the Worcestershire Chronicle, the Leicester Mercury, the Newcastle Daily Chronicle,. The Leicester Chronicle, The Citizen, the </text:span>E<text:span text:style-name="T100">vening Ga</text:span>z<text:span text:style-name="T100">ette, the W</text:span>e<text:span text:style-name="T100">stern Daily Press, and the Huddersfield Da</text:span>i<text:span text:style-name="T100">ly examiner</text:span>]</text:p>
      <text:p text:style-name="P77"/>
      <text:p text:style-name="P81"/>
      <text:p text:style-name="P47"/>
      <text:p text:style-name="P56"><text:soft-page-break/>“A well-known man of letters and a graceful versifier has passed away in the person of Mr Charles Eyre Pascoe, who for many <text:span text:style-name="T101">y</text:span>ears was a familiar figure in Bohemian circles. There were few men who knew their London better than Mr. Pascoe, and still fewer who could treat of its history in at once so interesting and informing a manner. In the course of the years many delightful little works on London had come from his pen” [Souther<text:span text:style-name="T84">n</text:span> Daily Echo, sat 16 nov 1912 &lt;<text:a xlink:type="simple" xlink:href="https://www.newspapers.com/image/1148740376/" text:style-name="Internet_20_link" text:visited-style-name="Visited_20_Internet_20_Link">https://www.newspapers.com/image/1148740376/</text:a>&gt;</text:p>
      <text:p text:style-name="P56"/>
      <text:p text:style-name="P56">"Tewkesbury." <text:span text:style-name="T15">Gloucester Citizen</text:span>, 13 Nov. 1912, p. 5. <text:span text:style-name="T15">British Library Newspapers</text:span>, link.gale.com/apps/doc/JA3239827882/BNCN?u=oxford&amp;sid=bookmark-BNCN&amp;pg=5&amp;xid=89af67aa. Accessed 11 Apr. 2026.</text:p>
      <text:p text:style-name="P56"/>
      <text:p text:style-name="P149"><text:bookmark-start text:name="__DdeLink__21053_1107220413"/>Barking of Dogs and sudden Death.</text:p>
      <text:p text:style-name="P149">Sad End of well-known resident of Wallington.</text:p>
      <text:p text:style-name="P3"/>
      <text:p text:style-name="P3">Mr. Charles Eyre Pascoe, who was <text:span text:style-name="T85">a</text:span> well-known author, and lived at Penwerris, Hillside-garden<text:span text:style-name="T85">s</text:span>, <text:span text:style-name="T85">Wallington, met</text:span> with a sudden and tragic death last <text:span text:style-name="T85">Satur</text:span>day afternoon not many yards from his house. For a long time the bar<text:span text:style-name="T85">k</text:span>ing of dogs h<text:span text:style-name="T85">a</text:span>d b<text:span text:style-name="T85">een </text:span>his special aversion, and his feeling about it was <text:span text:style-name="T85">s</text:span>o <text:span text:style-name="T85">s</text:span>trong that he had written several <text:span text:style-name="T85">letters of protest to the local Press. Probably the noise had more effect on him than </text:span>it would have had on another because he had been in <text:span text:style-name="T85">ill</text:span> health for some <text:span text:style-name="T86">time. Last Saturday afternoon he was lying </text:span>on the <text:span text:style-name="T86">c</text:span>ouch after <text:span text:style-name="T86">h</text:span>a<text:span text:style-name="T86">v</text:span>ing <text:span text:style-name="T86">ha</text:span>d <text:span text:style-name="T86">s</text:span>om<text:span text:style-name="T86">e</text:span>thing t<text:span text:style-name="T86">o eat, a</text:span>nd wa<text:span text:style-name="T86">s</text:span> trying to go to sleep when he <text:span text:style-name="T86">heard </text:span>the ba<text:span text:style-name="T86">r</text:span>king of <text:span text:style-name="T86">a </text:span>dog a few doors away. F<text:span text:style-name="T86">inding</text:span> where it was he got up in a <text:span text:style-name="T86">state </text:span>of excitement <text:span text:style-name="T86">a</text:span>nd hurried to the front door <text:span text:style-name="T86">of</text:span> Cab<text:span text:style-name="T86">a</text:span>n<text:span text:style-name="T86">a</text:span>, the residence <text:span text:style-name="T86">of a <text:s/></text:span>lady named Mrs. <text:span text:style-name="T86">Lawrence </text:span>to complain a<text:span text:style-name="T86">nd </text:span>a<text:span text:style-name="T86">s</text:span>k th<text:span text:style-name="T86">a</text:span>t the dog should <text:s/><text:span text:style-name="T86">be q</text:span>uieted. The hu<text:span text:style-name="T86">rry</text:span> and the excitement <text:span text:style-name="T86">made</text:span> it difficult <text:s/><text:span text:style-name="T88">f</text:span>or <text:span text:style-name="T86">him to speak,</text:span> but Mrs. Lawrence understood what <text:span text:style-name="T86">he</text:span> meant to say and said that she was <text:span text:style-name="T86">very s</text:span>or<text:span text:style-name="T86">ry</text:span> and would <text:span text:style-name="T86">s</text:span>ee what she could do about it. <text:s/>She noticed that he seemed ill and very kindly asked him to come inside and sit down for a little while so that be m<text:span text:style-name="T86">igh</text:span>t <text:span text:style-name="T86">recover. </text:span><text:s/>Mr. <text:span text:style-name="T86">Pasco</text:span>e <text:span text:style-name="T86">accepted her offer, and was crossing the </text:span>threshold when he stumbled and <text:span text:style-name="T86">fell, and </text:span>died before help could be obtained. With</text:p>
      <text:p text:style-name="P4">the <text:span text:style-name="T86">assistance</text:span> ot her <text:span text:style-name="T86">mother-in-law and a gentleman </text:span>who was passing <text:span text:style-name="T86">she got h</text:span>im in <text:span text:style-name="T86">door</text:span><text:span text:style-name="T88">s</text:span>, and her<text:span text:style-name="T86">self</text:span> went for Dr. <text:span text:style-name="T86">McD</text:span>oug<text:span text:style-name="T86">a</text:span>ll. He came at once, but could do nothing, as <text:span text:style-name="T86">life was already extinct.</text:span></text:p>
      <text:p text:style-name="P57"/>
      <text:p text:style-name="P2">Mr. Pascoe, who was 70 years of age, was a journalist and author. Among the books he wrote was one concerning the associations of Charles Dickens with Yorkshire, which <text:s/>showed a careful study of all possible sources of information, and had a <text:span text:style-name="T86">good </text:span>reception on its p<text:span text:style-name="T86">u</text:span>blication. Another <text:span text:style-name="T86">deal</text:span>t with the history of the most famous street in the world—<text:span text:style-name="T86">Dow</text:span>ning-street. This was a very successful volume, and is regarded as an authority on the subject. Locally Mr. Pascoe was very well known, and had man<text:span text:style-name="T86">y </text:span>friends, and among the societies to which he belonged was the ‘ House of Commons,” though he had not attended there lately.</text:p>
      <text:p text:style-name="P2"/>
      <text:p text:style-name="P2">He was the son of Major Pascoe, of the Royal M<text:span text:style-name="T86">arines, </text:span>who saw active service in the French and American Wars. He was educated at Christ’s Hospital and was ten years in the Admiralty. <text:span text:style-name="T86">In </text:span>1869 he retired on a commuted pension, and took up journalism, and in the next year he got married and went to America, where he joined the staff of the “Boston Globe” as foreign editor. After three years he returned to <text:span text:style-name="T86">Eng</text:span>land, and acted as Lond<text:span text:style-name="T86">o</text:span>n <text:span text:style-name="T86">correspo</text:span>ndent for several American nowspapers. <text:span text:style-name="T86">Amo</text:span>ng the work he did was an i<text:span text:style-name="T86">nvest</text:span>igation of the English prison system for the “<text:span text:style-name="T86">New</text:span> York Journal.” <text:s/>Later <text:s/>he joined the staff of “The Standard,” and wr<text:span text:style-name="T86">o</text:span>te for that paper <text:span text:style-name="T86">s</text:span>ome striking arti<text:span text:style-name="T86">c</text:span>les on canal life. During his latter years he wrote several books, including the two already mentioned. </text:p>
      <text:p text:style-name="P2"/>
      <text:p text:style-name="P2">An i<text:span text:style-name="T86">nquest</text:span> was held on the body at Bandon Hil<text:span text:style-name="T86">l</text:span> on Tuesday afternoon by Mr. F. J. Nightingale, Coroner f<text:span text:style-name="T88">o</text:span>r the Reigate Division. </text:p>
      <text:p text:style-name="P2"><text:soft-page-break/></text:p>
      <text:p text:style-name="P2">Mrs. Pascoe, the widow, said that her husband was 70 years of age, and was not very robust, hav<text:span text:style-name="T87">ing </text:span>suffered slightly from a weak heart. But <text:span text:style-name="T87">he</text:span> had not been <text:span text:style-name="T87">s</text:span>een by <text:span text:style-name="T87">a</text:span> doct<text:span text:style-name="T87">o</text:span>r very recently. On Saturday afternoon a dog at Cabana was barking, and it <text:span text:style-name="T88">s</text:span>eemed to excit<text:span text:style-name="T87">e</text:span> him a <text:span text:style-name="T87">good </text:span>deal. He was on the sofa trying to <text:span text:style-name="T87">sleep, </text:span>but the bark<text:span text:style-name="T87">ing made him nervous a</text:span>nd he got <text:span text:style-name="T87">u</text:span>p and went out, intending, as she <text:span text:style-name="T87">beli</text:span>eved, to <text:span text:style-name="T87">complain </text:span>about the noise to the owner of the d<text:span text:style-name="T87">o</text:span>g. Mrs. Pascoe thought he hurried.</text:p>
      <text:p text:style-name="P2">abong to the house, and she understood that he died there,</text:p>
      <text:p text:style-name="P2"/>
      <text:p text:style-name="P2">Mrs. Helen Agnes White Lewrence, <text:span text:style-name="T87">o</text:span>f Cabana, Hil<text:span text:style-name="T87">l</text:span>side-gardens, said th<text:span text:style-name="T88">a</text:span>t on Saturd<text:span text:style-name="T87">a</text:span>y afternoon Mr. Pascoe came to her <text:span text:style-name="T87">do</text:span>or and com<text:span text:style-name="T87">pla</text:span>ined about the d<text:span text:style-name="T87">og</text:span> b<text:span text:style-name="T87">a</text:span>rkin<text:span text:style-name="T87">g. S</text:span>he <text:span text:style-name="T87">s</text:span>aid she was very sorry <text:span text:style-name="T87">and</text:span> would t<text:span text:style-name="T87">r</text:span>y to <text:span text:style-name="T87">sto</text:span>p it. <text:span text:style-name="T87">Deceased </text:span><text:s/>seemed excited and ha<text:span text:style-name="T87">d gre</text:span>at difficulty <text:span text:style-name="T87">in </text:span>speaking at all, which <text:span text:style-name="T87">fact migh</text:span>t <text:s/>ha<text:span text:style-name="T87">v</text:span>e <text:span text:style-name="T87">been</text:span> due to the excitement <text:span text:style-name="T87">of h</text:span>urrying. He seemed out of breath, <text:span text:style-name="T87">and, see</text:span>ing that he looked rather ill, <text:span text:style-name="T87">s</text:span>he a<text:span text:style-name="T87">s</text:span>ked him if he would like to come in and sit down. He started to cross the threshold, but had o<text:span text:style-name="T87">nly</text:span> taken a few steps when he <text:span text:style-name="T87">fell</text:span> down. <text:span text:style-name="T87">W</text:span>itness called her mother-in-<text:span text:style-name="T88">law </text:span>and a gentleman <text:span text:style-name="T87">pass</text:span>ing came to their as<text:span text:style-name="T87">s</text:span>istance, and the dece<text:span text:style-name="T87">a</text:span>sed was carried <text:span text:style-name="T87">indoors.</text:span> Dr. McDougall al<text:span text:style-name="T87">s</text:span>o came at her <text:span text:style-name="T87">req</text:span>ues<text:span text:style-name="T87">t.</text:span></text:p>
      <text:p text:style-name="P2"/>
      <text:p text:style-name="P58">By the foreman <text:span text:style-name="T19"><text:s/>of the jury—The dog was in </text:span>the garden.</text:p>
      <text:p text:style-name="P2"/>
      <text:p text:style-name="P2"><text:span text:style-name="T87">Dr. W. S. M</text:span>cDouga<text:span text:style-name="T87">l</text:span>l, of W<text:span text:style-name="T87">o</text:span>od<text:span text:style-name="T87">c</text:span>ote-road, <text:span text:style-name="T87">Wallington, said he had </text:span>known Mr. Pas<text:span text:style-name="T87">coe</text:span></text:p>
      <text:p text:style-name="P2"><text:span text:style-name="T87">f</text:span><text:span text:style-name="T88">o</text:span><text:span text:style-name="T87">r many </text:span>years, but <text:span text:style-name="T87">did </text:span>not think that he had ever attended hi<text:span text:style-name="T87">m professionally. </text:span><text:s/>He</text:p>
      <text:p text:style-name="P2"><text:span text:style-name="T87">w</text:span>as <text:span text:style-name="T87">s</text:span>ummoned on Saturday afternoon by Mr<text:span text:style-name="T87">s.</text:span> Lawrencs, and later he made an ex-</text:p>
      <text:p text:style-name="P2">ination of the body, when he found that heart was r<text:span text:style-name="T87">u</text:span>ptured. Death must have been instantaneo<text:span text:style-name="T88">u</text:span>s.</text:p>
      <text:p text:style-name="P2"/>
      <text:p text:style-name="P2">Asked <text:s/>by the Coroner <text:span text:style-name="T87">whether </text:span><text:s/>death was caused <text:span text:style-name="T87">by</text:span> h<text:span text:style-name="T87">u</text:span>rryi<text:span text:style-name="T87">ng to</text:span> the spot and the</text:p>
      <text:p text:style-name="P2">excitement, the do<text:span text:style-name="T87">ct</text:span>or <text:s/>replied that in his opinion it <text:span text:style-name="T87">was,</text:span></text:p>
      <text:p text:style-name="P2"/>
      <text:p text:style-name="P2">The jury returned a verdict of <text:s/>“Death from natural causes.”</text:p>
      <text:p text:style-name="P2"/>
      <text:p text:style-name="P5"><text:span text:style-name="T44">The funeral took place at Bandon </text:span><text:span text:style-name="T47">H</text:span><text:span text:style-name="T44">ill Cemetery on Wedneday. The burial rites were con</text:span><text:span text:style-name="T87">d</text:span><text:span text:style-name="T44">ucted by the Rev. R.J. Doble, and the mourners were Mrs Pascoe, Mr Wheeler, Miss Gammell, Mr and Mrs Gurdon Palin</text:span><text:span text:style-name="T46">[1]</text:span><text:span text:style-name="T44">, Mr and Mrs Arthur Barnard, Mr and Mrs Denny, Mr and Mrs Leman Harem, Miss Heeley and Mrs. Poole. </text:span><text:span text:style-name="T87">T</text:span>here were no flowers by special request.</text:p>
      <text:p text:style-name="P59">[Sutton and Cheam Advertiser, 15 Nov 1912, page 5]</text:p>
      <text:p text:style-name="P5">&lt;<text:a xlink:type="simple" xlink:href="https://www.newspapers.com/image/975619067/" text:style-name="Internet_20_link" text:visited-style-name="Visited_20_Internet_20_Link">https://www.newspapers.com/image/975619067/</text:a>&gt;<text:bookmark-end text:name="__DdeLink__21053_1107220413"/></text:p>
      <text:p text:style-name="P5"/>
      <text:p text:style-name="P76">Abbreviated notices also appeared in the Yorkshire Evening Arg<text:span text:style-name="T101">u</text:span>s, the Worcestershire Chronicle, the Leicester Mercury, the Newcastle Daily Chronicle,. The Leicester Chronicle, The Citizen, the <text:span text:style-name="T101">E</text:span>vening Ga<text:span text:style-name="T101">z</text:span>ette, the W<text:span text:style-name="T101">e</text:span>stern Daily Press, and the Huddersfield Da<text:span text:style-name="T101">i</text:span>ly examiner</text:p>
      <text:p text:style-name="P76"/>
      <text:p text:style-name="P76">…</text:p>
      <text:p text:style-name="P76"/>
      <text:p text:style-name="P31">Jane C. Pascoe was living at 57 Stafford Rd, Wallington in 1921. Her death was registered in Jan 1932. </text:p>
      <text:p text:style-name="P31">She was admitted to Greenwich Poor Law Union 29 sep 1911, discharged on 20 jan 1912</text:p>
      <text:p text:style-name="P32">She was on Electoral roll 1905, registered at 60 Worron Road.</text:p>
      <text:p text:style-name="P32"/>
      <text:p text:style-name="P43"><text:span text:style-name="T46">[1] Possibly Frederick Gurdon Palin, b 1871 Ches</text:span><text:span text:style-name="T244">h</text:span><text:span text:style-name="T46">ire, residing Wallington in 1911 census, with wife Eleanor Margaret, age 38 and 3 children Inder 10 </text:span>"England and Wales, Census, 1911", <text:span text:style-name="T15">FamilySearch</text:span> (https://www.familysearch.org/ark:/61903/1:1:XW85-HR4 : Thu Feb 13 14:57:01 UTC 2025), Entry for Frederick Gurdon Palin and Eleanor Margaret Palin, 1911.</text:p>
      <text:p text:style-name="P43"><text:soft-page-break/></text:p>
      <text:p text:style-name="P44">1911 <text:span text:style-name="T55">July/Sept </text:span>Ethel M Pascoe <text:span text:style-name="T55">was </text:span>married W.Ham, <text:span text:style-name="T55">to Charles A Ellis, or possibly John Grice</text:span></text:p>
      <text:p text:style-name="P44"/>
      <text:p text:style-name="P60">dog nuisance letters</text:p>
      <text:p text:style-name="P60">"DOGS." Morning Post, March 31, 1883, 3. British Library Newspapers (accessed April 11, 2026). <text:a xlink:type="simple" xlink:href="https://link.gale.com/apps/doc/R3210592382/BNCN?u=oxford&amp;sid=bookmark-BNCN&amp;pg=3&amp;xid=d8c105fb" text:style-name="Internet_20_link" text:visited-style-name="Visited_20_Internet_20_Link">https://link.gale.com/apps/doc/R3210592382/BNCN?u=oxford&amp;sid=bookmark-BNCN&amp;pg=3&amp;xid=d8c105fb</text:a>.</text:p>
      <text:p text:style-name="P60"/>
      <text:p text:style-name="P85">Hewitt also found a reference  (*Les Belges a Londres, par Bertram* (1867), that Pascoe was one of the assistant Hon Secs of a committee of reception for Belgians estd that year with a committee led by the Duke of Manchester and including various aristos and military men (Edward Cockcraft was the principal Hon Sec).</text:p>
      <text:p text:style-name="P85"/>
      <text:p text:style-name="P87">While in Boston it is reported he was a stalwart of the monthly meetings of the Papyrus Club, a Bohemian gathering of literary and non-literary  men formed in 1872, whose members included John Boyle O'Reilly, Robert Grant, John D. Wheelwright, Frank Underwood (founder of the <text:span text:style-name="T15">*Atlantic*</text:span>, and others. (See McLure's Magazine, December 1909, 215)</text:p>
      <text:p text:style-name="P87"/>
      <text:p text:style-name="P88">“[Henry M Stanley] was a <text:s/>reporter on the New York Herald, but after his return to America from his successful search for Livingstone, he came to one of the monthly dinners of the Papyrus Club in Boston, that Bohemian gathering of “‘literary’’ and “non-literary’’ members that Howells describes in “A Modern Instance.” Prominent in it in those golden days of its adolescence were John Boyle O’Reilly, Charles Eyre Pascoe, Robert Grant, John D, Wheelwright, Alexander Young, Frank Underwood (founder of the A<text:span text:style-name="T241">t</text:span>lantic), and Frank Harris, dramatist and physician.”</text:p>
      <text:p text:style-name="P87"/>
      <text:p text:style-name="P87"><text:s/>(apparently pictured in Wm Dean Howells' *A Modern Instance* (1881)), and Christian Science Monitor, 2 July 1910. </text:p>
      <text:p text:style-name="P87">The Globe at that time apparently had an impressive staff, including E.P. Whipple as lead book reviewer,  'Ben' Wolff as drama critic, and other staff including Hon George B Loring and Clarence Watson [see <text:bookmark text:name="m_3739882452253562494segment-title"/><text:span text:style-name="T105">Bill Barlow's budget (Douglas, Converse County, Wyo.), May 2, 1888.</text:span></text:p>
      <text:p text:style-name="Standard">In <text:span text:style-name="T15">The Independent, </text:span>25 March 1875 it is announced that he has 'become the London literary agent of D. Appleton and Co.'.</text:p>
      <text:p text:style-name="Standard"/>
      <text:p text:style-name="Standard">It is possible to locate some of his work for<text:span text:style-name="T15">Appleton's Journal</text:span>, which was clearly signed. </text:p>
      <text:p text:style-name="P86">[done]</text:p>
      <text:p text:style-name="P86"/>
      <text:p text:style-name="Standard">He also wrote for *Hearth and H<text:span text:style-name="T241">o</text:span>me*, eg 'Case of Jewels', c.15 February 1872 [listed in NYT, 15/2/1872]</text:p>
      <text:p text:style-name="Standard"/>
      <text:p text:style-name="Standard">He is listed in *The American*, 27 November 1880 as one of the contributors for that issue, and the sequence of author listing and articles, as well as the topic, suggests he was the author of the peice '<text:bookmark-start text:name="__DdeLink__21057_1107220413"/>"First Nights" at London Theatres'<text:bookmark-end text:name="__DdeLink__21057_1107220413"/>, 103-4. https://archive.org/details/sim_american-a-national-journal_1880-11-27_1_7/page/104/mode/1up?q=pascoe</text:p>
      <text:p text:style-name="Standard"/>
      <text:p text:style-name="Standard"/>
      <text:p text:style-name="Standard">He is listed in 1894 as one of the contributor to <text:span text:style-name="T15">the Critic</text:span> since its establishment in 1881.</text:p>
      <text:p text:style-name="Standard"/>
      <text:p text:style-name="Standard"/>
      <text:p text:style-name="Standard"><text:soft-page-break/>Author with Edward Pegram of *London's World's Fair, 1893, and Great Social, Political and Moral Exposition* (Sampson, Low and Marston, 1893)</text:p>
      <text:p text:style-name="Standard"/>
      <text:p text:style-name="Standard">A<text:span text:style-name="T244">u</text:span>thor of *the Golf Grounds of the South West* (1899) <text:span text:style-name="T104">[Guidebook, noticed by </text:span><text:bookmark-start text:name="__DdeLink__18398_1335538775"/><text:span text:style-name="T104">The Sketch 1899-07-19, p54</text:span><text:bookmark-end text:name="__DdeLink__18398_1335538775"/><text:span text:style-name="T104">1</text:span></text:p>
      <text:p text:style-name="P85"><text:bookmark-start text:name="__DdeLink__18396_1335538775"/>“I have received a dainty book, entitled ‘The Golf Grounds of the South-West,”’ by Charles Eyre Pascoe. giving on its showing a gossiping summary of the attractions of these downs whither men and maids resort to drive the flying ball. The letterpress is illustrated from sketches by Holland Tringham and Victor Prout, and also from photographs. These golfing grounds, in Surrey, Hants, Dorset, Devon, and Cornwall, are placed within easy reach by the exceilent arrangements of the London and South-Western Railway.”<text:bookmark-end text:name="__DdeLink__18396_1335538775"/></text:p>
      <text:p text:style-name="P85"/>
      <text:p text:style-name="P1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Verdan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30T22:49:23.372080235</meta:creation-date>
    <dc:date>2026-05-30T22:53:29.754569824</dc:date>
    <meta:editing-duration>P7DT9H44M54S</meta:editing-duration>
    <meta:editing-cycles>51</meta:editing-cycles>
    <meta:generator>LibreOffice/24.2.7.2$Linux_X86_64 LibreOffice_project/420$Build-2</meta:generator>
    <meta:document-statistic meta:table-count="0" meta:image-count="0" meta:object-count="0" meta:page-count="13" meta:paragraph-count="270" meta:word-count="7639" meta:character-count="47399" meta:non-whitespace-character-count="39898"/>
  </office:meta>
</office:document-meta>
</file>