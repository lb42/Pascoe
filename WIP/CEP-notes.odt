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2ade" officeooo:paragraph-rsid="00142ade"/>
    </style:style>
    <style:style style:name="P2" style:family="paragraph" style:parent-style-name="Standard">
      <style:text-properties officeooo:rsid="0014a5cd" officeooo:paragraph-rsid="0014a5cd"/>
    </style:style>
    <style:style style:name="P3" style:family="paragraph" style:parent-style-name="Standard">
      <style:text-properties officeooo:rsid="0015237b" officeooo:paragraph-rsid="0015237b"/>
    </style:style>
    <style:style style:name="P4" style:family="paragraph" style:parent-style-name="Standard">
      <style:text-properties officeooo:rsid="0015e774" officeooo:paragraph-rsid="0015e774"/>
    </style:style>
    <style:style style:name="P5" style:family="paragraph" style:parent-style-name="Standard">
      <style:text-properties officeooo:rsid="0015e774" officeooo:paragraph-rsid="00170e2e"/>
    </style:style>
    <style:style style:name="T1" style:family="text">
      <style:text-properties officeooo:rsid="000a5792"/>
    </style:style>
    <style:style style:name="T2" style:family="text">
      <style:text-properties officeooo:rsid="000b006b"/>
    </style:style>
    <style:style style:name="T3" style:family="text">
      <style:text-properties officeooo:rsid="0019ef15"/>
    </style:style>
    <style:style style:name="T4" style:family="text">
      <style:text-properties officeooo:rsid="001c1d6b"/>
    </style:style>
    <style:style style:name="T5" style:family="text">
      <style:text-properties officeooo:rsid="001aa011"/>
    </style:style>
    <style:style style:name="T6" style:family="text">
      <style:text-properties officeooo:rsid="001f9d60"/>
    </style:style>
    <style:style style:name="T7" style:family="text">
      <style:text-properties officeooo:rsid="00213c02"/>
    </style:style>
    <style:style style:name="T8" style:family="text">
      <style:text-properties officeooo:rsid="0029e2e3"/>
    </style:style>
    <style:style style:name="T9" style:family="text">
      <style:text-properties officeooo:rsid="0020c7a4"/>
    </style:style>
    <style:style style:name="T10" style:family="text">
      <style:text-properties officeooo:rsid="001d27de"/>
    </style:style>
    <style:style style:name="T11" style:family="text">
      <style:text-properties officeooo:rsid="0036e078"/>
    </style:style>
    <style:style style:name="T12" style:family="text">
      <style:text-properties officeooo:rsid="003a72b0"/>
    </style:style>
    <style:style style:name="T13" style:family="text">
      <style:text-properties officeooo:rsid="00170e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in Bio</text:p>
      <text:p text:style-name="P1"/>
      <text:p text:style-name="P1">[1] CEP baptismal cert </text:p>
      <text:p text:style-name="P1">[2] 1841 Census entry</text:p>
      <text:p text:style-name="P1">[3] 1851 census </text:p>
      <text:p text:style-name="P1">[4] 62 Killigrew st today <text:span text:style-name="T1"><text:s/></text:span><text:span text:style-name="T2">[media/pascoe1851residence.png]</text:span></text:p>
      <text:p text:style-name="P1">[5] Lukes Falmouth Packet</text:p>
      <text:p text:style-name="P1">[6] Bankruptcy</text:p>
      <text:p text:style-name="P1">[7] Father’s death</text:p>
      <text:p text:style-name="P1">[8] Marriage cert <text:span text:style-name="T4">media/pascoe1870residence.png]</text:span><text:span text:style-name="T3"> </text:span><text:span text:style-name="T4">[</text:span><text:a xlink:type="simple" xlink:href="https://maps.app.goo.gl/bR4fAJLVK9L8Rdkn6" text:style-name="Internet_20_link" text:visited-style-name="Visited_20_Internet_20_Link"><text:span text:style-name="T4">https://maps.app.goo.gl/bR4fAJLVK9L8Rdkn6</text:span></text:a><text:span text:style-name="T4">] </text:span><text:span text:style-name="T5"><text:s/></text:span></text:p>
      <text:p text:style-name="P2">[9]<text:span text:style-name="T6">media/pascoe1875POdir2.png] <text:s/></text:span><text:span text:style-name="T7">[media/pascoe1875Address.png].</text:span></text:p>
      <text:p text:style-name="P1"/>
      <text:p text:style-name="P2">[10]Review <text:span text:style-name="T8">[media/pascoe</text:span><text:span text:style-name="T9">1877examinerR</text:span><text:span text:style-name="T8">eview.png</text:span><text:span text:style-name="T10">]</text:span></text:p>
      <text:p text:style-name="P2">[11] Review <text:span text:style-name="T9">[media/pascoe1877review.png]</text:span></text:p>
      <text:p text:style-name="P2">[12] Review<text:span text:style-name="T10"> </text:span><text:span text:style-name="T9">[pascoe1878pmgreview.png]</text:span></text:p>
      <text:p text:style-name="P2">[13] Dramatic List Era Review </text:p>
      <text:p text:style-name="P2">[14] Dramatic List review in LitEx</text:p>
      <text:p text:style-name="P2">[15]<text:span text:style-name="T12">Sat 3 May 1879, page 6 </text:span><text:a xlink:type="simple" xlink:href="https://www.newspapers.com/image/1269624739" text:style-name="Internet_20_link" text:visited-style-name="Visited_20_Internet_20_Link"><text:span text:style-name="T12">https://www.newspapers.com/image/1269624739</text:span></text:a><text:span text:style-name="T12">]</text:span><text:span text:style-name="T11">.</text:span></text:p>
      <text:p text:style-name="P2">[16] PMG review</text:p>
      <text:p text:style-name="P2">[17] <text:s/>Pascoe published several articles in this journal, most of which were subsequently collected and recycled for some purpose. See Bibliography/</text:p>
      <text:p text:style-name="P2">[18] 1901 census</text:p>
      <text:p text:style-name="P3">[19] RLF application</text:p>
      <text:p text:style-name="P5">[20] <text:span text:style-name="T13">Probate</text:span></text:p>
      <text:p text:style-name="P5"><text:span text:style-name="T13">[21] </text:span>Obituary</text:p>
      <text:p text:style-name="P4">[2<text:span text:style-name="T13">2</text:span>] Other notices of his death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1T16:23:29.819557367</meta:creation-date>
    <dc:date>2026-04-16T20:00:03.398856883</dc:date>
    <meta:editing-duration>P4DT4H46M12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1" meta:paragraph-count="23" meta:word-count="102" meta:character-count="857" meta:non-whitespace-character-count="770"/>
  </office:meta>
</office:document-meta>
</file>